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833cm" table:align="left"/>
    </style:style>
    <style:style style:name="Table1.A" style:family="table-column">
      <style:table-column-properties style:column-width="3.874cm"/>
    </style:style>
    <style:style style:name="Table1.B" style:family="table-column">
      <style:table-column-properties style:column-width="2.96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6.84cm" table:align="left"/>
    </style:style>
    <style:style style:name="Table2.A" style:family="table-column">
      <style:table-column-properties style:column-width="3.505cm"/>
    </style:style>
    <style:style style:name="Table2.B" style:family="table-column">
      <style:table-column-properties style:column-width="3.336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.499cm" style:contextual-spacing="false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P15" style:family="paragraph">
      <style:paragraph-properties fo:text-align="start"/>
      <style:text-properties style:font-name="Liberation Mono" fo:font-size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le form:name="unnamed0" form:control-implementation="ooo:com.sun.star.form.component.FileControl" xml:id="control1" form:id="control1"/>
          <form:textarea form:name="prompt-textarea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paswee@tapaswee-Legion-Slim-5-16AHP9:~$ sudo sh -c 'echo "deb http://packages.osrfoundation.org/gazebo/ubuntu-stable $(lsb_release -cs) main" &gt; /etc/apt/sources.list.d/gazebo-stable.list' tapaswee@tapaswee-Legion-Slim-5-16AHP9:~$ wget http://packages.osrfoundation.org/gazebo.key -O - | sudo apt-key add - --2026-03-10 23:42:06-- http://packages.osrfoundation.org/gazebo.key Resolving packages.osrfoundation.org (packages.osrfoundation.org)... Warning: apt-key is deprecated. Manage keyring files in trusted.gpg.d instead (see apt-key(8)). 52.52.171.73 Connecting to packages.osrfoundation.org (packages.osrfoundation.org)|52.52.171.73|:80... connected. HTTP request sent, awaiting response... 200 OK Length: 1755 (1.7K) [application/octet-stream] Saving to: ‘STDOUT’ - 100%[======================================================================================================================&gt;] 1.71K --.-KB/s in 0s 2026-03-10 23:42:07 (86.7 MB/s) - written to stdout [1755/1755] OK tapaswee@tapaswee-Legion-Slim-5-16AHP9:~$ sudo apt-get update Hit:1 https://deb.nodesource.com/node_18.x nodistro InRelease Hit:2 https://brave-browser-apt-release.s3.brave.com stable InRelease Hit:3 http://security.ubuntu.com/ubuntu jammy-security InRelease Hit:4 http://in.archive.ubuntu.com/ubuntu jammy InRelease Hit:5 http://packages.ros.org/ros2/ubuntu jammy InRelease Hit:6 http://in.archive.ubuntu.com/ubuntu jammy-updates InRelease Hit:7 http://packages.osrfoundation.org/gazebo/ubuntu-stable jammy InRelease Hit:8 http://in.archive.ubuntu.com/ubuntu jammy-backports InRelease Hit:9 https://ppa.launchpadcontent.net/neovim-ppa/stable/ubuntu jammy InRelease Get:10 http://packages.osrfoundation.org/gazebo/ubuntu-stable jammy/main i386 Packages [28.3 kB] Hit:11 https://ppa.launchpadcontent.net/touchegg/stable/ubuntu jammy InRelease Fetched 28.3 kB in 2s (17.6 kB/s) Reading package lists... Done W: http://packages.osrfoundation.org/gazebo/ubuntu-stable/dists/jammy/InRelease: Key is stored in legacy trusted.gpg keyring (/etc/apt/trusted.gpg), see the DEPRECATION section in apt-key(8) for details. tapaswee@tapaswee-Legion-Slim-5-16AHP9:~$ sudo apt-get install ignition-fortress Reading package lists... Done Building dependency tree... Done Reading state information... Done ignition-fortress is already the newest version (1.0.3-2~jammy). 0 upgraded, 0 newly installed, 0 to remove and 13 not upgraded. tapaswee@tapaswee-Legion-Slim-5-16AHP9:~$ cd ~/clearpath_ws/src bash: cd: /home/tapaswee/clearpath_ws/src: No such file or directory tapaswee@tapaswee-Legion-Slim-5-16AHP9:~$ mkdir -p clearpath_ws/src tapaswee@tapaswee-Legion-Slim-5-16AHP9:~$ ls 22BRS1204_ws clearpath_ws Documents frames_2025-08-25_22.27.39.pdf frames_2026-02-10_21.47.03.pdf install.sh.asc Music secure_boot_password test_ws Arduino Desktop Downloads frames_2025-08-31_00.57.12.gv frames_2026-02-10_21.49.28.gv log my_world1.world snap Videos building_editor_models dev_pjt example_robot_urdf.xacro frames_2025-08-31_00.57.12.pdf frames_2026-02-10_21.49.28.pdf microros_ws Pictures Templates catkin_ws dev_ws frames_2025-08-25_22.27.39.gv frames_2026-02-10_21.47.03.gv install.sh model_editor_models Public test_gazebo tapaswee@tapaswee-Legion-Slim-5-16AHP9:~$ cd clear_ws bash: cd: clear_ws: No such file or directory tapaswee@tapaswee-Legion-Slim-5-16AHP9:~$ cd clearpath_ws tapaswee@tapaswee-Legion-Slim-5-16AHP9:~/clearpath_ws$ ls src tapaswee@tapaswee-Legion-Slim-5-16AHP9:~/clearpath_ws$ cd src tapaswee@tapaswee-Legion-Slim-5-16AHP9:~/clearpath_ws/src$ git clone https://github.com/clearpathrobotics/clearpath_simulator.git -b humble Cloning into 'clearpath_simulator'... remote: Enumerating objects: 1299, done. remote: Counting objects: 100% (374/374), done. remote: Compressing objects: 100% (175/175), done. remote: Total 1299 (delta 266), reused 204 (delta 198), pack-reused 925 (from 2) Receiving objects: 100% (1299/1299), 288.99 MiB | 812.00 KiB/s, done. Resolving deltas: 100% (748/748), done. tapaswee@tapaswee-Legion-Slim-5-16AHP9:~/clearpath_ws/src$ cd ~/clearpath_ws tapaswee@tapaswee-Legion-Slim-5-16AHP9:~/clearpath_ws$ wget https://raw.githubusercontent.com/clearpathrobotics/clearpath_simulator/humble/dependencies.repos --2026-03-10 23:49:59-- <text:soft-page-break/>https://raw.githubusercontent.com/clearpathrobotics/clearpath_simulator/humble/dependencies.repos Resolving raw.githubusercontent.com (raw.githubusercontent.com)... 185.199.111.133, 185.199.110.133, 185.199.108.133, ... Connecting to raw.githubusercontent.com (raw.githubusercontent.com)|185.199.111.133|:443... connected. HTTP request sent, awaiting response... 200 OK Length: 373 [text/plain] Saving to: ‘dependencies.repos’ dependencies.repos 100%[======================================================================================================================&gt;] 373 --.-KB/s in 0s 2026-03-10 23:50:00 (34.3 MB/s) - ‘dependencies.repos’ saved [373/373] tapaswee@tapaswee-Legion-Slim-5-16AHP9:~/clearpath_ws$ vcs import src &lt; dependencies.repos /usr/bin/vcs:6: DeprecationWarning: pkg_resources is deprecated as an API. See https://setuptools.pypa.io/en/latest/pkg_resources.html from pkg_resources import load_entry_point .</text:p>
      <text:section text:style-name="Sect1" text:name="thread">
        <text:p text:style-name="Text_20_body">Everything you ran <text:span text:style-name="Strong_20_Emphasis">worked correctly so far</text:span> 👍. Let me explain what happened and what you should do next.</text:p>
        <text:p text:style-name="Horizontal_20_Line"/>
        <text:h text:style-name="Heading_20_2" text:outline-level="2">1️⃣ The Gazebo key warning</text:h>
        <text:p text:style-name="Text_20_body">This message:</text:p>
        <text:section text:style-name="Sect2" text:name="code-block-viewer">
          <text:p text:style-name="Preformatted_20_Text">W: ... Key is stored in legacy trusted.gpg keyring (/etc/apt/trusted.gpg)</text:p>
        </text:section>
        <text:p text:style-name="Text_20_body">is <text:span text:style-name="Strong_20_Emphasis">just a warning</text:span>, not an error. Your repository was added successfully and <text:span text:style-name="Source_20_Text">apt update</text:span> worked.</text:p>
        <text:p text:style-name="Text_20_body">The reason is:</text:p>
        <text:list xml:id="list1164427898" text:style-name="L1">
          <text:list-item>
            <text:p text:style-name="P3"><text:span text:style-name="Source_20_Text">apt-key</text:span> is <text:span text:style-name="Strong_20_Emphasis">deprecated in Ubuntu 22.04 (jammy)</text:span>.</text:p>
          </text:list-item>
          <text:list-item>
            <text:p text:style-name="P3">Modern method uses <text:span text:style-name="Source_20_Text">/etc/apt/keyrings/</text:span>.</text:p>
          </text:list-item>
        </text:list>
        <text:p text:style-name="Text_20_body">But since the repo works, <text:span text:style-name="Strong_20_Emphasis">you can safely ignore this for now</text:span>.</text:p>
        <text:p text:style-name="Horizontal_20_Line"/>
        <text:h text:style-name="Heading_20_2" text:outline-level="2">2️⃣ Ignition Fortress installation</text:h>
        <text:p text:style-name="Text_20_body">This line confirms it is installed:</text:p>
        <text:section text:style-name="Sect2" text:name="Section1">
          <text:p text:style-name="Preformatted_20_Text"><text:bookmark text:name="code-block-viewer"/>ignition-fortress is already the newest version</text:p>
        </text:section>
        <text:p text:style-name="Text_20_body">So your Gazebo/Ignition simulator dependency is satisfied.</text:p>
        <text:p text:style-name="Horizontal_20_Line"/>
        <text:h text:style-name="Heading_20_2" text:outline-level="2">3️⃣ Workspace creation</text:h>
        <text:p text:style-name="Text_20_body">You correctly created the workspace:</text:p>
        <text:section text:style-name="Sect2" text:name="Section2">
          <text:p text:style-name="Preformatted_20_Text"><text:bookmark text:name="code-block-viewer1"/>~/clearpath_ws</text:p>
        </text:section>
        <text:p text:style-name="Text_20_body">Structure now:</text:p>
        <text:section text:style-name="Sect2" text:name="Section3">
          <text:p text:style-name="Preformatted_20_Text"><text:bookmark text:name="code-block-viewer2"/>clearpath_ws/</text:p>
          <text:p text:style-name="Preformatted_20_Text"><text:s/>└── src/</text:p>
          <text:p text:style-name="Preformatted_20_Text"><text:s text:c="5"/>└── clearpath_simulator</text:p>
        </text:section>
        <text:p text:style-name="Text_20_body">Perfect ROS2 workspace structure.</text:p>
        <text:p text:style-name="Horizontal_20_Line"><text:soft-page-break/></text:p>
        <text:h text:style-name="Heading_20_2" text:outline-level="2">4️⃣ Cloning the simulator</text:h>
        <text:p text:style-name="Text_20_body">You cloned:</text:p>
        <text:section text:style-name="Sect2" text:name="Section4">
          <text:p text:style-name="Preformatted_20_Text"><text:bookmark text:name="code-block-viewer3"/>clearpathrobotics/clearpath_simulator -b humble</text:p>
        </text:section>
        <text:p text:style-name="Text_20_body">Correct branch for <text:span text:style-name="Strong_20_Emphasis">ROS2 Humble</text:span>.</text:p>
        <text:p text:style-name="Horizontal_20_Line"/>
        <text:h text:style-name="Heading_20_2" text:outline-level="2">5️⃣ Importing dependencies</text:h>
        <text:p text:style-name="Text_20_body">This command:</text:p>
        <text:section text:style-name="Sect2" text:name="Section5">
          <text:p text:style-name="Preformatted_20_Text"><text:bookmark text:name="code-block-viewer4"/>vcs import src &lt; dependencies.repos</text:p>
        </text:section>
        <text:p text:style-name="Text_20_body">downloads additional repositories needed for the simulator.</text:p>
        <text:p text:style-name="Text_20_body">The message:</text:p>
        <text:section text:style-name="Sect2" text:name="Section6">
          <text:p text:style-name="Preformatted_20_Text"><text:bookmark text:name="code-block-viewer5"/>DeprecationWarning: pkg_resources is deprecated</text:p>
        </text:section>
        <text:p text:style-name="Text_20_body">is <text:span text:style-name="Strong_20_Emphasis">harmless</text:span> and does not affect installation.</text:p>
        <text:p text:style-name="Horizontal_20_Line"/>
        <text:h text:style-name="Heading_20_1" text:outline-level="1">✅ Next Steps (Important)</text:h>
        <text:p text:style-name="Text_20_body">Now you must <text:span text:style-name="Strong_20_Emphasis">install ROS dependencies and build the workspace</text:span>.</text:p>
        <text:h text:style-name="Heading_20_3" text:outline-level="3">Step 1 — Install dependencies</text:h>
        <text:p text:style-name="Text_20_body">Run:</text:p>
        <text:section text:style-name="Sect2" text:name="Section7">
          <text:p text:style-name="Preformatted_20_Text"><text:bookmark text:name="code-block-viewer6"/>cd ~/clearpath_ws</text:p>
          <text:p text:style-name="Preformatted_20_Text">rosdep update</text:p>
          <text:p text:style-name="Preformatted_20_Text">rosdep install --from-paths src --ignore-src -r -y</text:p>
        </text:section>
        <text:p text:style-name="Horizontal_20_Line"/>
        <text:h text:style-name="Heading_20_3" text:outline-level="3">Step 2 — Build the workspace</text:h>
        <text:section text:style-name="Sect2" text:name="Section8">
          <text:p text:style-name="Preformatted_20_Text"><text:bookmark text:name="code-block-viewer7"/>colcon build --symlink-install</text:p>
        </text:section>
        <text:p text:style-name="Text_20_body">This may take <text:span text:style-name="Strong_20_Emphasis">5–15 minutes</text:span>.</text:p>
        <text:p text:style-name="Horizontal_20_Line"/>
        <text:h text:style-name="Heading_20_3" text:outline-level="3">Step 3 — Source the workspace</text:h>
        <text:section text:style-name="Sect2" text:name="Section9">
          <text:p text:style-name="Preformatted_20_Text"><text:bookmark text:name="code-block-viewer8"/>source install/setup.bash</text:p>
        </text:section>
        <text:p text:style-name="Text_20_body">(Optional permanent solution)</text:p>
        <text:section text:style-name="Sect2" text:name="Section10">
          <text:p text:style-name="Preformatted_20_Text"><text:bookmark text:name="code-block-viewer9"/>echo "source ~/clearpath_ws/install/setup.bash" &gt;&gt; ~/.bashrc</text:p>
        </text:section>
        <text:p text:style-name="Horizontal_20_Line"/>
        <text:h text:style-name="Heading_20_1" text:outline-level="1">🚀 Then we launch the robot</text:h>
        <text:p text:style-name="Text_20_body">After building, you can launch the simulator:</text:p>
        <text:p text:style-name="Text_20_body"><text:soft-page-break/>Example (Husky robot):</text:p>
        <text:section text:style-name="Sect2" text:name="Section11">
          <text:p text:style-name="Preformatted_20_Text"><text:bookmark text:name="code-block-viewer10"/>ros2 launch clearpath_gz simulation.launch.py</text:p>
        </text:section>
        <text:p text:style-name="Horizontal_20_Line"/>
        <text:h text:style-name="Heading_20_1" text:outline-level="1">⚠️ Important (since your goal is a robot with arm)</text:h>
        <text:p text:style-name="Text_20_body">This simulator includes robots like:</text:p>
        <text:list xml:id="list3700144558" text:style-name="L2">
          <text:list-item>
            <text:p text:style-name="P4">Husky</text:p>
          </text:list-item>
          <text:list-item>
            <text:p text:style-name="P4">Jackal</text:p>
          </text:list-item>
          <text:list-item>
            <text:p text:style-name="P4">Warthog</text:p>
          </text:list-item>
          <text:list-item>
            <text:p text:style-name="P4">Ridgeback</text:p>
          </text:list-item>
        </text:list>
        <text:p text:style-name="Text_20_body">We can <text:span text:style-name="Strong_20_Emphasis">mount a robotic arm on top</text:span> (UR5 / Kinova / OpenManipulator).</text:p>
        <text:p text:style-name="Text_20_body">This will give you a <text:span text:style-name="Strong_20_Emphasis">much better robot than Turtlebot3</text:span> for your <text:span text:style-name="Strong_20_Emphasis">context-aware costmap project</text:span>.</text:p>
        <text:p text:style-name="Horizontal_20_Line"/>
        <text:p text:style-name="Text_20_body">✅ Since I know from earlier you are working on <text:span text:style-name="Strong_20_Emphasis">ROS2 + Gazebo navigation research</text:span>, I can also show you something <text:span text:style-name="Strong_20_Emphasis">very useful</text:span>:</text:p>
        <text:p text:style-name="Text_20_body"><text:span text:style-name="Strong_20_Emphasis">How to get a mobile robot + manipulator working in Gazebo with Nav2</text:span> (best setup for your project).</text:p>
        <text:p text:style-name="Text_20_body">If you want, I can show you the <text:span text:style-name="Strong_20_Emphasis">cleanest setup used in research labs</text:span> (takes ~15 minutes to install).</text:p>
        <text:p text:style-name="Text_20_body">yes</text:p>
        <text:p text:style-name="Text_20_body">Great 👍 Since your project is <text:span text:style-name="Strong_20_Emphasis">context-aware costmap optimization for path planning in ROS2</text:span>, the best setup used in many robotics labs is:</text:p>
        <text:p text:style-name="Text_20_body"><text:span text:style-name="Strong_20_Emphasis">Mobile base + robotic arm + Nav2 + Gazebo</text:span></text:p>
        <text:p text:style-name="Text_20_body">A very stable stack is:</text:p>
        <text:p text:style-name="Text_20_body"><text:span text:style-name="Strong_20_Emphasis">Clearpath Husky + UR5 arm</text:span></text:p>
        <text:p text:style-name="Text_20_body">Reasons:</text:p>
        <text:list xml:id="list2087644079" text:style-name="L3">
          <text:list-item>
            <text:p text:style-name="P5">Husky works <text:span text:style-name="Strong_20_Emphasis">very well with Nav2</text:span></text:p>
          </text:list-item>
          <text:list-item>
            <text:p text:style-name="P5">UR5 has <text:span text:style-name="Strong_20_Emphasis">excellent ROS2 support</text:span></text:p>
          </text:list-item>
          <text:list-item>
            <text:p text:style-name="P5">Works smoothly in <text:span text:style-name="Strong_20_Emphasis">Gazebo / Ignition</text:span></text:p>
          </text:list-item>
          <text:list-item>
            <text:p text:style-name="P5">Common in <text:span text:style-name="Strong_20_Emphasis">research papers</text:span></text:p>
          </text:list-item>
        </text:list>
        <text:p text:style-name="Text_20_body">I'll show you the <text:span text:style-name="Strong_20_Emphasis">cleanest pipeline</text:span>.</text:p>
        <text:p text:style-name="Horizontal_20_Line"/>
        <text:h text:style-name="Heading_20_1" text:outline-level="1"><text:soft-page-break/>1️⃣ Install the UR5 ROS2 packages</text:h>
        <text:p text:style-name="Text_20_body">Inside your workspace:</text:p>
        <text:section text:style-name="Sect2" text:name="Section12">
          <text:p text:style-name="Preformatted_20_Text"><text:bookmark text:name="code-block-viewer11"/>cd ~/clearpath_ws/src</text:p>
        </text:section>
        <text:p text:style-name="Text_20_body">Clone the Universal Robots ROS2 stack:</text:p>
        <text:section text:style-name="Sect2" text:name="Section13">
          <text:p text:style-name="Preformatted_20_Text"><text:bookmark text:name="code-block-viewer12"/>git clone -b humble https://github.com/UniversalRobots/Universal_Robots_ROS2_Description.git</text:p>
          <text:p text:style-name="Preformatted_20_Text">git clone -b humble https://github.com/UniversalRobots/Universal_Robots_ROS2_Gazebo_Simulation.git</text:p>
        </text:section>
        <text:p text:style-name="Horizontal_20_Line"/>
        <text:h text:style-name="Heading_20_1" text:outline-level="1">2️⃣ Install missing dependencies</text:h>
        <text:p text:style-name="Text_20_body">Run:</text:p>
        <text:section text:style-name="Sect2" text:name="Section14">
          <text:p text:style-name="Preformatted_20_Text"><text:bookmark text:name="code-block-viewer13"/>cd ~/clearpath_ws</text:p>
          <text:p text:style-name="Preformatted_20_Text">rosdep install --from-paths src --ignore-src -r -y</text:p>
        </text:section>
        <text:p text:style-name="Horizontal_20_Line"/>
        <text:h text:style-name="Heading_20_1" text:outline-level="1">3️⃣ Build the workspace</text:h>
        <text:section text:style-name="Sect2" text:name="Section15">
          <text:p text:style-name="Preformatted_20_Text"><text:bookmark text:name="code-block-viewer14"/>colcon build --symlink-install</text:p>
        </text:section>
        <text:p text:style-name="Text_20_body">Then source it:</text:p>
        <text:section text:style-name="Sect2" text:name="Section16">
          <text:p text:style-name="Preformatted_20_Text"><text:bookmark text:name="code-block-viewer15"/>source install/setup.bash</text:p>
        </text:section>
        <text:p text:style-name="Horizontal_20_Line"/>
        <text:h text:style-name="Heading_20_1" text:outline-level="1">4️⃣ Test Husky in simulation</text:h>
        <text:p text:style-name="Text_20_body">Before adding the arm, test the robot base.</text:p>
        <text:section text:style-name="Sect2" text:name="Section17">
          <text:p text:style-name="Preformatted_20_Text"><text:bookmark text:name="code-block-viewer16"/>ros2 launch clearpath_gz simulation.launch.py</text:p>
        </text:section>
        <text:p text:style-name="Text_20_body">You should see:</text:p>
        <text:list xml:id="list1042454064" text:style-name="L4">
          <text:list-item>
            <text:p text:style-name="P6">Husky robot</text:p>
          </text:list-item>
          <text:list-item>
            <text:p text:style-name="P6">Gazebo world</text:p>
          </text:list-item>
          <text:list-item>
            <text:p text:style-name="P6">Sensors</text:p>
          </text:list-item>
        </text:list>
        <text:p text:style-name="Horizontal_20_Line"/>
        <text:h text:style-name="Heading_20_1" text:outline-level="1">5️⃣ Add the robotic arm</text:h>
        <text:p text:style-name="Text_20_body">Instead of modifying URDF manually, the <text:span text:style-name="Strong_20_Emphasis">recommended approach</text:span> is:</text:p>
        <text:p text:style-name="Text_20_body">Use <text:span text:style-name="Strong_20_Emphasis">xacro composition</text:span></text:p>
        <text:p text:style-name="Text_20_body">Example architecture:</text:p>
        <text:section text:style-name="Sect2" text:name="Section18">
          <text:p text:style-name="Preformatted_20_Text"><text:bookmark text:name="code-block-viewer17"/>husky</text:p>
          <text:p text:style-name="Preformatted_20_Text"><text:s text:c="3"/>|</text:p>
          <text:p text:style-name="Preformatted_20_Text"><text:s text:c="3"/>|--- ur5 arm</text:p>
        </text:section>
        <text:p text:style-name="Text_20_body"><text:soft-page-break/>This means we create a <text:span text:style-name="Strong_20_Emphasis">combined robot description</text:span>.</text:p>
        <text:p text:style-name="Text_20_body">Example structure:</text:p>
        <text:section text:style-name="Sect2" text:name="Section19">
          <text:p text:style-name="Preformatted_20_Text"><text:bookmark text:name="code-block-viewer18"/>robot.urdf.xacro</text:p>
          <text:p text:style-name="Preformatted_20_Text"><text:s text:c="3"/>├── husky.urdf.xacro</text:p>
          <text:p text:style-name="Preformatted_20_Text"><text:s text:c="3"/>└── ur5.urdf.xacro</text:p>
        </text:section>
        <text:p text:style-name="Horizontal_20_Line"/>
        <text:h text:style-name="Heading_20_1" text:outline-level="1">6️⃣ Launch Nav2</text:h>
        <text:p text:style-name="Text_20_body">After the robot spawns, start navigation:</text:p>
        <text:section text:style-name="Sect2" text:name="Section20">
          <text:p text:style-name="Preformatted_20_Text"><text:bookmark text:name="code-block-viewer19"/>ros2 launch nav2_bringup navigation_launch.py use_sim_time:=True</text:p>
        </text:section>
        <text:p text:style-name="Horizontal_20_Line"/>
        <text:h text:style-name="Heading_20_1" text:outline-level="1">7️⃣ Why this setup is powerful for your project</text:h>
        <text:p text:style-name="Text_20_body">You can now add <text:span text:style-name="Strong_20_Emphasis">context-aware costmap layers</text:span> using:</text:p>
        <text:list xml:id="list3680089087" text:style-name="L5">
          <text:list-item>
            <text:p text:style-name="P7">arm reachability</text:p>
          </text:list-item>
          <text:list-item>
            <text:p text:style-name="P7">obstacle proximity</text:p>
          </text:list-item>
          <text:list-item>
            <text:p text:style-name="P7">task context</text:p>
          </text:list-item>
          <text:list-item>
            <text:p text:style-name="P7">semantic zones</text:p>
          </text:list-item>
        </text:list>
        <text:p text:style-name="Text_20_body">Example costmap layer ideas:</text:p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Table_20_Heading">Context</text:p>
              </table:table-cell>
              <table:table-cell table:style-name="Table1.A1" office:value-type="string">
                <text:p text:style-name="Table_20_Heading">Costmap effect</text:p>
              </table:table-cell>
            </table:table-row>
          </table:table-header-rows>
          <table:table-row>
            <table:table-cell table:style-name="Table1.A1" office:value-type="string">
              <text:p text:style-name="Table_20_Contents">fragile objects nearby</text:p>
            </table:table-cell>
            <table:table-cell table:style-name="Table1.A1" office:value-type="string">
              <text:p text:style-name="Table_20_Contents">increase cost</text:p>
            </table:table-cell>
          </table:table-row>
          <table:table-row>
            <table:table-cell table:style-name="Table1.A1" office:value-type="string">
              <text:p text:style-name="Table_20_Contents">reachable objects</text:p>
            </table:table-cell>
            <table:table-cell table:style-name="Table1.A1" office:value-type="string">
              <text:p text:style-name="Table_20_Contents">lower cost</text:p>
            </table:table-cell>
          </table:table-row>
          <table:table-row>
            <table:table-cell table:style-name="Table1.A1" office:value-type="string">
              <text:p text:style-name="Table_20_Contents">human detected</text:p>
            </table:table-cell>
            <table:table-cell table:style-name="Table1.A1" office:value-type="string">
              <text:p text:style-name="Table_20_Contents">high cost</text:p>
            </table:table-cell>
          </table:table-row>
          <table:table-row>
            <table:table-cell table:style-name="Table1.A1" office:value-type="string">
              <text:p text:style-name="Table_20_Contents">manipulation zone</text:p>
            </table:table-cell>
            <table:table-cell table:style-name="Table1.A1" office:value-type="string">
              <text:p text:style-name="Table_20_Contents">preferred area</text:p>
            </table:table-cell>
          </table:table-row>
        </table:table>
        <text:p text:style-name="Horizontal_20_Line"/>
        <text:h text:style-name="Heading_20_1" text:outline-level="1">8️⃣ Your final system architecture</text:h>
        <text:section text:style-name="Sect2" text:name="Section21">
          <text:p text:style-name="Preformatted_20_Text"><text:bookmark text:name="code-block-viewer20"/>Gazebo / Ignition</text:p>
          <text:p text:style-name="Preformatted_20_Text"><text:s text:c="6"/>│</text:p>
          <text:p text:style-name="Preformatted_20_Text"><text:s text:c="6"/>│</text:p>
          <text:p text:style-name="Preformatted_20_Text"><text:s text:c="2"/>Husky + UR5</text:p>
          <text:p text:style-name="Preformatted_20_Text"><text:s text:c="6"/>│</text:p>
          <text:p text:style-name="Preformatted_20_Text"><text:s text:c="6"/>│</text:p>
          <text:p text:style-name="Preformatted_20_Text"><text:s text:c="2"/>ROS2 Control</text:p>
          <text:p text:style-name="Preformatted_20_Text"><text:s text:c="6"/>│</text:p>
          <text:p text:style-name="Preformatted_20_Text"><text:s text:c="6"/>│</text:p>
          <text:p text:style-name="Preformatted_20_Text"><text:s/>Nav2 Stack</text:p>
          <text:p text:style-name="Preformatted_20_Text"><text:s text:c="6"/>│</text:p>
          <text:p text:style-name="Preformatted_20_Text"><text:s text:c="6"/>│</text:p>
          <text:p text:style-name="Preformatted_20_Text"><text:s/>Context-Aware Costmap</text:p>
          <text:p text:style-name="Preformatted_20_Text"><text:s text:c="6"/>│</text:p>
          <text:p text:style-name="Preformatted_20_Text"><text:s text:c="6"/>│</text:p>
          <text:p text:style-name="Preformatted_20_Text"><text:s/>Path Planner</text:p>
        </text:section>
        <text:p text:style-name="Text_20_body"><text:soft-page-break/>This is <text:span text:style-name="Strong_20_Emphasis">very publishable research architecture</text:span>.</text:p>
        <text:p text:style-name="Horizontal_20_Line"/>
        <text:h text:style-name="Heading_20_1" text:outline-level="1">🔥 Very important suggestion</text:h>
        <text:p text:style-name="Text_20_body">Instead of building everything manually, there is a <text:span text:style-name="Strong_20_Emphasis">much better robot for your case</text:span>:</text:p>
        <text:h text:style-name="Heading_20_3" text:outline-level="3">Stretch RE1</text:h>
        <text:p text:style-name="Text_20_body">or</text:p>
        <text:h text:style-name="Heading_20_3" text:outline-level="3">Ridgeback + UR5</text:h>
        <text:p text:style-name="Text_20_body">These are <text:span text:style-name="Strong_20_Emphasis">mobile manipulation robots</text:span> already designed for:</text:p>
        <text:list xml:id="list4201523786" text:style-name="L6">
          <text:list-item>
            <text:p text:style-name="P8">navigation</text:p>
          </text:list-item>
          <text:list-item>
            <text:p text:style-name="P8">manipulation</text:p>
          </text:list-item>
          <text:list-item>
            <text:p text:style-name="P8">perception</text:p>
          </text:list-item>
        </text:list>
        <text:p text:style-name="Horizontal_20_Line"/>
        <text:h text:style-name="Heading_20_1" text:outline-level="1">🚀 If you want, I can show you something much better</text:h>
        <text:p text:style-name="Text_20_body">I can show you how to run a <text:span text:style-name="Strong_20_Emphasis">mobile manipulation robot in Gazebo in 5 minutes</text:span>:</text:p>
        <text:p text:style-name="Text_20_body"><text:span text:style-name="Strong_20_Emphasis">Tiago Robot (PAL Robotics)</text:span></text:p>
        <text:p text:style-name="Text_20_body">It has:</text:p>
        <text:list xml:id="list3311681340" text:style-name="L7">
          <text:list-item>
            <text:p text:style-name="P9">mobile base</text:p>
          </text:list-item>
          <text:list-item>
            <text:p text:style-name="P9">7 DOF arm</text:p>
          </text:list-item>
          <text:list-item>
            <text:p text:style-name="P9">gripper</text:p>
          </text:list-item>
          <text:list-item>
            <text:p text:style-name="P9">camera</text:p>
          </text:list-item>
          <text:list-item>
            <text:p text:style-name="P9">lidar</text:p>
          </text:list-item>
          <text:list-item>
            <text:p text:style-name="P9">Nav2 support</text:p>
          </text:list-item>
        </text:list>
        <text:p text:style-name="Text_20_body">Perfect for your <text:span text:style-name="Strong_20_Emphasis">context-aware costmap project</text:span>.</text:p>
        <text:p text:style-name="Text_20_body">If you want, I’ll show:</text:p>
        <text:p text:style-name="Text_20_body"><text:span text:style-name="Strong_20_Emphasis">Step-by-step installation (much easier than Husky + UR5).</text:span></text:p>
        <text:p text:style-name="Text_20_body">yes</text:p>
        <text:p text:style-name="Text_20_body">Since you’re already comfortable with <text:span text:style-name="Strong_20_Emphasis">ROS2, Gazebo, and Nav2</text:span> from your earlier work, the <text:span text:style-name="Strong_20_Emphasis">TIAGo robot</text:span> is actually one of the best research robots to simulate. It already includes:</text:p>
        <text:list xml:id="list3332089594" text:style-name="L8">
          <text:list-item>
            <text:p text:style-name="P10"><text:soft-page-break/>Mobile base</text:p>
          </text:list-item>
          <text:list-item>
            <text:p text:style-name="P10">7-DOF arm</text:p>
          </text:list-item>
          <text:list-item>
            <text:p text:style-name="P10">Gripper</text:p>
          </text:list-item>
          <text:list-item>
            <text:p text:style-name="P10">RGB-D camera</text:p>
          </text:list-item>
          <text:list-item>
            <text:p text:style-name="P10">Lidar</text:p>
          </text:list-item>
          <text:list-item>
            <text:p text:style-name="P10">Full navigation stack support</text:p>
          </text:list-item>
        </text:list>
        <text:p text:style-name="Text_20_body">So you don’t need to manually attach a robotic arm like we tried with Turtlebot.</text:p>
        <text:p text:style-name="Text_20_body">Below is the <text:span text:style-name="Strong_20_Emphasis">cleanest way to run TIAGo in ROS2 Humble + Gazebo</text:span>.</text:p>
        <text:p text:style-name="Horizontal_20_Line"/>
        <text:h text:style-name="Heading_20_1" text:outline-level="1">1️⃣ Create a new workspace (recommended)</text:h>
        <text:p text:style-name="Text_20_body">Keep it separate from <text:span text:style-name="Source_20_Text">clearpath_ws</text:span>.</text:p>
        <text:section text:style-name="Sect2" text:name="Section22">
          <text:p text:style-name="Preformatted_20_Text"><text:bookmark text:name="code-block-viewer21"/>mkdir -p ~/tiago_ws/src</text:p>
          <text:p text:style-name="Preformatted_20_Text">cd ~/tiago_ws/src</text:p>
        </text:section>
        <text:p text:style-name="Horizontal_20_Line"/>
        <text:h text:style-name="Heading_20_1" text:outline-level="1">2️⃣ Clone the TIAGo simulation packages</text:h>
        <text:section text:style-name="Sect2" text:name="Section23">
          <text:p text:style-name="Preformatted_20_Text"><text:bookmark text:name="code-block-viewer22"/>git clone -b humble https://github.com/pal-robotics/tiago_simulation.git</text:p>
          <text:p text:style-name="Preformatted_20_Text">git clone -b humble https://github.com/pal-robotics/tiago_robot.git</text:p>
          <text:p text:style-name="Preformatted_20_Text">git clone -b humble https://github.com/pal-robotics/tiago_description.git</text:p>
        </text:section>
        <text:p text:style-name="Horizontal_20_Line"/>
        <text:h text:style-name="Heading_20_1" text:outline-level="1">3️⃣ Install dependencies</text:h>
        <text:p text:style-name="Text_20_body">Go to workspace root:</text:p>
        <text:section text:style-name="Sect2" text:name="Section24">
          <text:p text:style-name="Preformatted_20_Text"><text:bookmark text:name="code-block-viewer23"/>cd ~/tiago_ws</text:p>
        </text:section>
        <text:p text:style-name="Text_20_body">Then install dependencies:</text:p>
        <text:section text:style-name="Sect2" text:name="Section25">
          <text:p text:style-name="Preformatted_20_Text"><text:bookmark text:name="code-block-viewer24"/>rosdep update</text:p>
          <text:p text:style-name="Preformatted_20_Text">rosdep install --from-paths src --ignore-src -r -y</text:p>
        </text:section>
        <text:p text:style-name="Horizontal_20_Line"/>
        <text:h text:style-name="Heading_20_1" text:outline-level="1">4️⃣ Build the workspace</text:h>
        <text:section text:style-name="Sect2" text:name="Section26">
          <text:p text:style-name="Preformatted_20_Text"><text:bookmark text:name="code-block-viewer25"/>colcon build --symlink-install</text:p>
        </text:section>
        <text:p text:style-name="Text_20_body">Then source it:</text:p>
        <text:section text:style-name="Sect2" text:name="Section27">
          <text:p text:style-name="Preformatted_20_Text"><text:bookmark text:name="code-block-viewer26"/>source install/setup.bash</text:p>
        </text:section>
        <text:p text:style-name="Text_20_body">(Optional permanent setup)</text:p>
        <text:section text:style-name="Sect2" text:name="Section28">
          <text:p text:style-name="Preformatted_20_Text"><text:bookmark text:name="code-block-viewer27"/>echo "source ~/tiago_ws/install/setup.bash" &gt;&gt; ~/.bashrc</text:p>
        </text:section>
        <text:p text:style-name="Horizontal_20_Line"/>
        <text:h text:style-name="Heading_20_1" text:outline-level="1"><text:soft-page-break/>5️⃣ Launch the TIAGo robot in Gazebo</text:h>
        <text:section text:style-name="Sect2" text:name="Section29">
          <text:p text:style-name="Preformatted_20_Text"><text:bookmark text:name="code-block-viewer28"/>ros2 launch tiago_gazebo tiago_gazebo.launch.py</text:p>
        </text:section>
        <text:p text:style-name="Text_20_body">Gazebo will start with:</text:p>
        <text:list xml:id="list2565907238" text:style-name="L9">
          <text:list-item>
            <text:p text:style-name="P11">TIAGo robot</text:p>
          </text:list-item>
          <text:list-item>
            <text:p text:style-name="P11">Sensors</text:p>
          </text:list-item>
          <text:list-item>
            <text:p text:style-name="P11">Arm</text:p>
          </text:list-item>
          <text:list-item>
            <text:p text:style-name="P11">Environment</text:p>
          </text:list-item>
        </text:list>
        <text:p text:style-name="Horizontal_20_Line"/>
        <text:h text:style-name="Heading_20_1" text:outline-level="1">6️⃣ Teleoperate the robot</text:h>
        <text:p text:style-name="Text_20_body">Open another terminal:</text:p>
        <text:section text:style-name="Sect2" text:name="Section30">
          <text:p text:style-name="Preformatted_20_Text"><text:bookmark text:name="code-block-viewer29"/>source ~/tiago_ws/install/setup.bash</text:p>
          <text:p text:style-name="Preformatted_20_Text">ros2 run teleop_twist_keyboard teleop_twist_keyboard</text:p>
        </text:section>
        <text:p text:style-name="Text_20_body">Now you can <text:span text:style-name="Strong_20_Emphasis">drive the robot around Gazebo</text:span>.</text:p>
        <text:p text:style-name="Horizontal_20_Line"/>
        <text:h text:style-name="Heading_20_1" text:outline-level="1">7️⃣ Move the robotic arm</text:h>
        <text:p text:style-name="Text_20_body">TIAGo arm is controlled via <text:span text:style-name="Strong_20_Emphasis">MoveIt2</text:span>.</text:p>
        <text:p text:style-name="Text_20_body">Launch MoveIt:</text:p>
        <text:section text:style-name="Sect2" text:name="Section31">
          <text:p text:style-name="Preformatted_20_Text"><text:bookmark text:name="code-block-viewer30"/>ros2 launch tiago_moveit_config moveit_rviz.launch.py</text:p>
        </text:section>
        <text:p text:style-name="Text_20_body">You will see the <text:span text:style-name="Strong_20_Emphasis">arm planning interface in RViz</text:span>.</text:p>
        <text:p text:style-name="Horizontal_20_Line"/>
        <text:h text:style-name="Heading_20_1" text:outline-level="1">8️⃣ Add Navigation (Nav2)</text:h>
        <text:p text:style-name="Text_20_body">Launch navigation:</text:p>
        <text:section text:style-name="Sect2" text:name="Section32">
          <text:p text:style-name="Preformatted_20_Text"><text:bookmark text:name="code-block-viewer31"/>ros2 launch nav2_bringup navigation_launch.py use_sim_time:=True</text:p>
        </text:section>
        <text:p text:style-name="Text_20_body">Then open RViz:</text:p>
        <text:section text:style-name="Sect2" text:name="Section33">
          <text:p text:style-name="Preformatted_20_Text"><text:bookmark text:name="code-block-viewer32"/>rviz2</text:p>
        </text:section>
        <text:p text:style-name="Text_20_body">Now you can:</text:p>
        <text:list xml:id="list2364265292" text:style-name="L10">
          <text:list-item>
            <text:p text:style-name="P12">Set <text:span text:style-name="Strong_20_Emphasis">initial pose</text:span></text:p>
          </text:list-item>
          <text:list-item>
            <text:p text:style-name="P12">Set <text:span text:style-name="Strong_20_Emphasis">goal pose</text:span></text:p>
          </text:list-item>
          <text:list-item>
            <text:p text:style-name="P12">Watch path planning</text:p>
          </text:list-item>
        </text:list>
        <text:p text:style-name="Horizontal_20_Line"/>
        <text:h text:style-name="Heading_20_1" text:outline-level="1"><text:soft-page-break/>9️⃣ Why TIAGo is perfect for your project</text:h>
        <text:p text:style-name="Text_20_body">Your project:<text:line-break/><text:span text:style-name="Strong_20_Emphasis">Context-Aware Costmap Optimization for Path Planning</text:span></text:p>
        <text:p text:style-name="Text_20_body">TIAGo allows context like:</text:p>
        <table:table table:name="Table2" table:style-name="Table2">
          <table:table-column table:style-name="Table2.A"/>
          <table:table-column table:style-name="Table2.B"/>
          <table:table-header-rows>
            <table:table-row>
              <table:table-cell table:style-name="Table2.A1" office:value-type="string">
                <text:p text:style-name="Table_20_Heading">Context Source</text:p>
              </table:table-cell>
              <table:table-cell table:style-name="Table2.A1" office:value-type="string">
                <text:p text:style-name="Table_20_Heading">Use in Costmap</text:p>
              </table:table-cell>
            </table:table-row>
          </table:table-header-rows>
          <table:table-row>
            <table:table-cell table:style-name="Table2.A1" office:value-type="string">
              <text:p text:style-name="Table_20_Contents">arm reachability</text:p>
            </table:table-cell>
            <table:table-cell table:style-name="Table2.A1" office:value-type="string">
              <text:p text:style-name="Table_20_Contents">reduce cost</text:p>
            </table:table-cell>
          </table:table-row>
          <table:table-row>
            <table:table-cell table:style-name="Table2.A1" office:value-type="string">
              <text:p text:style-name="Table_20_Contents">humans detected</text:p>
            </table:table-cell>
            <table:table-cell table:style-name="Table2.A1" office:value-type="string">
              <text:p text:style-name="Table_20_Contents">increase cost</text:p>
            </table:table-cell>
          </table:table-row>
          <table:table-row>
            <table:table-cell table:style-name="Table2.A1" office:value-type="string">
              <text:p text:style-name="Table_20_Contents">manipulation zones</text:p>
            </table:table-cell>
            <table:table-cell table:style-name="Table2.A1" office:value-type="string">
              <text:p text:style-name="Table_20_Contents">special cost layer</text:p>
            </table:table-cell>
          </table:table-row>
          <table:table-row>
            <table:table-cell table:style-name="Table2.A1" office:value-type="string">
              <text:p text:style-name="Table_20_Contents">fragile objects</text:p>
            </table:table-cell>
            <table:table-cell table:style-name="Table2.A1" office:value-type="string">
              <text:p text:style-name="Table_20_Contents">avoid area</text:p>
            </table:table-cell>
          </table:table-row>
          <table:table-row>
            <table:table-cell table:style-name="Table2.A1" office:value-type="string">
              <text:p text:style-name="Table_20_Contents">camera perception</text:p>
            </table:table-cell>
            <table:table-cell table:style-name="Table2.A1" office:value-type="string">
              <text:p text:style-name="Table_20_Contents">semantic mapping</text:p>
            </table:table-cell>
          </table:table-row>
        </table:table>
        <text:p text:style-name="Text_20_body">This is exactly how <text:span text:style-name="Strong_20_Emphasis">mobile manipulation research papers</text:span> are structured.</text:p>
        <text:p text:style-name="Horizontal_20_Line"/>
        <text:h text:style-name="Heading_20_1" text:outline-level="1">🔥 Important tip (this will save you weeks)</text:h>
        <text:p text:style-name="Text_20_body">Most ROS2 research projects use this pipeline:</text:p>
        <text:section text:style-name="Sect2" text:name="Section34">
          <text:p text:style-name="Preformatted_20_Text"><text:bookmark text:name="code-block-viewer33"/>Gazebo</text:p>
          <text:p text:style-name="Preformatted_20_Text"><text:s text:c="3"/>↓</text:p>
          <text:p text:style-name="Preformatted_20_Text">Robot model (URDF/Xacro)</text:p>
          <text:p text:style-name="Preformatted_20_Text"><text:s text:c="3"/>↓</text:p>
          <text:p text:style-name="Preformatted_20_Text">Sensors (camera, lidar)</text:p>
          <text:p text:style-name="Preformatted_20_Text"><text:s text:c="3"/>↓</text:p>
          <text:p text:style-name="Preformatted_20_Text">Perception</text:p>
          <text:p text:style-name="Preformatted_20_Text"><text:s text:c="3"/>↓</text:p>
          <text:p text:style-name="Preformatted_20_Text">Semantic Layer</text:p>
          <text:p text:style-name="Preformatted_20_Text"><text:s text:c="3"/>↓</text:p>
          <text:p text:style-name="Preformatted_20_Text">Nav2 Costmap Plugins</text:p>
          <text:p text:style-name="Preformatted_20_Text"><text:s text:c="3"/>↓</text:p>
          <text:p text:style-name="Preformatted_20_Text">Path Planning</text:p>
        </text:section>
        <text:p text:style-name="Text_20_body">Your <text:span text:style-name="Strong_20_Emphasis">context-aware costmap</text:span> would be implemented as a <text:span text:style-name="Strong_20_Emphasis">Nav2 costmap plugin</text:span>.</text:p>
        <text:p text:style-name="Horizontal_20_Line"/>
        <text:p text:style-name="Text_20_body">✅ If you'd like, I can also show you <text:span text:style-name="Strong_20_Emphasis">something extremely useful for your project</text:span>:</text:p>
        <text:p text:style-name="Text_20_body"><text:span text:style-name="Strong_20_Emphasis">How to implement a custom Nav2 costmap layer (context-aware costmap)</text:span></text:p>
        <text:p text:style-name="Text_20_body">This is the <text:span text:style-name="Strong_20_Emphasis">exact step needed for your research paper</text:span> and most students struggle with it.</text:p>
        <text:p text:style-name="P2"><text:soft-page-break/><draw:frame draw:style-name="fr1" draw:name="Image1" text:anchor-type="as-char" svg:width="34.65cm" svg:height="15.473cm" draw:z-index="0"><draw:image xlink:href="https://chatgpt.com/backend-api/estuary/content?id=file_000000009f80720899e2dd785da7eb58&amp;ts=492547&amp;p=fs&amp;cid=1&amp;sig=15e8dd37c4d1f7ca64eef5be1faa80dafe0e0575fb52432728e560c22695e315&amp;v=0" xlink:type="simple" xlink:show="embed" xlink:actuate="onLoad"/><svg:title>Uploaded image</svg:title></draw:frame></text:p>
        <text:p text:style-name="Text_20_body">Now this is spawned. Teleop doesnt work. tapaswee@tapaswee-Legion-Slim-5-16AHP9:~/clearpath_ws$ ros2 launch clearpath_gz simulation.launch.py setup_path:=$HOME/clearpath world:=empty use_sim_time:=true [INFO] [launch]: All log files can be found below /home/tapaswee/.ros/log/2026-03-11-00-48-52-274437-tapaswee-Legion-Slim-5-16AHP9-67141 [INFO] [launch]: Default logging verbosity is set to INFO [INFO] [ign gazebo-1]: process started with pid [67142] [INFO] [parameter_bridge-2]: process started with pid [67145] [INFO] [generate_description-3]: process started with pid [67147] [parameter_bridge-2] [INFO] [1773170332.587097695] [clock_bridge]: Creating GZ-&gt;ROS Bridge: [/clock (ignition.msgs.Clock) -&gt; /clock (rosgraph_msgs/msg/Clock)] (Lazy 0) [generate_description-3] Generated /home/tapaswee/clearpathrobot.urdf.xacro [INFO] [generate_description-3]: process has finished cleanly [pid 67147] [INFO] [generate_semantic_description-4]: process started with pid [67165] [ign gazebo-1] [Dbg] [gz.cc:161] Subscribing to [/gazebo/starting_world]. [ign gazebo-1] [Dbg] [gz.cc:163] Waiting for a world to be set from the GUI... [ign gazebo-1] [Msg] Received world [empty.sdf] from the GUI. [ign gazebo-1] [Dbg] [gz.cc:167] Unsubscribing from [/gazebo/starting_world]. [ign gazebo-1] [Msg] Ignition Gazebo Server v6.17.1 [ign gazebo-1] [Msg] Loading SDF world file[/usr/share/ignition/ignition-gazebo6/worlds/empty.sdf]. [ign gazebo-1] [Msg] Serving entity system service on [/entity/system/add] [ign gazebo-1] [Dbg] [Physics.cc:804] Loaded <text:soft-page-break/>[ignition::physics::dartsim::Plugin] from library [/usr/lib/x86_64-linux-gnu/ign-physics-5/engine-plugins/libignition-physics-dartsim-plugin.so] [ign gazebo-1] [Dbg] [SystemManager.cc:73] Loaded system [gz::sim::systems::Physics] for entity [1] [ign gazebo-1] [Msg] Create service on [/world/empty/create] [ign gazebo-1] [Msg] Remove service on [/world/empty/remove] [ign gazebo-1] [Msg] Pose service on [/world/empty/set_pose] [ign gazebo-1] [Msg] Pose service on [/world/empty/set_pose_vector] [ign gazebo-1] [Msg] Light configuration service on [/world/empty/light_config] [ign gazebo-1] [Msg] Physics service on [/world/empty/set_physics] [ign gazebo-1] [Msg] SphericalCoordinates service on [/world/empty/set_spherical_coordinates] [ign gazebo-1] [Msg] Enable collision service on [/world/empty/enable_collision] [ign gazebo-1] [Msg] Disable collision service on [/world/empty/disable_collision] [ign gazebo-1] [Msg] Material service on [/world/empty/visual_config] [ign gazebo-1] [Msg] Material service on [/world/empty/wheel_slip] [ign gazebo-1] [Dbg] [SystemManager.cc:73] Loaded system [gz::sim::systems::UserCommands] for entity [1] [ign gazebo-1] [Dbg] [SystemManager.cc:73] Loaded system [gz::sim::systems::SceneBroadcaster] for entity [1] [ign gazebo-1] [Dbg] [SystemManager.cc:73] Loaded system [gz::sim::systems::Contact] for entity [1] [ign gazebo-1] [Msg] Loaded level [3] [ign gazebo-1] [Msg] Serving world controls on [/world/empty/control], [/world/empty/control/state] and [/world/empty/playback/control] [ign gazebo-1] [Msg] Serving GUI information on [/world/empty/gui/info] [ign gazebo-1] [Msg] World [empty] initialized with [1ms] physics profile. [ign gazebo-1] [Msg] Serving world SDF generation service on [/world/empty/generate_world_sdf] [ign gazebo-1] [Msg] Serving world names on [/gazebo/worlds] [ign gazebo-1] [Msg] Resource path add service on [/gazebo/resource_paths/add]. [ign gazebo-1] [Msg] Resource path get service on [/gazebo/resource_paths/get]. [generate_semantic_description-4] [INFO] [1773170332.990577888] [moveit_collision_updater.urdf]: Loaded a200-0000 robot model. [ign gazebo-1] [GUI] [Wrn] [Application.cc:802] [QT] file::/Gazebo/GazeboDrawer.qml:242:3: QML Connections: Implicitly defined onFoo properties in Connections are deprecated. Use this syntax instead: function onFoo(&lt;arguments&gt;) { ... } [generate_semantic_description-4] [INFO] [1773170333.150191594] [moveit_robot_model.robot_model]: Loading robot model 'a200-0000'... [generate_semantic_description-4] [INFO] [1773170333.150217684] [moveit_robot_model.robot_model]: No root/virtual joint specified in SRDF. Assuming fixed joint [generate_semantic_description-4] [WARN] [1773170333.150861443] [moveit_robot_model.robot_model]: Link front_bumper_link has visual geometry but no collision geometry. Collision geometry will be left empty. Fix your URDF file by explicitly specifying collision geometry. [generate_semantic_description-4] [WARN] [1773170333.150881592] [moveit_robot_model.robot_model]: Link rear_bumper_link has visual geometry but no collision geometry. Collision geometry will be left empty. Fix your URDF file by explicitly specifying collision geometry. [generate_semantic_description-4] [WARN] [1773170333.150902993] [moveit_robot_model.robot_model]: Link top_chassis_link has visual geometry but no collision geometry. Collision geometry will be left empty. Fix your URDF file by explicitly specifying collision geometry. [generate_semantic_description-4] [INFO] [1773170333.150961043] [moveit_collision_updater.srdf]: Robot semantic model successfully loaded. [generate_semantic_description-4] [INFO] [1773170333.158061371] [moveit_collision_updater.Self-Collisions]: Thread complete 28 [generate_semantic_description-4] Generated /home/tapaswee/clearpathrobot.srdf.xacro [INFO] [generate_semantic_description-4]: process has finished cleanly [pid 67165] [INFO] [generate_launch-5]: process started with pid [67221] [generate_launch-5] Generated launch file: <text:soft-page-break/>/home/tapaswee/clearpath/manipulators/launch/manipulators-service.launch.py [generate_launch-5] Generated launch file: /home/tapaswee/clearpath/sensors/launch/camera_0.launch.py [generate_launch-5] Generated launch file: /home/tapaswee/clearpath/sensors/launch/sensors-service.launch.py [generate_launch-5] Generated launch file: /home/tapaswee/clearpath/platform/launch/platform-service.launch.py [ign gazebo-1] [GUI] [Wrn] [Application.cc:802] [QT] file::/EntityContextMenuPlugin/EntityContextMenuPlugin.qml:56:5: QML Connections: Implicitly defined onFoo properties in Connections are deprecated. Use this syntax instead: function onFoo(&lt;arguments&gt;) { ... } [INFO] [generate_launch-5]: process has finished cleanly [pid 67221] [INFO] [generate_param-6]: process started with pid [67234] [ign gazebo-1] [Msg] Resource path resolve service on [/gazebo/resource_paths/resolve].[Msg] Ignition Gazebo GUI v6.17.1 [ign gazebo-1] [Dbg] [Gui.cc:253] Waiting for subscribers to [/gazebo/starting_world]... [ign gazebo-1] [Dbg] [Application.cc:92] Initializing application. [ign gazebo-1] [GUI] [Dbg] [Application.cc:560] Create main window [ign gazebo-1] [GUI] [Dbg] [PathManager.cc:66] Requesting resource paths through [/gazebo/resource_paths/get] [ign gazebo-1] [GUI] [Dbg] [Gui.cc:333] GUI requesting list of world names. The server may be busy downloading resources. Please be patient. [ign gazebo-1] [GUI] [Dbg] [PathManager.cc:55] Received resource paths. [ign gazebo-1] [GUI] [Dbg] [GuiRunner.cc:145] Requesting initial state from [/world/empty/state]... [ign gazebo-1] [GUI] [Msg] Loading config [/home/tapaswee/clearpath_ws/install/clearpath_gz/share/clearpath_gz/config/gui.config] [ign gazebo-1] [GUI] [Dbg] [Application.cc:431] Loading plugin [MinimalScene] [ign gazebo-1] [GUI] [Msg] Added plugin [3D View] to main window [ign gazebo-1] [GUI] [Msg] Loaded plugin [MinimalScene] from path [/usr/lib/x86_64-linux-gnu/ign-gui-6/plugins/libMinimalScene.so] [ign gazebo-1] [GUI] [Dbg] [Application.cc:431] Loading plugin [EntityContextMenuPlugin] [ign gazebo-1] [GUI] [Msg] Added plugin [Entity Context Menu] to main window [ign gazebo-1] [GUI] [Msg] Loaded plugin [EntityContextMenuPlugin] from path [/usr/lib/x86_64-linux-gnu/ign-gazebo-6/plugins/gui/libEntityContextMenuPlugin.so] [ign gazebo-1] [GUI] [Dbg] [Application.cc:431] Loading plugin [GzSceneManager] [ign gazebo-1] [GUI] [Msg] Added plugin [Scene Manager] to main window [ign gazebo-1] [GUI] [Msg] Loaded plugin [GzSceneManager] from path [/usr/lib/x86_64-linux-gnu/ign-gazebo-6/plugins/gui/libGzSceneManager.so] [ign gazebo-1] [GUI] [Dbg] [Application.cc:431] Loading plugin [InteractiveViewControl] [ign gazebo-1] [GUI] [Msg] Camera view controller topic advertised on [/gui/camera/view_control] [ign gazebo-1] [GUI] [Msg] Camera reference visual topic advertised on [/gui/camera/view_control/reference_visual] [ign gazebo-1] [GUI] [Msg] Camera view control sensitivity advertised on [/gui/camera/view_control/sensitivity] [ign gazebo-1] [GUI] [Msg] Added plugin [Interactive view control] to main window [ign gazebo-1] [GUI] [Msg] Loaded plugin [InteractiveViewControl] from path [/usr/lib/x86_64-linux-gnu/ign-gui-6/plugins/libInteractiveViewControl.so] [ign gazebo-1] [GUI] [Dbg] [Application.cc:431] Loading plugin [CameraTracking] [ign gazebo-1] [GUI] [Msg] Added plugin [Camera tracking] to main window [ign gazebo-1] [GUI] [Msg] Loaded plugin [CameraTracking] from path [/usr/lib/x86_64-linux-gnu/ign-gui-6/plugins/libCameraTracking.so] [ign gazebo-1] [GUI] [Dbg] [Application.cc:431] Loading plugin [MarkerManager] [generate_param-6] Generated config: /home/tapaswee/clearpath/sensors/config/camera_0.yaml [generate_param-6] Generated config: /home/tapaswee/clearpath/platform/config/control.yaml [generate_param-6] Generated config: /home/tapaswee/clearpath/platform/config/imu_filter.yaml [generate_param-6] Generated config: /home/tapaswee/clearpath/platform/config/localization.yaml [generate_param-6] Generated config: /home/tapaswee/clearpath/platform/config/teleop_interactive_markers.yaml [generate_param-6] <text:soft-page-break/>Generated config: /home/tapaswee/clearpath/platform/config/teleop_joy.yaml [generate_param-6] Generated config: /home/tapaswee/clearpath/platform/config/twist_mux.yaml [generate_param-6] Generated config: /home/tapaswee/clearpath/manipulators/config/moveit.yaml [INFO] [generate_param-6]: process has finished cleanly [pid 67234] [ign gazebo-1] [GUI] [Wrn] [Application.cc:802] [QT] file::/Spawn/Spawn.qml:32:3: QML Connections: Implicitly defined onFoo properties in Connections are deprecated. Use this syntax instead: function onFoo(&lt;arguments&gt;) { ... } [ign gazebo-1] [GUI] [Msg] Listening to stats on [/world/empty/stats] [ign gazebo-1] [GUI] [Msg] Added plugin [Marker Manager] to main window [ign gazebo-1] [GUI] [Msg] Loaded plugin [MarkerManager] from path [/usr/lib/x86_64-linux-gnu/ign-gui-6/plugins/libMarkerManager.so] [ign gazebo-1] [GUI] [Dbg] [Application.cc:431] Loading plugin [SelectEntities] [ign gazebo-1] [GUI] [Msg] Added plugin [Select entities] to main window [ign gazebo-1] [GUI] [Msg] Loaded plugin [SelectEntities] from path [/usr/lib/x86_64-linux-gnu/ign-gazebo-6/plugins/gui/libSelectEntities.so] [ign gazebo-1] [GUI] [Dbg] [Application.cc:431] Loading plugin [Spawn] [ign gazebo-1] [GUI] [Msg] Added plugin [Spawn] to main window [ign gazebo-1] [GUI] [Msg] Loaded plugin [Spawn] from path [/usr/lib/x86_64-linux-gnu/ign-gazebo-6/plugins/gui/libSpawn.so] [ign gazebo-1] [GUI] [Dbg] [Application.cc:431] Loading plugin [VisualizationCapabilities] [ign gazebo-1] [GUI] [Msg] View as transparent service on [/gui/view/transparent] [ign gazebo-1] [GUI] [Msg] View as wireframes service on [/gui/view/wireframes] [ign gazebo-1] [GUI] [Msg] View center of mass service on [/gui/view/com] [ign gazebo-1] [GUI] [Msg] View inertia service on [/gui/view/inertia] [ign gazebo-1] [GUI] [Msg] View collisions service on [/gui/view/collisions] [ign gazebo-1] [GUI] [Msg] View joints service on [/gui/view/joints] [ign gazebo-1] [GUI] [Msg] View frames service on [/gui/view/frames] [ign gazebo-1] [GUI] [Msg] Added plugin [Visualization capabilities] to main window [ign gazebo-1] [GUI] [Msg] Loaded plugin [VisualizationCapabilities] from path [/usr/lib/x86_64-linux-gnu/ign-gazebo-6/plugins/gui/libVisualizationCapabilities.so] [ign gazebo-1] [GUI] [Dbg] [Application.cc:431] Loading plugin [WorldControl] [ign gazebo-1] [GUI] [Msg] Using world control service [/world/empty/control] [ign gazebo-1] [GUI] [Msg] Listening to stats on [/world/empty/stats] [ign gazebo-1] [GUI] [Dbg] [WorldControl.cc:246] Using an event to share WorldControl msgs with the server [ign gazebo-1] [GUI] [Msg] Added plugin [World control] to main window [ign gazebo-1] [GUI] [Msg] Loaded plugin [WorldControl] from path [/usr/lib/x86_64-linux-gnu/ign-gui-6/plugins/libWorldControl.so] [ign gazebo-1] [GUI] [Dbg] [Application.cc:431] Loading plugin [WorldStats] [ign gazebo-1] [GUI] [Msg] Listening to stats on [/world/empty/stats] [ign gazebo-1] [GUI] [Msg] Added plugin [World stats] to main window [ign gazebo-1] [GUI] [Msg] Loaded plugin [WorldStats] from path [/usr/lib/x86_64-linux-gnu/ign-gui-6/plugins/libWorldStats.so] [INFO] [robot_state_publisher-7]: process started with pid [67237] [INFO] [spawner-8]: process started with pid [67239] [INFO] [spawner-9]: process started with pid [67241] [INFO] [ekf_node-10]: process started with pid [67243] [INFO] [marker_server-11]: process started with pid [67245] [INFO] [twist_mux-12]: process started with pid [67247] [INFO] [joy_linux_node-13]: process started with pid [67249] [INFO] [teleop_node-14]: process started with pid [67251] [INFO] [parameter_bridge-15]: process started with pid [67253] [INFO] [parameter_bridge-16]: process started with pid [67255] [INFO] [parameter_bridge-17]: process started with pid [67257] [INFO] [static_transform_publisher-18]: process started with pid [67259] [INFO] [image_bridge-19]: process started with pid [67261] [INFO] [image_bridge-20]: process started with pid [67263] [INFO] [create-21]: process started with pid [67265] [teleop_node-14] [INFO] [1773170333.582641103] [TeleopTwistJoy]: Teleop enable button 4. [teleop_node-14] [INFO] [1773170333.582706749] [TeleopTwistJoy]: Turbo on button 5. [teleop_node-14] [INFO] <text:soft-page-break/>[1773170333.582711668] [TeleopTwistJoy]: Linear axis x on 1 at scale 0.400000. [teleop_node-14] [INFO] [1773170333.582723601] [TeleopTwistJoy]: Turbo for linear axis x is scale 1.000000. [teleop_node-14] [INFO] [1773170333.582728380] [TeleopTwistJoy]: Angular axis yaw on 0 at scale 0.600000. [teleop_node-14] [INFO] [1773170333.582732708] [TeleopTwistJoy]: Turbo for angular axis yaw is scale 1.200000. [marker_server-11] [INFO] [1773170333.583826156] [cpr_a200_0000.twist_server_node]: [interactive_marker_twist_server] Initialized. [static_transform_publisher-18] [INFO] [1773170333.585327142] [cpr_a200_0000.camera_0_static_tf]: Spinning until stopped - publishing transform [static_transform_publisher-18] translation: ('0.000000', '0.000000', '0.000000') [static_transform_publisher-18] rotation: ('0.000000', '0.000000', '0.000000', '1.000000') [static_transform_publisher-18] from 'camera_0_link' to 'cpr_a200_0000/robot/base_link/camera_0' [joy_linux_node-13] [ERROR] [1773170333.591573940] [cpr_a200_0000.joy_node]: Couldn't open joystick /dev/input/ps4. Will retry every second. [twist_mux-12] [INFO] [1773170333.593349119] [cpr_a200_0000.twist_mux]: Topic handler 'topics.external' subscribed to topic 'cmd_vel': timeout = 0.500000s , priority = 1. [create-21] [INFO] [1773170333.597004448] [cpr_a200_0000.ros_gz_sim]: Requesting list of world names. [twist_mux-12] [INFO] [1773170333.597639151] [cpr_a200_0000.twist_mux]: Topic handler 'topics.interactive_marker' subscribed to topic 'twist_marker_server/cmd_vel': timeout = 0.500000s , priority = 8. [twist_mux-12] [INFO] [1773170333.598459827] [cpr_a200_0000.twist_mux]: Topic handler 'topics.joy' subscribed to topic 'joy_teleop/cmd_vel': timeout = 0.500000s , priority = 10. [twist_mux-12] [INFO] [1773170333.601781079] [cpr_a200_0000.twist_mux]: Topic handler 'topics.rc' subscribed to topic 'rc_teleop/cmd_vel': timeout = 0.500000s , priority = 12. [ign gazebo-1] [GUI] [Wrn] [Application.cc:802] [QT] file::/TransformControl/TransformControl.qml:104:3: QML Connections: Implicitly defined onFoo properties in Connections are deprecated. Use this syntax instead: function onFoo(&lt;arguments&gt;) { ... } [ign gazebo-1] [GUI] [Wrn] [Application.cc:802] [QT] file::/TransformControl/TransformControl.qml:99:3: QML Connections: Implicitly defined onFoo properties in Connections are deprecated. Use this syntax instead: function onFoo(&lt;arguments&gt;) { ... } [ign gazebo-1] [GUI] [Wrn] [Application.cc:802] [QT] file::/TransformControl/TransformControl.qml:94:3: QML Connections: Implicitly defined onFoo properties in Connections are deprecated. Use this syntax instead: function onFoo(&lt;arguments&gt;) { ... } [ign gazebo-1] [GUI] [Wrn] [Application.cc:802] [QT] file::/TransformControl/TransformControl.qml:89:3: QML Connections: Implicitly defined onFoo properties in Connections are deprecated. Use this syntax instead: function onFoo(&lt;arguments&gt;) { ... } [twist_mux-12] [INFO] [1773170333.606834729] [cpr_a200_0000.twist_mux]: Topic handler 'locks.e_stop' subscribed to topic 'platform/emergency_stop': timeout = None , priority = 255. [parameter_bridge-15] [INFO] [1773170333.617070382] [cpr_a200_0000.cmd_vel_bridge]: Creating GZ-&gt;ROS Bridge: [cpr_a200_0000/cmd_vel (ignition.msgs.Twist) -&gt; cpr_a200_0000/cmd_vel (geometry_msgs/msg/Twist)] (Lazy 0) [parameter_bridge-15] [INFO] [1773170333.624733955] [cpr_a200_0000.cmd_vel_bridge]: Creating ROS-&gt;GZ Bridge: [/model/cpr_a200_0000/robot/cmd_vel (geometry_msgs/msg/Twist) -&gt; /model/cpr_a200_0000/robot/cmd_vel (ignition.msgs.Twist)] (Lazy 0) [robot_state_publisher-7] [INFO] [1773170333.626317088] [cpr_a200_0000.robot_state_publisher]: got segment base_footprint [robot_state_publisher-7] [INFO] [1773170333.626422910] [cpr_a200_0000.robot_state_publisher]: got segment base_link [robot_state_publisher-7] [INFO] [1773170333.626431266] [cpr_a200_0000.robot_state_publisher]: got segment bracket_0_link [robot_state_publisher-7] [INFO] [1773170333.626436496] <text:soft-page-break/>[cpr_a200_0000.robot_state_publisher]: got segment bracket_0_mount [robot_state_publisher-7] [INFO] [1773170333.626441936] [cpr_a200_0000.robot_state_publisher]: got segment camera_0_bottom_screw_frame [robot_state_publisher-7] [INFO] [1773170333.626447136] [cpr_a200_0000.robot_state_publisher]: got segment camera_0_color_frame [robot_state_publisher-7] [INFO] [1773170333.626451805] [cpr_a200_0000.robot_state_publisher]: got segment camera_0_color_optical_frame [robot_state_publisher-7] [INFO] [1773170333.626456174] [cpr_a200_0000.robot_state_publisher]: got segment camera_0_depth_frame [robot_state_publisher-7] [INFO] [1773170333.626460903] [cpr_a200_0000.robot_state_publisher]: got segment camera_0_depth_optical_frame [robot_state_publisher-7] [INFO] [1773170333.626465431] [cpr_a200_0000.robot_state_publisher]: got segment camera_0_infra1_frame [robot_state_publisher-7] [INFO] [1773170333.626469930] [cpr_a200_0000.robot_state_publisher]: got segment camera_0_infra1_optical_frame [robot_state_publisher-7] [INFO] [1773170333.626474799] [cpr_a200_0000.robot_state_publisher]: got segment camera_0_infra2_frame [robot_state_publisher-7] [INFO] [1773170333.626479508] [cpr_a200_0000.robot_state_publisher]: got segment camera_0_infra2_optical_frame [robot_state_publisher-7] [INFO] [1773170333.626484077] [cpr_a200_0000.robot_state_publisher]: got segment camera_0_link [robot_state_publisher-7] [INFO] [1773170333.626488766] [cpr_a200_0000.robot_state_publisher]: got segment default_mount [robot_state_publisher-7] [INFO] [1773170333.626493254] [cpr_a200_0000.robot_state_publisher]: got segment front_bumper_base_link [robot_state_publisher-7] [INFO] [1773170333.626498184] [cpr_a200_0000.robot_state_publisher]: got segment front_bumper_link [robot_state_publisher-7] [INFO] [1773170333.626503223] [cpr_a200_0000.robot_state_publisher]: got segment front_bumper_mount [robot_state_publisher-7] [INFO] [1773170333.626507782] [cpr_a200_0000.robot_state_publisher]: got segment front_left_wheel [robot_state_publisher-7] [INFO] [1773170333.626512441] [cpr_a200_0000.robot_state_publisher]: got segment front_right_wheel [robot_state_publisher-7] [INFO] [1773170333.626516860] [cpr_a200_0000.robot_state_publisher]: got segment inertial_link [robot_state_publisher-7] [INFO] [1773170333.626521448] [cpr_a200_0000.robot_state_publisher]: got segment rear_bumper_base_link [robot_state_publisher-7] [INFO] [1773170333.626526267] [cpr_a200_0000.robot_state_publisher]: got segment rear_bumper_link [robot_state_publisher-7] [INFO] [1773170333.626530736] [cpr_a200_0000.robot_state_publisher]: got segment rear_bumper_mount [robot_state_publisher-7] [INFO] [1773170333.626535445] [cpr_a200_0000.robot_state_publisher]: got segment rear_left_wheel [robot_state_publisher-7] [INFO] [1773170333.626539974] [cpr_a200_0000.robot_state_publisher]: got segment rear_right_wheel [robot_state_publisher-7] [INFO] [1773170333.626544552] [cpr_a200_0000.robot_state_publisher]: got segment sensor_arch_link [robot_state_publisher-7] [INFO] [1773170333.626549231] [cpr_a200_0000.robot_state_publisher]: got segment sensor_arch_mount [robot_state_publisher-7] [INFO] [1773170333.626553850] [cpr_a200_0000.robot_state_publisher]: got segment top_chassis_link [parameter_bridge-16] [INFO] [1773170333.638807117] [cpr_a200_0000.odom_base_tf_bridge]: Creating GZ-&gt;ROS Bridge: [/model/cpr_a200_0000/robot/tf (ignition.msgs.Pose_V) -&gt; /model/cpr_a200_0000/robot/tf (tf2_msgs/msg/TFMessage)] (Lazy 0) [ign gazebo-1] [GUI] [Wrn] [Application.cc:802] [QT] <text:soft-page-break/>file::/WorldStats/WorldStats.qml:53:3: QML RowLayout: Binding loop detected for property "x" [spawner-8] [INFO] [1773170333.840617984] [cpr_a200_0000.spawner_joint_state_broadcaster]: waiting for service /cpr_a200_0000/controller_manager/list_controllers to become available... [spawner-9] [INFO] [1773170333.879730886] [cpr_a200_0000.spawner_platform_velocity_controller]: waiting for service /cpr_a200_0000/controller_manager/list_controllers to become available... [create-21] [INFO] [1773170333.899568534] [cpr_a200_0000.ros_gz_sim]: Waiting messages on topic [robot_description]. [create-21] [INFO] [1773170333.911305875] [cpr_a200_0000.ros_gz_sim]: Requested creation of entity. [create-21] [INFO] [1773170333.911349108] [cpr_a200_0000.ros_gz_sim]: OK creation of entity. [ign gazebo-1] libEGL warning: egl: failed to create dri2 screen [ign gazebo-1] libEGL warning: egl: failed to create dri2 screen [INFO] [create-21]: process has finished cleanly [pid 67265] [ign gazebo-1] [GUI] [Dbg] [Application.cc:431] Loading plugin [Shapes] [ign gazebo-1] [GUI] [Msg] Added plugin [Shapes] to main window [ign gazebo-1] [GUI] [Msg] Loaded plugin [Shapes] from path [/usr/lib/x86_64-linux-gnu/ign-gazebo-6/plugins/gui/libShapes.so] [ign gazebo-1] [GUI] [Dbg] [Application.cc:431] Loading plugin [Lights] [ign gazebo-1] [GUI] [Msg] Added plugin [Lights] to main window [ign gazebo-1] [GUI] [Msg] Loaded plugin [Lights] from path [/usr/lib/x86_64-linux-gnu/ign-gazebo-6/plugins/gui/libLights.so] [ign gazebo-1] [GUI] [Dbg] [Application.cc:431] Loading plugin [TransformControl] [ign gazebo-1] [GUI] [Dbg] [TransformControl.cc:222] Legacy mode is disabled; this plugin must be used with MinimalScene. [ign gazebo-1] [GUI] [Msg] Added plugin [Transform control] to main window [ign gazebo-1] [GUI] [Msg] Loaded plugin [TransformControl] from path [/usr/lib/x86_64-linux-gnu/ign-gazebo-6/plugins/gui/libTransformControl.so] [ign gazebo-1] [GUI] [Dbg] [Application.cc:431] Loading plugin [Screenshot] [ign gazebo-1] [GUI] [Msg] Screenshot service on [/gui/screenshot] [ign gazebo-1] [GUI] [Msg] Added plugin [Screenshot] to main window [ign gazebo-1] [GUI] [Msg] Loaded plugin [Screenshot] from path [/usr/lib/x86_64-linux-gnu/ign-gui-6/plugins/libScreenshot.so] [ign gazebo-1] [GUI] [Dbg] [Application.cc:431] Loading plugin [CopyPaste] [ign gazebo-1] [GUI] [Msg] Added plugin [Copy/Paste] to main window [ign gazebo-1] [GUI] [Msg] Loaded plugin [CopyPaste] from path [/usr/lib/x86_64-linux-gnu/ign-gazebo-6/plugins/gui/libCopyPaste.so] [ign gazebo-1] [GUI] [Dbg] [Application.cc:431] Loading plugin [Teleop] [ign gazebo-1] [GUI] [Msg] Added plugin [Teleop] to main window [ign gazebo-1] [GUI] [Msg] Loaded plugin [Teleop] from path [/usr/lib/x86_64-linux-gnu/ign-gui-6/plugins/libTeleop.so] [ign gazebo-1] [GUI] [Dbg] [Application.cc:301] Loading window config [ign gazebo-1] [GUI] [Msg] Using server control service [/server_control] [ign gazebo-1] [GUI] [Dbg] [Application.cc:574] Applying config [ign gazebo-1] [GUI] [Msg] Loading plugin [ignition-rendering-ogre2] [ign gazebo-1] [GUI] [Dbg] [MinimalScene.cc:602] Create scene [scene] [ign gazebo-1] [GUI] [Msg] Loading plugin [ignition-rendering-ogre2] [ign gazebo-1] [GUI] [Dbg] [TransformControl.cc:531] TransformControl plugin is using camera [scene::Camera(65527)] [ign gazebo-1] [GUI] [Msg] Loading plugin [ignition-rendering-ogre2] [ign gazebo-1] [GUI] [Msg] Loading plugin [ignition-rendering-ogre2] [ign gazebo-1] [GUI] [Dbg] [Spawn.cc:289] Spawn plugin is using camera [scene::Camera(65527)] [ign gazebo-1] [GUI] [Msg] Loading plugin [ignition-rendering-ogre2] [parameter_bridge-17] [INFO] [1773170334.630358586] [cpr_a200_0000.sensors.camera_0_gz_bridge]: Creating GZ-&gt;ROS Bridge: [/cpr_a200_0000/sensors/camera_0/camera_info (gz.msgs.CameraInfo) -&gt; camera_0/color/camera_info (sensor_msgs/msg/CameraInfo)] (Lazy 0) [parameter_bridge-17] [INFO] [1773170334.633195453] [cpr_a200_0000.sensors.camera_0_gz_bridge]: Creating GZ-<text:soft-page-break/>&gt;ROS Bridge: [/cpr_a200_0000/sensors/camera_0/points (gz.msgs.PointCloudPacked) -&gt; camera_0/points (sensor_msgs/msg/PointCloud2)] (Lazy 0) [parameter_bridge-17] [INFO] [1773170334.634097796] [cpr_a200_0000.sensors.camera_0_gz_bridge]: Creating GZ-&gt;ROS Bridge: [/cpr_a200_0000/sensors/camera_0/camera_info (gz.msgs.CameraInfo) -&gt; camera_0/depth/camera_info (sensor_msgs/msg/CameraInfo)] (Lazy 0) [ign gazebo-1] [Wrn] [SimulationRunner.cc:662] Found additional publishers on /stats, using namespaced stats topic only [ign gazebo-1] [Wrn] [SimulationRunner.cc:695] Found additional publishers on /clock, using namespaced clock topic only [ign gazebo-1] [INFO] [1773170334.784208460] [GazeboSimROS2ControlPlugin]: robot_param_node is robot_state_publisher [ign gazebo-1] [INFO] [1773170334.784234580] [GazeboSimROS2ControlPlugin]: robot_param_node is robot_description [ign gazebo-1] [INFO] [1773170334.805238584] [cpr_a200_0000.gz_ros2_control]: connected to service!! /cpr_a200_0000/robot_state_publisher asking for robot_description [ign gazebo-1] [INFO] [1773170334.805586308] [cpr_a200_0000.gz_ros2_control]: Received URDF from param server [ign gazebo-1] [INFO] [1773170334.809210568] [cpr_a200_0000.gz_ros2_control]: The position_proportional_gain has been set to: 0.1 [ign gazebo-1] [INFO] [1773170334.809252689] [cpr_a200_0000.gz_ros2_control]: Loading joint: front_left_wheel_joint [ign gazebo-1] [INFO] [1773170334.809258550] [cpr_a200_0000.gz_ros2_control]: State: [ign gazebo-1] [INFO] [1773170334.809263499] [cpr_a200_0000.gz_ros2_control]: position [ign gazebo-1] [INFO] [1773170334.809268459] [cpr_a200_0000.gz_ros2_control]: velocity [ign gazebo-1] [INFO] [1773170334.809271966] [cpr_a200_0000.gz_ros2_control]: Command: [ign gazebo-1] [INFO] [1773170334.809275713] [cpr_a200_0000.gz_ros2_control]: velocity [ign gazebo-1] [INFO] [1773170334.809287335] [cpr_a200_0000.gz_ros2_control]: Loading joint: rear_left_wheel_joint [ign gazebo-1] [INFO] [1773170334.809292655] [cpr_a200_0000.gz_ros2_control]: State: [ign gazebo-1] [INFO] [1773170334.809297875] [cpr_a200_0000.gz_ros2_control]: position [ign gazebo-1] [INFO] [1773170334.809302494] [cpr_a200_0000.gz_ros2_control]: velocity [ign gazebo-1] [INFO] [1773170334.809307564] [cpr_a200_0000.gz_ros2_control]: Command: [ign gazebo-1] [INFO] [1773170334.809312283] [cpr_a200_0000.gz_ros2_control]: velocity [ign gazebo-1] [INFO] [1773170334.809321570] [cpr_a200_0000.gz_ros2_control]: Loading joint: front_right_wheel_joint [ign gazebo-1] [INFO] [1773170334.809326870] [cpr_a200_0000.gz_ros2_control]: State: [ign gazebo-1] [INFO] [1773170334.809332140] [cpr_a200_0000.gz_ros2_control]: position [ign gazebo-1] [INFO] [1773170334.809336348] [cpr_a200_0000.gz_ros2_control]: velocity [ign gazebo-1] [INFO] [1773170334.809339504] [cpr_a200_0000.gz_ros2_control]: Command: [ign gazebo-1] [INFO] [1773170334.809342530] [cpr_a200_0000.gz_ros2_control]: velocity [ign gazebo-1] [INFO] [1773170334.809349023] [cpr_a200_0000.gz_ros2_control]: Loading joint: rear_right_wheel_joint [ign gazebo-1] [INFO] [1773170334.809352389] [cpr_a200_0000.gz_ros2_control]: State: [ign gazebo-1] [INFO] [1773170334.809355545] [cpr_a200_0000.gz_ros2_control]: position [ign gazebo-1] [INFO] [1773170334.809358871] [cpr_a200_0000.gz_ros2_control]: velocity [ign gazebo-1] [INFO] [1773170334.809362068] [cpr_a200_0000.gz_ros2_control]: Command: [ign gazebo-1] [INFO] [1773170334.809365003] [cpr_a200_0000.gz_ros2_control]: velocity [ign gazebo-1] [INFO] [1773170334.809412313] [resource_manager]: Initialize hardware 'a200_hardware' [ign gazebo-1] [WARN] [1773170334.809430057] [cpr_a200_0000.gz_ros2_control]: The ign_ros2_control plugin got renamed to gz_ros2_control. [ign gazebo-1] Update the &lt;ros2_control&gt; tag and gazebo plugin to [ign gazebo-1] &lt;hardware&gt; [ign gazebo-1] &lt;plugin&gt;gz_ros2_control/GazeboSimSystem&lt;/plugin&gt; [ign gazebo-1] &lt;/hardware&gt; [ign gazebo-1] <text:soft-page-break/>&lt;gazebo&gt; [ign gazebo-1] &lt;plugin filename="gz_ros2_control-system"name="gz_ros2_control::GazeboSimROS2ControlPlugin"&gt; [ign gazebo-1] ... [ign gazebo-1] &lt;/plugin&gt; [ign gazebo-1] &lt;/gazebo&gt; [ign gazebo-1] [INFO] [1773170334.809464473] [resource_manager]: Successful initialization of hardware 'a200_hardware' [ign gazebo-1] [INFO] [1773170334.809489411] [resource_manager]: 'configure' hardware 'a200_hardware' [ign gazebo-1] [INFO] [1773170334.809492497] [cpr_a200_0000.gz_ros2_control]: System Successfully configured! [ign gazebo-1] [INFO] [1773170334.809499029] [resource_manager]: Successful 'configure' of hardware 'a200_hardware' [ign gazebo-1] [INFO] [1773170334.809504289] [resource_manager]: 'activate' hardware 'a200_hardware' [ign gazebo-1] [INFO] [1773170334.809508758] [resource_manager]: Successful 'activate' of hardware 'a200_hardware' [ign gazebo-1] [INFO] [1773170334.809512815] [cpr_a200_0000.gz_ros2_control]: Loading controller_manager [ign gazebo-1] [WARN] [1773170334.834109990] [cpr_a200_0000.gz_ros2_control]: Desired controller update period (0.02 s) is slower than the gazebo simulation period (0.001 s). [ign gazebo-1] [Wrn] [Component.hh:144] Trying to serialize component with data type [St6vectorIdSaIdEE], which doesn't have <text:span text:style-name="Source_20_Text">operator&lt;&lt;</text:span>. Component will not be serialized. [ign gazebo-1] [INFO] [1773170334.844047865] [cpr_a200_0000.controller_manager]: Loading controller 'joint_state_broadcaster' [spawner-8] [INFO] [1773170334.851140397] [cpr_a200_0000.spawner_joint_state_broadcaster]: Loaded joint_state_broadcaster [ign gazebo-1] [INFO] [1773170334.852017582] [cpr_a200_0000.controller_manager]: Configuring controller 'joint_state_broadcaster' [ign gazebo-1] [INFO] [1773170334.852123755] [cpr_a200_0000.joint_state_broadcaster]: 'joints' or 'interfaces' parameter is empty. All available state interfaces will be published [spawner-8] [INFO] [1773170334.913370246] [cpr_a200_0000.spawner_joint_state_broadcaster]: Configured and activated joint_state_broadcaster [ign gazebo-1] [GUI] [Wrn] [Component.hh:189] Trying to deserialize component with data type [St6vectorIdSaIdEE], which doesn't have <text:span text:style-name="Source_20_Text">operator&gt;&gt;</text:span>. Component will not be deserialized. [INFO] [spawner-8]: process has finished cleanly [pid 67239] [ign gazebo-1] [GUI] [Wrn] [ColladaLoader.cc:2394] Triangle input semantic: 'COLOR' is currently not supported [ign gazebo-1] [INFO] [1773170337.487964655] [cpr_a200_0000.controller_manager]: Loading controller 'platform_velocity_controller' [spawner-9] [INFO] [1773170337.512688508] [cpr_a200_0000.spawner_platform_velocity_controller]: Loaded platform_velocity_controller [ign gazebo-1] [INFO] [1773170337.513797735] [cpr_a200_0000.controller_manager]: Configuring controller 'platform_velocity_controller' [spawner-9] [INFO] [1773170337.572983604] [cpr_a200_0000.spawner_platform_velocity_controller]: Configured and activated platform_velocity_controller [INFO] [spawner-9]: process has finished cleanly [pid 67241] [ign gazebo-1] [ign gazebo-1] [Msg] Resource paths published on [/gazebo/resource_paths]. [ign gazebo-1] [Msg] Server control service on [/server_control]. [ign gazebo-1] [Dbg] [SimulationRunner.cc:664] Publishers [Address, Message Type]: [ign gazebo-1] [Dbg] [SimulationRunner.cc:669] tcp://172.17.0.1:46713, ignition.msgs.WorldStatistics [ign gazebo-1] [Dbg] [SimulationRunner.cc:697] Publishers [Address, Message Type]: [ign gazebo-1] [Dbg] [SimulationRunner.cc:702] tcp://172.17.0.1:46713, ignition.msgs.Clock [ign gazebo-1] [Dbg] [SimulationRunner.cc:501] Creating PostUpdate worker threads: 3 [ign gazebo-1] [Dbg] [SimulationRunner.cc:512] Creating postupdate worker thread (0) [ign gazebo-1] [Dbg] [SimulationRunner.cc:512] Creating postupdate worker thread (1) [ign gazebo-1] [Dbg] [SystemManager.cc:73] Loaded system [ignition::gazebo::systems::WheelSlip] for entity [10] [ign <text:soft-page-break/>gazebo-1] [Dbg] [SystemManager.cc:73] Loaded system [ign_ros2_control::IgnitionROS2ControlPlugin] for entity [10] [ign gazebo-1] [Dbg] [SystemManager.cc:73] Loaded system [ignition::gazebo::systems::PosePublisher] for entity [10] [ign gazebo-1] [Dbg] [UserCommands.cc:1303] Created entity [10] named [cpr_a200_0000/robot] [ign gazebo-1] [Msg] Serving scene information on [/world/empty/scene/info] [ign gazebo-1] [Msg] Serving graph information on [/world/empty/scene/graph] [ign gazebo-1] [Msg] Serving full state on [/world/empty/state] [ign gazebo-1] [Msg] Serving full state (async) on [/world/empty/state_async] [ign gazebo-1] [Msg] Publishing scene information on [/world/empty/scene/info] [ign gazebo-1] [Msg] Publishing entity deletions on [/world/empty/scene/deletion] [ign gazebo-1] [Msg] Publishing state changes on [/world/empty/state] [ign gazebo-1] [Msg] Publishing pose messages on [/world/empty/pose/info] [ign gazebo-1] [Msg] Publishing dynamic pose messages on [/world/empty/dynamic_pose/info] [ign gazebo-1] [Dbg] [EntityComponentManager.cc:1623] Updated state thread iterators: 16 threads processing around 3 entities each. [ign gazebo-1] [Dbg] [SimulationRunner.cc:528] Exiting postupdate worker thread (0) [ign gazebo-1] [Dbg] [SimulationRunner.cc:528] Exiting postupdate worker thread (1) [ign gazebo-1] [Dbg] [SimulationRunner.cc:501] Creating PostUpdate worker threads: 5 [ign gazebo-1] [Dbg] [SimulationRunner.cc:512] Creating postupdate worker thread (0) [ign gazebo-1] [Dbg] [SimulationRunner.cc:512] Creating postupdate worker thread (1) [ign gazebo-1] [Dbg] [SimulationRunner.cc:512] Creating postupdate worker thread (2) [ign gazebo-1] [Dbg] [SimulationRunner.cc:512] Creating postupdate worker thread (3) [ign gazebo-1] [GUI] [Wrn] [Application.cc:802] [QT] qrc:/qml/PluginMenu.qml:130: TypeError: Cannot read property 'width' of null [ign gazebo-1] [GUI] [Wrn] [Application.cc:802] [QT] qrc:/qml/PluginMenu.qml:130: TypeError: Cannot read property 'width' of null [ign gazebo-1] [GUI] [Wrn] [Application.cc:802] [QT] qrc:/qml/PluginMenu.qml:130: TypeError: Cannot read property 'width' of null [ign gazebo-1] [GUI] [Wrn] [Application.cc:802] [QT] qrc:/qml/PluginMenu.qml:130: TypeError: Cannot read property 'width' of null [ign gazebo-1] [GUI] [Wrn] [Application.cc:802] [QT] qrc:/qml/PluginMenu.qml:130: TypeError: Cannot read property 'width' of null [ign gazebo-1] [GUI] [Wrn] [Application.cc:802] [QT] qrc:/qml/PluginMenu.qml:130: TypeError: Cannot read property 'width' of null [ign gazebo-1] [GUI] [Wrn] [Application.cc:802] [QT] qrc:/qml/PluginMenu.qml:130: TypeError: Cannot read property 'width' of null [ign gazebo-1] [GUI] [Wrn] [Application.cc:802] [QT] qrc:/qml/PluginMenu.qml:130: TypeError: Cannot read property 'width' of null [ign gazebo-1] [GUI] [Wrn] [Application.cc:802] [QT] qrc:/qml/PluginMenu.qml:130: TypeError: Cannot read property 'width' of null [ign gazebo-1] [GUI] [Wrn] [Application.cc:802] [QT] qrc:/qml/PluginMenu.qml:130: TypeError: Cannot read property 'width' of null [ign gazebo-1] [GUI] [Wrn] [Application.cc:802] [QT] qrc:/qml/PluginMenu.qml:130: TypeError: Cannot read property 'width' of null [ign gazebo-1] [GUI] [Wrn] [Application.cc:802] [QT] qrc:/qml/PluginMenu.qml:130: TypeError: Cannot read property 'width' of null [ign gazebo-1] [GUI] [Wrn] [Application.cc:802] [QT] qrc:/qml/PluginMenu.qml:130: TypeError: Cannot read property 'width' of null [ign gazebo-1] [GUI] [Wrn] [Application.cc:802] [QT] qrc:/qml/PluginMenu.qml:130: TypeError: Cannot read property 'width' of null [ign gazebo-1] [GUI] [Wrn] [Application.cc:802] [QT] qrc:/qml/PluginMenu.qml:130: TypeError: Cannot read property 'width' of null [ign gazebo-1] [GUI] [Wrn] [Application.cc:802] [QT] qrc:/qml/PluginMenu.qml:130: TypeError: Cannot read property 'width' of null [ign gazebo-1] [GUI] [Wrn] [Scene3D.cc:1578] This plugin is deprecated on ign-gui v6 and will be removed on ign-gui v7. Use MinimalScene + TransportSceneManager instead. [ign gazebo-1] [GUI] [Wrn] <text:soft-page-break/>[Scene3D.cc:1135] Failed to load engine [ogre]. Using engine [ogre2], which is already loaded. Currently only one engine is supported at a time. [ign gazebo-1] [INFO] [1773170405.229859227] [rclcpp]: signal_handler(SIGINT/SIGTERM) [ign gazebo-1] [INFO] [1773170405.229954289] [cpr_a200_0000.controller_manager]: Shutdown request received.... [ign gazebo-1] [INFO] [1773170405.230011408] [cpr_a200_0000.controller_manager]: Shutting down all controllers in the controller manager. [ign gazebo-1] [INFO] [1773170405.230043028] [cpr_a200_0000.controller_manager]: Deactivating controller 'joint_state_broadcaster' [ign gazebo-1] [INFO] [1773170405.230125184] [cpr_a200_0000.controller_manager]: Shutting down controller 'joint_state_broadcaster' [ign gazebo-1] [INFO] [1773170405.230225806] [cpr_a200_0000.controller_manager]: Deactivating controller 'platform_velocity_controller' [ign gazebo-1] [INFO] [1773170405.230367086] [cpr_a200_0000.controller_manager]: Shutting down controller 'platform_velocity_controller' [ign gazebo-1] [INFO] [1773170405.230404407] [resource_manager]: 'deactivate' hardware 'a200_hardware' [ign gazebo-1] [INFO] [1773170405.230424685] [resource_manager]: Successful 'deactivate' of hardware 'a200_hardware' [ign gazebo-1] [INFO] [1773170405.230430476] [resource_manager]: 'shutdown' hardware 'a200_hardware' [ign gazebo-1] [INFO] [1773170405.230435085] [resource_manager]: Successful 'shutdown' of hardware 'a200_hardware' [ign gazebo-1] [INFO] [1773170405.230437911] [cpr_a200_0000.controller_manager]: Shutting down the controller manager. [ign gazebo-1] [Dbg] [SignalHandler.cc:141] Received signal[2]. [ign gazebo-1] [Dbg] [ServerPrivate.cc:110] Server received signal[2] [ign gazebo-1] [Dbg] [gz.cc:410] Shutting down ign-gazebo-server [ign gazebo-1] [Dbg] [SimulationRunner.cc:528] Exiting postupdate worker thread (3) [ign gazebo-1] [Dbg] [SimulationRunner.cc:528] Exiting postupdate worker thread (2) [ign gazebo-1] [Dbg] [SimulationRunner.cc:528] [ign gazebo-1] [ign gazebo-1] [Dbg] [SimulationRunner.cc:528] Exiting postupdate worker thread (11)) [ign gazebo-1] )</text:p>
        <text:p text:style-name="Text_20_body">Your robot <text:span text:style-name="Strong_20_Emphasis">spawned correctly</text:span> 👍 — the screenshot confirms that.<text:line-break/>The issue is <text:span text:style-name="Strong_20_Emphasis">teleoperation</text:span>, and your logs already show the exact reason.</text:p>
        <text:p text:style-name="Horizontal_20_Line"/>
        <text:h text:style-name="Heading_20_1" text:outline-level="1">🚨 Root Cause</text:h>
        <text:p text:style-name="Text_20_body">This line in your log explains it:</text:p>
        <text:section text:style-name="Sect2" text:name="Section35">
          <text:p text:style-name="Preformatted_20_Text"><text:bookmark text:name="code-block-viewer34"/>[joy_linux_node]: Couldn't open joystick /dev/input/ps4</text:p>
        </text:section>
        <text:p text:style-name="Text_20_body">The system is trying to use a <text:span text:style-name="Strong_20_Emphasis">PS4 joystick controller</text:span>, not the keyboard.</text:p>
        <text:p text:style-name="Text_20_body">So the teleop node is waiting for a <text:span text:style-name="Strong_20_Emphasis">game controller input</text:span>, which is why <text:span text:style-name="Strong_20_Emphasis">nothing happens when you try keyboard teleop</text:span>.</text:p>
        <text:p text:style-name="Horizontal_20_Line"/>
        <text:h text:style-name="Heading_20_1" text:outline-level="1">✅ Quick Fix (Use Keyboard Teleop)</text:h>
        <text:p text:style-name="Text_20_body">Open a <text:span text:style-name="Strong_20_Emphasis">new terminal</text:span> and run:</text:p>
        <text:section text:style-name="Sect2" text:name="Section36">
          <text:p text:style-name="Preformatted_20_Text"><text:bookmark text:name="code-block-viewer35"/>source ~/clearpath_ws/install/setup.bash</text:p>
          <text:p text:style-name="Preformatted_20_Text">ros2 run teleop_twist_keyboard teleop_twist_keyboard --ros-args -r cmd_vel:=/cpr_a200_0000/cmd_vel</text:p>
        </text:section>
        <text:p text:style-name="Text_20_body">Controls:</text:p>
        <text:section text:style-name="Sect2" text:name="Section37">
          <text:p text:style-name="Preformatted_20_Text"><text:bookmark text:name="code-block-viewer36"/><text:soft-page-break/>i <text:s/>→ forward</text:p>
          <text:p text:style-name="Preformatted_20_Text">k <text:s/>→ stop</text:p>
          <text:p text:style-name="Preformatted_20_Text">, <text:s/>→ backward</text:p>
          <text:p text:style-name="Preformatted_20_Text">j <text:s/>→ rotate left</text:p>
          <text:p text:style-name="Preformatted_20_Text">l <text:s/>→ rotate right</text:p>
        </text:section>
        <text:p text:style-name="Horizontal_20_Line"/>
        <text:h text:style-name="Heading_20_1" text:outline-level="1">🔎 Why this remap is needed</text:h>
        <text:p text:style-name="Text_20_body">Your robot namespace is:</text:p>
        <text:section text:style-name="Sect2" text:name="Section38">
          <text:p text:style-name="Preformatted_20_Text"><text:bookmark text:name="code-block-viewer37"/>cpr_a200_0000</text:p>
        </text:section>
        <text:p text:style-name="Text_20_body">So the velocity topic is:</text:p>
        <text:section text:style-name="Sect2" text:name="Section39">
          <text:p text:style-name="Preformatted_20_Text"><text:bookmark text:name="code-block-viewer38"/>/cpr_a200_0000/cmd_vel</text:p>
        </text:section>
        <text:p text:style-name="Text_20_body">But keyboard teleop normally publishes to:</text:p>
        <text:section text:style-name="Sect2" text:name="Section40">
          <text:p text:style-name="Preformatted_20_Text"><text:bookmark text:name="code-block-viewer39"/>/cmd_vel</text:p>
        </text:section>
        <text:p text:style-name="Text_20_body">So we <text:span text:style-name="Strong_20_Emphasis">remap the topic</text:span>.</text:p>
        <text:p text:style-name="Horizontal_20_Line"/>
        <text:h text:style-name="Heading_20_1" text:outline-level="1">🧪 Verify the topic exists</text:h>
        <text:p text:style-name="Text_20_body">Run:</text:p>
        <text:section text:style-name="Sect2" text:name="Section41">
          <text:p text:style-name="Preformatted_20_Text"><text:bookmark text:name="code-block-viewer40"/>ros2 topic list | grep cmd_vel</text:p>
        </text:section>
        <text:p text:style-name="Text_20_body">You should see something like:</text:p>
        <text:section text:style-name="Sect2" text:name="Section42">
          <text:p text:style-name="Preformatted_20_Text"><text:bookmark text:name="code-block-viewer41"/>/cpr_a200_0000/cmd_vel</text:p>
          <text:p text:style-name="Preformatted_20_Text">/model/cpr_a200_0000/robot/cmd_vel</text:p>
        </text:section>
        <text:p text:style-name="Horizontal_20_Line"/>
        <text:h text:style-name="Heading_20_1" text:outline-level="1">⚠️ Also make sure the simulation is <text:span text:style-name="Strong_20_Emphasis">running</text:span></text:h>
        <text:p text:style-name="Text_20_body">In Gazebo top bar:</text:p>
        <text:p text:style-name="Text_20_body">▶ <text:span text:style-name="Strong_20_Emphasis">Press PLAY</text:span></text:p>
        <text:p text:style-name="Text_20_body">If Gazebo is paused, the robot won't move.</text:p>
        <text:p text:style-name="Horizontal_20_Line"/>
        <text:h text:style-name="Heading_20_1" text:outline-level="1">🚀 Optional (Much Better Teleop)</text:h>
        <text:p text:style-name="Text_20_body">You can also control it from <text:span text:style-name="Strong_20_Emphasis">Gazebo GUI directly</text:span>:</text:p>
        <text:p text:style-name="Text_20_body">Top menu:</text:p>
        <text:section text:style-name="Sect2" text:name="Section43">
          <text:p text:style-name="Preformatted_20_Text"><text:bookmark text:name="code-block-viewer42"/>Plugins → Teleop</text:p>
        </text:section>
        <text:p text:style-name="Text_20_body">Then use keyboard:</text:p>
        <text:section text:style-name="Sect2" text:name="Section44">
          <text:p text:style-name="Preformatted_20_Text"><text:bookmark text:name="code-block-viewer43"/>W A S D</text:p>
        </text:section>
        <text:p text:style-name="Horizontal_20_Line"/>
        <text:h text:style-name="Heading_20_1" text:outline-level="1"><text:soft-page-break/>🧠 Small ROS2 Insight (useful for your project)</text:h>
        <text:p text:style-name="Text_20_body">Your launch created this architecture:</text:p>
        <text:section text:style-name="Sect2" text:name="Section45">
          <text:p text:style-name="Preformatted_20_Text"><text:bookmark text:name="code-block-viewer44"/>keyboard → cmd_vel</text:p>
          <text:p text:style-name="Preformatted_20_Text"><text:s text:c="12"/>↓</text:p>
          <text:p text:style-name="Preformatted_20_Text"><text:s text:c="8"/>twist_mux</text:p>
          <text:p text:style-name="Preformatted_20_Text"><text:s text:c="12"/>↓</text:p>
          <text:p text:style-name="Preformatted_20_Text">platform_velocity_controller</text:p>
          <text:p text:style-name="Preformatted_20_Text"><text:s text:c="12"/>↓</text:p>
          <text:p text:style-name="Preformatted_20_Text">gz_ros2_control</text:p>
          <text:p text:style-name="Preformatted_20_Text"><text:s text:c="12"/>↓</text:p>
          <text:p text:style-name="Preformatted_20_Text">Gazebo wheels</text:p>
        </text:section>
        <text:p text:style-name="Text_20_body">Understanding this pipeline will help you later when integrating <text:span text:style-name="Strong_20_Emphasis">Nav2 and costmaps</text:span>.</text:p>
        <text:p text:style-name="Horizontal_20_Line"/>
        <text:h text:style-name="Heading_20_1" text:outline-level="1">✅ If you want, I can also show you something very useful:</text:h>
        <text:p text:style-name="Text_20_body">How to <text:span text:style-name="Strong_20_Emphasis">connect this Clearpath robot to Nav2 navigation stack</text:span> so you can start implementing your <text:span text:style-name="Strong_20_Emphasis">context-aware costmap</text:span>.</text:p>
        <text:p text:style-name="Text_20_body">It only takes about <text:span text:style-name="Strong_20_Emphasis">10 minutes</text:span>, and it’s the next step for your project.</text:p>
        <text:p text:style-name="Text_20_body">But where is the manipulator? serial_number: a200-0000 version: 0 system: username: administrator platform: attachments: - name: front_bumper type: a200.bumper model: default - name: rear_bumper type: a200.bumper model: default - name: sensor_arch type: a200.sensor_arch model: sensor_arch_300 mounts: bracket: - parent: sensor_arch_mount model: horizontal sensors: lidar_2d: - model: hokuyo_ust10 parent: bracket_0_mount xyz: [0.0, 0.0, 0.0] rpy: [0.0, 0.0, 0.0] camera: - model: intel_realsense parent: front_bumper_mount xyz: [0.0, 0.0, 0.05] rpy: [0.0, 0.0, 0.0] manipulators: arm: - model: kinova_gen3 parent: bracket_0_mount xyz: [0.0, 0.0, 0.15] rpy: [0.0, 0.0, 0.0] should thte bot be reconfigured?</text:p>
        <text:p text:style-name="Text_20_body">Yes — <text:span text:style-name="Strong_20_Emphasis">you are very close</text:span>, but your robot <text:span text:style-name="Strong_20_Emphasis">was launched without the manipulator configuration applied</text:span>. The YAML you showed is correct conceptually, but there are <text:span text:style-name="Strong_20_Emphasis">two issues</text:span>.</text:p>
        <text:p text:style-name="Horizontal_20_Line"/>
        <text:h text:style-name="Heading_20_1" text:outline-level="1">🚨 Problem 1 — YAML indentation error</text:h>
        <text:p text:style-name="Text_20_body">Your config has this:</text:p>
        <text:section text:style-name="Sect2" text:name="Section46">
          <text:p text:style-name="Preformatted_20_Text"><text:bookmark text:name="code-block-viewer45"/>manipulators:</text:p>
          <text:p text:style-name="Preformatted_20_Text"><text:s text:c="2"/>arm:</text:p>
          <text:p text:style-name="Preformatted_20_Text"><text:s text:c="4"/>- model: kinova_gen3</text:p>
          <text:p text:style-name="Preformatted_20_Text"><text:s text:c="6"/>parent: bracket_0_mount</text:p>
          <text:p text:style-name="Preformatted_20_Text"><text:s text:c="6"/>xyz: [0.0, 0.0, 0.15]</text:p>
          <text:p text:style-name="Preformatted_20_Text">rpy: [0.0, 0.0, 0.0]</text:p>
        </text:section>
        <text:p text:style-name="Text_20_body"><text:span text:style-name="Source_20_Text">rpy</text:span> is outside the manipulator block.</text:p>
        <text:p text:style-name="Text_20_body"><text:soft-page-break/>It must be:</text:p>
        <text:section text:style-name="Sect2" text:name="Section47">
          <text:p text:style-name="Preformatted_20_Text"><text:bookmark text:name="code-block-viewer46"/>manipulators:</text:p>
          <text:p text:style-name="Preformatted_20_Text"><text:s text:c="2"/>arm:</text:p>
          <text:p text:style-name="Preformatted_20_Text"><text:s text:c="4"/>- model: kinova_gen3</text:p>
          <text:p text:style-name="Preformatted_20_Text"><text:s text:c="6"/>parent: bracket_0_mount</text:p>
          <text:p text:style-name="Preformatted_20_Text"><text:s text:c="6"/>xyz: [0.0, 0.0, 0.15]</text:p>
          <text:p text:style-name="Preformatted_20_Text"><text:s text:c="6"/>rpy: [0.0, 0.0, 0.0]</text:p>
        </text:section>
        <text:p text:style-name="Text_20_body">Otherwise the manipulator <text:span text:style-name="Strong_20_Emphasis">is ignored by the generator</text:span>.</text:p>
        <text:p text:style-name="Horizontal_20_Line"/>
        <text:h text:style-name="Heading_20_1" text:outline-level="1">🚨 Problem 2 — Robot must be regenerated</text:h>
        <text:p text:style-name="Text_20_body">Clearpath robots are <text:span text:style-name="Strong_20_Emphasis">generated from the YAML config</text:span>.</text:p>
        <text:p text:style-name="Text_20_body">After editing the config you must <text:span text:style-name="Strong_20_Emphasis">regenerate the robot description</text:span>.</text:p>
        <text:p text:style-name="Text_20_body">Run:</text:p>
        <text:section text:style-name="Sect2" text:name="Section48">
          <text:p text:style-name="Preformatted_20_Text"><text:bookmark text:name="code-block-viewer47"/>cd ~/clearpath_ws</text:p>
          <text:p text:style-name="Preformatted_20_Text">source install/setup.bash</text:p>
          <text:p text:style-name="Preformatted_20_Text">clearpath_generator_robot</text:p>
        </text:section>
        <text:p text:style-name="Text_20_body">This command <text:span text:style-name="Strong_20_Emphasis">rebuilds the URDF</text:span> using your configuration.</text:p>
        <text:p text:style-name="Horizontal_20_Line"/>
        <text:h text:style-name="Heading_20_1" text:outline-level="1">🚀 Then launch again</text:h>
        <text:section text:style-name="Sect2" text:name="Section49">
          <text:p text:style-name="Preformatted_20_Text"><text:bookmark text:name="code-block-viewer48"/>ros2 launch clearpath_gz simulation.launch.py \</text:p>
          <text:p text:style-name="Preformatted_20_Text">setup_path:=$HOME/clearpath \</text:p>
          <text:p text:style-name="Preformatted_20_Text">world:=empty \</text:p>
          <text:p text:style-name="Preformatted_20_Text">use_sim_time:=true</text:p>
        </text:section>
        <text:p text:style-name="Text_20_body">Now the robot should spawn with:</text:p>
        <text:list xml:id="list3378598398" text:style-name="L11">
          <text:list-item>
            <text:p text:style-name="P13">base platform</text:p>
          </text:list-item>
          <text:list-item>
            <text:p text:style-name="P13">sensor arch</text:p>
          </text:list-item>
          <text:list-item>
            <text:p text:style-name="P13">lidar</text:p>
          </text:list-item>
          <text:list-item>
            <text:p text:style-name="P13">camera</text:p>
          </text:list-item>
          <text:list-item>
            <text:p text:style-name="P13"><text:span text:style-name="Strong_20_Emphasis">Kinova Gen3 arm</text:span></text:p>
          </text:list-item>
        </text:list>
        <text:p text:style-name="Horizontal_20_Line"/>
        <text:h text:style-name="Heading_20_1" text:outline-level="1">🔎 How to confirm the arm loaded</text:h>
        <text:p text:style-name="Text_20_body">Run:</text:p>
        <text:section text:style-name="Sect2" text:name="Section50">
          <text:p text:style-name="Preformatted_20_Text"><text:bookmark text:name="code-block-viewer49"/>ros2 topic list | grep joint</text:p>
        </text:section>
        <text:p text:style-name="Text_20_body">You should see many arm joints like:</text:p>
        <text:section text:style-name="Sect2" text:name="Section51">
          <text:p text:style-name="Preformatted_20_Text"><text:bookmark text:name="code-block-viewer50"/>joint_states</text:p>
          <text:p text:style-name="Preformatted_20_Text">gen3_joint_1</text:p>
          <text:p text:style-name="Preformatted_20_Text">gen3_joint_2</text:p>
          <text:p text:style-name="Preformatted_20_Text">gen3_joint_3</text:p>
        </text:section>
        <text:p text:style-name="Text_20_body"><text:soft-page-break/>Or visually in Gazebo you will see the <text:span text:style-name="Strong_20_Emphasis">7-DOF manipulator on the arch</text:span>.</text:p>
        <text:p text:style-name="Horizontal_20_Line"/>
        <text:h text:style-name="Heading_20_1" text:outline-level="1">⚠️ One more thing (important)</text:h>
        <text:p text:style-name="Text_20_body">The Kinova arm also requires <text:span text:style-name="Strong_20_Emphasis">MoveIt config</text:span>.</text:p>
        <text:p text:style-name="Text_20_body">If the arm appears but doesn't move, run:</text:p>
        <text:section text:style-name="Sect2" text:name="Section52">
          <text:p text:style-name="Preformatted_20_Text"><text:bookmark text:name="code-block-viewer51"/>ros2 launch kinova_gen3_moveit_config moveit.launch.py</text:p>
        </text:section>
        <text:p text:style-name="Horizontal_20_Line"/>
        <text:h text:style-name="Heading_20_1" text:outline-level="1">🧠 Quick architecture of your robot now</text:h>
        <text:p text:style-name="Text_20_body">Your robot will look like:</text:p>
        <text:section text:style-name="Sect2" text:name="Section53">
          <text:p text:style-name="Preformatted_20_Text"><text:bookmark text:name="code-block-viewer52"/>Clearpath A200 base</text:p>
          <text:p text:style-name="Preformatted_20_Text"><text:s text:c="8"/>│</text:p>
          <text:p text:style-name="Preformatted_20_Text"><text:s text:c="3"/>Sensor Arch</text:p>
          <text:p text:style-name="Preformatted_20_Text"><text:s text:c="8"/>│</text:p>
          <text:p text:style-name="Preformatted_20_Text"><text:s text:c="3"/>Hokuyo LiDAR</text:p>
          <text:p text:style-name="Preformatted_20_Text"><text:s text:c="8"/>│</text:p>
          <text:p text:style-name="Preformatted_20_Text"><text:s text:c="2"/>Intel RealSense</text:p>
          <text:p text:style-name="Preformatted_20_Text"><text:s text:c="8"/>│</text:p>
          <text:p text:style-name="Preformatted_20_Text"><text:s text:c="2"/>Kinova Gen3 Arm</text:p>
        </text:section>
        <text:p text:style-name="Text_20_body">This is <text:span text:style-name="Strong_20_Emphasis">exactly a mobile manipulation robot</text:span>, which is perfect for your <text:span text:style-name="Strong_20_Emphasis">context-aware costmap project</text:span>.</text:p>
        <text:p text:style-name="Horizontal_20_Line"/>
        <text:h text:style-name="Heading_20_1" text:outline-level="1">🔥 One more thing (important for your research)</text:h>
        <text:p text:style-name="Text_20_body">Once the arm appears, you can create <text:span text:style-name="Strong_20_Emphasis">context-aware costmaps based on arm reachability</text:span>.</text:p>
        <text:p text:style-name="Text_20_body">Example:</text:p>
        <text:section text:style-name="Sect2" text:name="Section54">
          <text:p text:style-name="Preformatted_20_Text"><text:bookmark text:name="code-block-viewer53"/>if object within arm reach:</text:p>
          <text:p text:style-name="Preformatted_20_Text"><text:s text:c="4"/>reduce navigation cost</text:p>
          <text:p text:style-name="Preformatted_20_Text">else:</text:p>
          <text:p text:style-name="Preformatted_20_Text"><text:s text:c="4"/>normal cost</text:p>
        </text:section>
        <text:p text:style-name="Text_20_body">This is actually a <text:span text:style-name="Strong_20_Emphasis">very publishable research direction</text:span>.</text:p>
        <text:p text:style-name="Horizontal_20_Line"/>
        <text:p text:style-name="Text_20_body">✅ If you'd like, I can also show you something extremely useful:</text:p>
        <text:p text:style-name="Text_20_body"><text:span text:style-name="Strong_20_Emphasis">How to make the Kinova arm automatically pick objects after the robot navigates to them (Nav2 + MoveIt integration).</text:span></text:p>
        <text:p text:style-name="Text_20_body">This is exactly how <text:span text:style-name="Strong_20_Emphasis">mobile manipulation systems are built in research labs.</text:span></text:p>
        <text:section text:style-name="Sect1" text:name="thread-bottom-container">
          <text:p text:style-name="Text_20_body"/>
          <text:section text:style-name="Sect1" text:name="thread-bottom">
            <text:p text:style-name="P2"><text:soft-page-break/><draw:control text:anchor-type="as-char" draw:z-index="1" draw:name="Shape1" draw:style-name="gr1" draw:text-style-name="P15" svg:width="4.742cm" svg:height="0.53cm" draw:control="control1"/></text:p>
            <text:p text:style-name="P2"><draw:control text:anchor-type="as-char" draw:z-index="2" draw:name="Shape2" draw:style-name="gr1" draw:text-style-name="P14" svg:width="4.53cm" svg:height="0.699cm" draw:control="control2"/></text:p>
            <text:section text:style-name="Sect1" text:name="prompt-textarea">
              <text:p text:style-name="Text_20_body"/>
            </text:section>
          </text:section>
        </text:section>
      </text:section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1T01:00:30.658010680</meta:creation-date>
    <dc:date>2026-03-11T01:02:42.467302492</dc:date>
    <meta:editing-duration>PT2M12S</meta:editing-duration>
    <meta:editing-cycles>1</meta:editing-cycles>
    <meta:generator>LibreOffice/7.3.7.2$Linux_X86_64 LibreOffice_project/30$Build-2</meta:generator>
    <meta:document-statistic meta:table-count="2" meta:image-count="1" meta:object-count="0" meta:page-count="26" meta:paragraph-count="390" meta:word-count="5786" meta:character-count="56751" meta:non-whitespace-character-count="51148"/>
  </office:meta>
</office:document-meta>
</file>