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091cm" table:align="left"/>
    </style:style>
    <style:style style:name="Table1.A" style:family="table-column">
      <style:table-column-properties style:column-width="1.977cm"/>
    </style:style>
    <style:style style:name="Table1.B" style:family="table-column">
      <style:table-column-properties style:column-width="3.11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paswee@tapaswee-Legion-Slim-5-16AHP9:~/clearpath_ws$ ros2 run clearpath_generator_common generate_base -s ~/clearpath No executable found tapaswee@tapaswee-Legion-Slim-5-16AHP9:~/clearpath_ws$ cd .. tapaswee@tapaswee-Legion-Slim-5-16AHP9:~$ cd clearpath tapaswee@tapaswee-Legion-Slim-5-16AHP9:~/clearpath$ ls manipulators platform robot.srdf robot.srdf.xacro robot.urdf.xacro robot.yaml sensors tapaswee@tapaswee-Legion-Slim-5-16AHP9:~/clearpath$ </text:p>
      <text:p text:style-name="Text_20_body">The error <text:span text:style-name="Strong_20_Emphasis">“No executable found”</text:span> means that the ROS 2 package <text:span text:style-name="Strong_20_Emphasis"><text:span text:style-name="Source_20_Text">clearpath_generator_common</text:span></text:span> is either:</text:p>
      <text:list xml:id="list1393033944" text:style-name="L1">
        <text:list-item>
          <text:p text:style-name="P2"><text:span text:style-name="Strong_20_Emphasis">Not installed</text:span>, or</text:p>
        </text:list-item>
        <text:list-item>
          <text:p text:style-name="P2"><text:span text:style-name="Strong_20_Emphasis">Not built in your workspace</text:span>, or</text:p>
        </text:list-item>
        <text:list-item>
          <text:p text:style-name="P2"><text:span text:style-name="Strong_20_Emphasis">Your workspace isn’t sourced</text:span></text:p>
        </text:list-item>
      </text:list>
      <text:p text:style-name="Text_20_body">Let’s check step-by-step.</text:p>
      <text:p text:style-name="Horizontal_20_Line"/>
      <text:h text:style-name="Heading_20_2" text:outline-level="2">1️⃣ Check if the package exists</text:h>
      <text:p text:style-name="Text_20_body">Run:</text:p>
      <text:section text:style-name="Sect1" text:name="code-block-viewer">
        <text:p text:style-name="Preformatted_20_Text">ros2 pkg list | grep clearpath_generator_common</text:p>
      </text:section>
      <text:p text:style-name="Text_20_body">If <text:span text:style-name="Strong_20_Emphasis">nothing prints</text:span>, the package is not available in your environment.</text:p>
      <text:p text:style-name="Horizontal_20_Line"/>
      <text:h text:style-name="Heading_20_2" text:outline-level="2">2️⃣ If it is in your workspace, rebuild</text:h>
      <text:p text:style-name="Text_20_body">Go to your workspace:</text:p>
      <text:section text:style-name="Sect1" text:name="Section1">
        <text:p text:style-name="Preformatted_20_Text"><text:bookmark text:name="code-block-viewer"/>cd ~/clearpath_ws</text:p>
      </text:section>
      <text:p text:style-name="Text_20_body">Build:</text:p>
      <text:section text:style-name="Sect1" text:name="Section2">
        <text:p text:style-name="Preformatted_20_Text"><text:bookmark text:name="code-block-viewer1"/>colcon build --symlink-install</text:p>
      </text:section>
      <text:p text:style-name="Text_20_body">Then <text:span text:style-name="Strong_20_Emphasis">source the workspace</text:span>:</text:p>
      <text:section text:style-name="Sect1" text:name="Section3">
        <text:p text:style-name="Preformatted_20_Text"><text:bookmark text:name="code-block-viewer2"/>source install/setup.bash</text:p>
      </text:section>
      <text:p text:style-name="Text_20_body">Then try again:</text:p>
      <text:section text:style-name="Sect1" text:name="Section4">
        <text:p text:style-name="Preformatted_20_Text"><text:bookmark text:name="code-block-viewer3"/>ros2 run clearpath_generator_common generate_base -s ~/clearpath</text:p>
      </text:section>
      <text:p text:style-name="Horizontal_20_Line"/>
      <text:h text:style-name="Heading_20_2" text:outline-level="2">3️⃣ Check available executables</text:h>
      <text:p text:style-name="Text_20_body">If the package exists but the executable name is wrong:</text:p>
      <text:section text:style-name="Sect1" text:name="Section5">
        <text:p text:style-name="Preformatted_20_Text"><text:bookmark text:name="code-block-viewer4"/>ros2 pkg executables clearpath_generator_common</text:p>
      </text:section>
      <text:p text:style-name="Text_20_body">This will list something like:</text:p>
      <text:section text:style-name="Sect1" text:name="Section6">
        <text:p text:style-name="Preformatted_20_Text"><text:bookmark text:name="code-block-viewer5"/>clearpath_generator_common generate_base</text:p>
      </text:section>
      <text:p text:style-name="Text_20_body">Use whatever executable appears.</text:p>
      <text:p text:style-name="Horizontal_20_Line"/>
      <text:h text:style-name="Heading_20_2" text:outline-level="2"><text:soft-page-break/>4️⃣ Verify the workspace is sourced</text:h>
      <text:p text:style-name="Text_20_body">If you open a new terminal, run:</text:p>
      <text:section text:style-name="Sect1" text:name="Section7">
        <text:p text:style-name="Preformatted_20_Text"><text:bookmark text:name="code-block-viewer6"/>source ~/clearpath_ws/install/setup.bash</text:p>
      </text:section>
      <text:p text:style-name="Text_20_body">You can add it permanently:</text:p>
      <text:section text:style-name="Sect1" text:name="Section8">
        <text:p text:style-name="Preformatted_20_Text"><text:bookmark text:name="code-block-viewer7"/>echo "source ~/clearpath_ws/install/setup.bash" &gt;&gt; ~/.bashrc</text:p>
        <text:p text:style-name="Preformatted_20_Text">source ~/.bashrc</text:p>
      </text:section>
      <text:p text:style-name="Horizontal_20_Line"/>
      <text:h text:style-name="Heading_20_2" text:outline-level="2">5️⃣ Quick diagnostic (important)</text:h>
      <text:p text:style-name="Text_20_body">Please run these and paste the output:</text:p>
      <text:section text:style-name="Sect1" text:name="Section9">
        <text:p text:style-name="Preformatted_20_Text"><text:bookmark text:name="code-block-viewer8"/>ros2 pkg list | grep clearpath</text:p>
        <text:p text:style-name="Preformatted_20_Text">ros2 pkg executables clearpath_generator_common</text:p>
      </text:section>
      <text:p text:style-name="Text_20_body">That will immediately show <text:span text:style-name="Strong_20_Emphasis">what is missing</text:span> so I can fix it fast. 🚀</text:p>
      <text:p text:style-name="Text_20_body">tapaswee@tapaswee-Legion-Slim-5-16AHP9:~/clearpath$ ls manipulators platform robot.srdf robot.srdf.xacro robot.urdf.xacro robot.yaml sensors tapaswee@tapaswee-Legion-Slim-5-16AHP9:~/clearpath$ cd ~/clearpath_ws tapaswee@tapaswee-Legion-Slim-5-16AHP9:~/clearpath_ws$ source install/setup.bash tapaswee@tapaswee-Legion-Slim-5-16AHP9:~/clearpath_ws$ ros2 run clearpath_generator_common generate_base -s ~/clearpath No executable found tapaswee@tapaswee-Legion-Slim-5-16AHP9:~/clearpath_ws$ ros2 pkg executables clearpath_generator_common clearpath_generator_common generate_bash clearpath_generator_common generate_description clearpath_generator_common generate_discovery_server clearpath_generator_common generate_semantic_description clearpath_generator_common generate_vcan clearpath_generator_common moveit_collision_updater tapaswee@tapaswee-Legion-Slim-5-16AHP9:~/clearpath_ws$ </text:p>
      <text:p text:style-name="Text_20_body">The issue is simple: <text:span text:style-name="Strong_20_Emphasis"><text:span text:style-name="Source_20_Text">generate_base</text:span></text:span><text:span text:style-name="Strong_20_Emphasis"> does not exist in your installed package version.</text:span><text:line-break/>Your package shows these executables:</text:p>
      <text:list xml:id="list319611895" text:style-name="L2">
        <text:list-item>
          <text:p text:style-name="P3"><text:span text:style-name="Source_20_Text">generate_bash</text:span></text:p>
        </text:list-item>
        <text:list-item>
          <text:p text:style-name="P3"><text:span text:style-name="Source_20_Text">generate_description</text:span></text:p>
        </text:list-item>
        <text:list-item>
          <text:p text:style-name="P3"><text:span text:style-name="Source_20_Text">generate_discovery_server</text:span></text:p>
        </text:list-item>
        <text:list-item>
          <text:p text:style-name="P3"><text:span text:style-name="Source_20_Text">generate_semantic_description</text:span></text:p>
        </text:list-item>
        <text:list-item>
          <text:p text:style-name="P3"><text:span text:style-name="Source_20_Text">generate_vcan</text:span></text:p>
        </text:list-item>
        <text:list-item>
          <text:p text:style-name="P3"><text:span text:style-name="Source_20_Text">moveit_collision_updater</text:span></text:p>
        </text:list-item>
      </text:list>
      <text:p text:style-name="Text_20_body">So when you ran:</text:p>
      <text:section text:style-name="Sect1" text:name="Section10">
        <text:p text:style-name="Preformatted_20_Text"><text:bookmark text:name="code-block-viewer9"/>ros2 run clearpath_generator_common generate_base -s ~/clearpath</text:p>
      </text:section>
      <text:p text:style-name="Text_20_body">ROS2 correctly said <text:span text:style-name="Strong_20_Emphasis">“No executable found”</text:span>.</text:p>
      <text:p text:style-name="Horizontal_20_Line"/>
      <text:h text:style-name="Heading_20_1" text:outline-level="1"><text:soft-page-break/>✅ Correct command</text:h>
      <text:p text:style-name="Text_20_body">For generating the robot description, you should run:</text:p>
      <text:section text:style-name="Sect1" text:name="Section11">
        <text:p text:style-name="Preformatted_20_Text"><text:bookmark text:name="code-block-viewer10"/>ros2 run clearpath_generator_common generate_description -s ~/clearpath</text:p>
      </text:section>
      <text:p text:style-name="Text_20_body">Then generate the semantic description:</text:p>
      <text:section text:style-name="Sect1" text:name="Section12">
        <text:p text:style-name="Preformatted_20_Text"><text:bookmark text:name="code-block-viewer11"/>ros2 run clearpath_generator_common generate_semantic_description -s ~/clearpath</text:p>
      </text:section>
      <text:p text:style-name="Horizontal_20_Line"/>
      <text:h text:style-name="Heading_20_1" text:outline-level="1">📌 Typical Clearpath generation sequence</text:h>
      <text:p text:style-name="Text_20_body">Inside your workspace:</text:p>
      <text:section text:style-name="Sect1" text:name="Section13">
        <text:p text:style-name="Preformatted_20_Text"><text:bookmark text:name="code-block-viewer12"/>cd ~/clearpath_ws</text:p>
        <text:p text:style-name="Preformatted_20_Text">source install/setup.bash</text:p>
      </text:section>
      <text:p text:style-name="Text_20_body">Run:</text:p>
      <text:section text:style-name="Sect1" text:name="Section14">
        <text:p text:style-name="Preformatted_20_Text"><text:bookmark text:name="code-block-viewer13"/>ros2 run clearpath_generator_common generate_description -s ~/clearpath</text:p>
      </text:section>
      <text:p text:style-name="Text_20_body">Then:</text:p>
      <text:section text:style-name="Sect1" text:name="Section15">
        <text:p text:style-name="Preformatted_20_Text"><text:bookmark text:name="code-block-viewer14"/>ros2 run clearpath_generator_common generate_semantic_description -s ~/clearpath</text:p>
      </text:section>
      <text:p text:style-name="Horizontal_20_Line"/>
      <text:h text:style-name="Heading_20_1" text:outline-level="1">🧠 Why <text:span text:style-name="Source_20_Text">generate_base</text:span> didn’t exist</text:h>
      <text:p text:style-name="Text_20_body">Older Clearpath docs or tutorials used <text:span text:style-name="Strong_20_Emphasis"><text:span text:style-name="Source_20_Text">generate_base</text:span></text:span>, but in newer versions it was split into multiple generators:</text:p>
      <text:list xml:id="list885326722" text:style-name="L3">
        <text:list-item>
          <text:p text:style-name="P4"><text:span text:style-name="Strong_20_Emphasis">Description</text:span> → URDF files</text:p>
        </text:list-item>
        <text:list-item>
          <text:p text:style-name="P4"><text:span text:style-name="Strong_20_Emphasis">Semantic description</text:span> → MoveIt SRDF</text:p>
        </text:list-item>
        <text:list-item>
          <text:p text:style-name="P4"><text:span text:style-name="Strong_20_Emphasis">VCAN</text:span> → virtual CAN</text:p>
        </text:list-item>
        <text:list-item>
          <text:p text:style-name="P4"><text:span text:style-name="Strong_20_Emphasis">Discovery server</text:span> → DDS communication</text:p>
        </text:list-item>
      </text:list>
      <text:p text:style-name="Horizontal_20_Line"/>
      <text:p text:style-name="Text_20_body">✅ If you want, I can also show you the <text:span text:style-name="Strong_20_Emphasis">exact 5 commands to fully generate and launch your Clearpath robot simulation</text:span> (Husky/Warthog/etc.) in <text:span text:style-name="Strong_20_Emphasis">Gazebo + RViz</text:span>, which avoids the common setup errors.</text:p>
      <text:p text:style-name="Text_20_body">tapaswee@tapaswee-Legion-Slim-5-16AHP9:~/clearpath_ws$ ros2 run clearpath_generator_common generate_description -s ~/clearpath Traceback (most recent call last): File "/home/tapaswee/clearpath_ws/install/clearpath_generator_common/lib/clearpath_generator_common/generate_description", line 46, in &lt;module&gt; main() File "/home/tapaswee/clearpath_ws/install/clearpath_generator_common/lib/clearpath_generator_common/generate_description", line 41, in main dg = DescriptionGenerator(setup_path) File "/home/tapaswee/clearpath_ws/install/clearpath_generator_common/local/lib/python3.10/dist-packages/clearpath_generator_common/description/generator.py", line 51, in __init__ super().__init__(setup_path) File <text:soft-page-break/>"/home/tapaswee/clearpath_ws/install/clearpath_generator_common/local/lib/python3.10/dist-packages/clearpath_generator_common/common.py", line 309, in __init__ self.clearpath_config = ClearpathConfig(self.config) File "/home/tapaswee/clearpath_ws/build/clearpath_config/clearpath_config/clearpath_config.py", line 103, in __init__ super().__init__(setters, config) File "/home/tapaswee/clearpath_ws/build/clearpath_config/clearpath_config/common/types/config.py", line 58, in __init__ self.config = config File "/home/tapaswee/clearpath_ws/build/clearpath_config/clearpath_config/common/types/config.py", line 107, in config self.setter(prop)(get_from_dict(value, keys)) File "/home/tapaswee/clearpath_ws/build/clearpath_config/clearpath_config/clearpath_config.py", line 165, in platform self._platform.config = config File "/home/tapaswee/clearpath_ws/build/clearpath_config/clearpath_config/common/types/config.py", line 107, in config self.setter(prop)(get_from_dict(value, keys)) File "/home/tapaswee/clearpath_ws/build/clearpath_config/clearpath_config/platform/platform.py", line 231, in attachments self._attachments = AttachmentsConfigMux( File "/home/tapaswee/clearpath_ws/build/clearpath_config/clearpath_config/platform/attachments/mux.py", line 70, in __new__ cls.PLATFORM[p].config = attachments File "/home/tapaswee/clearpath_ws/build/clearpath_config/clearpath_config/platform/attachments/config.py", line 80, in config attachment.from_dict(a) File "/home/tapaswee/clearpath_ws/build/clearpath_config/clearpath_config/platform/types/attachment.py", line 68, in from_dict self.set_model(d['model']) File "/home/tapaswee/clearpath_ws/build/clearpath_config/clearpath_config/platform/types/attachment.py", line 82, in set_model assert model in self.MODELS, ( AssertionError: A200.Sensor_Arch model 'arch_300' is not one of: '['sensor_arch_300', 'sensor_arch_510']' [ros2run]: Process exited with failure 1 tapaswee@tapaswee-Legion-Slim-5-16AHP9:~/clearpath_ws$ </text:p>
      <text:p text:style-name="Text_20_body">The error message clearly shows the problem in your <text:span text:style-name="Strong_20_Emphasis"><text:span text:style-name="Source_20_Text">robot.yaml</text:span></text:span> configuration.</text:p>
      <text:h text:style-name="Heading_20_3" text:outline-level="3">❌ Error</text:h>
      <text:section text:style-name="Sect1" text:name="Section16">
        <text:p text:style-name="Preformatted_20_Text"><text:bookmark text:name="code-block-viewer15"/>AssertionError: A200.Sensor_Arch model 'arch_300' is not one of: ['sensor_arch_300', 'sensor_arch_510']</text:p>
      </text:section>
      <text:p text:style-name="Text_20_body">So your config is using:</text:p>
      <text:section text:style-name="Sect1" text:name="Section17">
        <text:p text:style-name="Preformatted_20_Text"><text:bookmark text:name="code-block-viewer16"/>arch_300</text:p>
      </text:section>
      <text:p text:style-name="Text_20_body">But the allowed values are:</text:p>
      <text:section text:style-name="Sect1" text:name="Section18">
        <text:p text:style-name="Preformatted_20_Text"><text:bookmark text:name="code-block-viewer17"/>sensor_arch_300</text:p>
        <text:p text:style-name="Preformatted_20_Text">sensor_arch_510</text:p>
      </text:section>
      <text:p text:style-name="Horizontal_20_Line"/>
      <text:h text:style-name="Heading_20_1" text:outline-level="1">✅ Fix</text:h>
      <text:p text:style-name="Text_20_body">Open your <text:span text:style-name="Strong_20_Emphasis">robot.yaml</text:span>:</text:p>
      <text:section text:style-name="Sect1" text:name="Section19">
        <text:p text:style-name="Preformatted_20_Text"><text:bookmark text:name="code-block-viewer18"/>nano ~/clearpath/robot.yaml</text:p>
      </text:section>
      <text:p text:style-name="Text_20_body">Find the section similar to:</text:p>
      <text:section text:style-name="Sect1" text:name="Section20">
        <text:p text:style-name="Preformatted_20_Text"><text:bookmark text:name="code-block-viewer19"/>model: arch_300</text:p>
      </text:section>
      <text:p text:style-name="Text_20_body">and change it to:</text:p>
      <text:section text:style-name="Sect1" text:name="Section21">
        <text:p text:style-name="Preformatted_20_Text"><text:bookmark text:name="code-block-viewer20"/><text:soft-page-break/>model: sensor_arch_300</text:p>
      </text:section>
      <text:p text:style-name="Text_20_body">or</text:p>
      <text:section text:style-name="Sect1" text:name="Section22">
        <text:p text:style-name="Preformatted_20_Text"><text:bookmark text:name="code-block-viewer21"/>model: sensor_arch_510</text:p>
      </text:section>
      <text:p text:style-name="Text_20_body">Most commonly it should be:</text:p>
      <text:section text:style-name="Sect1" text:name="Section23">
        <text:p text:style-name="Preformatted_20_Text"><text:bookmark text:name="code-block-viewer22"/>model: sensor_arch_300</text:p>
      </text:section>
      <text:p text:style-name="Text_20_body">Save and exit:</text:p>
      <text:section text:style-name="Sect1" text:name="Section24">
        <text:p text:style-name="Preformatted_20_Text"><text:bookmark text:name="code-block-viewer23"/>CTRL + X</text:p>
        <text:p text:style-name="Preformatted_20_Text">Y</text:p>
        <text:p text:style-name="Preformatted_20_Text">ENTER</text:p>
      </text:section>
      <text:p text:style-name="Horizontal_20_Line"/>
      <text:h text:style-name="Heading_20_1" text:outline-level="1">🔁 Run the generator again</text:h>
      <text:section text:style-name="Sect1" text:name="Section25">
        <text:p text:style-name="Preformatted_20_Text"><text:bookmark text:name="code-block-viewer24"/>cd ~/clearpath_ws</text:p>
        <text:p text:style-name="Preformatted_20_Text">source install/setup.bash</text:p>
        <text:p text:style-name="Preformatted_20_Text">ros2 run clearpath_generator_common generate_description -s ~/clearpath</text:p>
      </text:section>
      <text:p text:style-name="Text_20_body">Then:</text:p>
      <text:section text:style-name="Sect1" text:name="Section26">
        <text:p text:style-name="Preformatted_20_Text"><text:bookmark text:name="code-block-viewer25"/>ros2 run clearpath_generator_common generate_semantic_description -s ~/clearpath</text:p>
      </text:section>
      <text:p text:style-name="Horizontal_20_Line"/>
      <text:p text:style-name="Text_20_body">💡 <text:span text:style-name="Strong_20_Emphasis">Why this happened</text:span></text:p>
      <text:p text:style-name="Text_20_body">Clearpath changed the <text:span text:style-name="Strong_20_Emphasis">attachment model names</text:span> in newer config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Old name</text:p>
            </table:table-cell>
            <table:table-cell table:style-name="Table1.A1" office:value-type="string">
              <text:p text:style-name="Table_20_Heading">New name</text:p>
            </table:table-cell>
          </table:table-row>
        </table:table-header-rows>
        <table:table-row>
          <table:table-cell table:style-name="Table1.A1" office:value-type="string">
            <text:p text:style-name="Table_20_Contents">arch_300</text:p>
          </table:table-cell>
          <table:table-cell table:style-name="Table1.A1" office:value-type="string">
            <text:p text:style-name="Table_20_Contents">sensor_arch_300</text:p>
          </table:table-cell>
        </table:table-row>
        <table:table-row>
          <table:table-cell table:style-name="Table1.A1" office:value-type="string">
            <text:p text:style-name="Table_20_Contents">arch_510</text:p>
          </table:table-cell>
          <table:table-cell table:style-name="Table1.A1" office:value-type="string">
            <text:p text:style-name="Table_20_Contents">sensor_arch_510</text:p>
          </table:table-cell>
        </table:table-row>
      </table:table>
      <text:p text:style-name="Text_20_body">Your config file is using the <text:span text:style-name="Strong_20_Emphasis">old naming</text:span>.</text:p>
      <text:p text:style-name="Horizontal_20_Line"/>
      <text:p text:style-name="Text_20_body">✅ If you want, paste your <text:span text:style-name="Strong_20_Emphasis"><text:span text:style-name="Source_20_Text">robot.yaml</text:span></text:span>, and I can <text:span text:style-name="Strong_20_Emphasis">quickly check the whole file</text:span> because Clearpath configs usually have <text:span text:style-name="Strong_20_Emphasis">2–3 more small errors</text:span> that appear after fixing this one.</text:p>
      <text:p text:style-name="Text_20_body">assert model in cls.MODEL, ( AssertionError: Model 'intel_realsense_d435' must be one of: 'dict_keys(['axis_camera', 'flir_blackfly', 'intel_realsense', 'stereolabs_zed', 'luxonis_oakd'])' [ros2run]: Process exited with failure 1 tapaswee@tapaswee-Legion-Slim-5-16AHP9:~/clearpath_ws$ Which should I choose?</text:p>
      <text:p text:style-name="Text_20_body">Your error shows that <text:span text:style-name="Strong_20_Emphasis"><text:span text:style-name="Source_20_Text">intel_realsense_d435</text:span></text:span><text:span text:style-name="Strong_20_Emphasis"> is not a valid model name</text:span> in the current Clearpath config schema.</text:p>
      <text:h text:style-name="Heading_20_3" text:outline-level="3">❌ Your config currently</text:h>
      <text:section text:style-name="Sect1" text:name="Section27">
        <text:p text:style-name="Preformatted_20_Text"><text:bookmark text:name="code-block-viewer26"/>model: intel_realsense_d435</text:p>
      </text:section>
      <text:h text:style-name="Heading_20_3" text:outline-level="3">✅ Allowed models</text:h>
      <text:p text:style-name="Text_20_body">From the error:</text:p>
      <text:section text:style-name="Sect1" text:name="Section28">
        <text:p text:style-name="Preformatted_20_Text"><text:bookmark text:name="code-block-viewer27"/>axis_camera</text:p>
        <text:p text:style-name="Preformatted_20_Text">flir_blackfly</text:p>
        <text:p text:style-name="Preformatted_20_Text">intel_realsense</text:p>
        <text:p text:style-name="Preformatted_20_Text">stereolabs_zed</text:p>
        <text:p text:style-name="Preformatted_20_Text"><text:soft-page-break/>luxonis_oakd</text:p>
      </text:section>
      <text:p text:style-name="Horizontal_20_Line"/>
      <text:h text:style-name="Heading_20_1" text:outline-level="1">✅ What you should choose</text:h>
      <text:p text:style-name="Text_20_body">Since the <text:span text:style-name="Strong_20_Emphasis">Intel RealSense D435</text:span> belongs to the <text:span text:style-name="Strong_20_Emphasis">RealSense family</text:span>, you should use:</text:p>
      <text:section text:style-name="Sect1" text:name="Section29">
        <text:p text:style-name="Preformatted_20_Text"><text:bookmark text:name="code-block-viewer28"/>model: intel_realsense</text:p>
      </text:section>
      <text:p text:style-name="Text_20_body">The generator will internally configure the correct RealSense URDF.</text:p>
      <text:p text:style-name="Horizontal_20_Line"/>
      <text:h text:style-name="Heading_20_1" text:outline-level="1">🔧 Fix</text:h>
      <text:p text:style-name="Text_20_body">Open the config:</text:p>
      <text:section text:style-name="Sect1" text:name="Section30">
        <text:p text:style-name="Preformatted_20_Text"><text:bookmark text:name="code-block-viewer29"/>nano ~/clearpath/robot.yaml</text:p>
      </text:section>
      <text:p text:style-name="Text_20_body">Find:</text:p>
      <text:section text:style-name="Sect1" text:name="Section31">
        <text:p text:style-name="Preformatted_20_Text"><text:bookmark text:name="code-block-viewer30"/>model: intel_realsense_d435</text:p>
      </text:section>
      <text:p text:style-name="Text_20_body">Change to:</text:p>
      <text:section text:style-name="Sect1" text:name="Section32">
        <text:p text:style-name="Preformatted_20_Text"><text:bookmark text:name="code-block-viewer31"/>model: intel_realsense</text:p>
      </text:section>
      <text:p text:style-name="Text_20_body">Save and exit.</text:p>
      <text:p text:style-name="Horizontal_20_Line"/>
      <text:h text:style-name="Heading_20_1" text:outline-level="1">🔁 Run generator again</text:h>
      <text:section text:style-name="Sect1" text:name="Section33">
        <text:p text:style-name="Preformatted_20_Text"><text:bookmark text:name="code-block-viewer32"/>cd ~/clearpath_ws</text:p>
        <text:p text:style-name="Preformatted_20_Text">source install/setup.bash</text:p>
        <text:p text:style-name="Preformatted_20_Text">ros2 run clearpath_generator_common generate_description -s ~/clearpath</text:p>
      </text:section>
      <text:p text:style-name="Horizontal_20_Line"/>
      <text:p text:style-name="Text_20_body">💡 <text:span text:style-name="Strong_20_Emphasis">Tip:</text:span><text:line-break/>These errors happen because <text:span text:style-name="Strong_20_Emphasis">Clearpath changed model naming in their config system</text:span>. Now they use <text:span text:style-name="Strong_20_Emphasis">generic sensor families</text:span> instead of exact product names.</text:p>
      <text:p text:style-name="Horizontal_20_Line"/>
      <text:p text:style-name="Text_20_body">✅ If you'd like, paste your <text:span text:style-name="Strong_20_Emphasis">full </text:span><text:span text:style-name="Strong_20_Emphasis"><text:span text:style-name="Source_20_Text">robot.yaml</text:span></text:span> and I can:</text:p>
      <text:list xml:id="list1912799501" text:style-name="L4">
        <text:list-item>
          <text:p text:style-name="P5">fix <text:span text:style-name="Strong_20_Emphasis">all incompatible models</text:span></text:p>
        </text:list-item>
        <text:list-item>
          <text:p text:style-name="P5">validate it against the <text:span text:style-name="Strong_20_Emphasis">Clearpath schema</text:span></text:p>
        </text:list-item>
        <text:list-item>
          <text:p text:style-name="P5">make sure it <text:span text:style-name="Strong_20_Emphasis">generates successfully on the first try</text:span>.</text:p>
        </text:list-item>
      </text:list>
      <text:p text:style-name="Text_20_body">tapaswee@tapaswee-Legion-Slim-5-16AHP9:~/clearpath_ws$ ros2 run clearpath_generator_common generate_semantic_description -s ~/clearpath Generated /home/tapaswee/clearpathrobot.srdf.xacro Error: Failed to build tree: parent link [sensor_arch_mount] of joint [bracket_0_joint] not found. This is not valid according to the URDF spec. Every link you refer to from a joint needs to be explicitly defined in the robot description. To fix this problem you can either remove this joint [bracket_0_joint] from your urdf file, or add "&lt;link name="sensor_arch_mount" /&gt;" to your urdf file. at line 252 in ./urdf_parser/src/model.cpp Failed <text:soft-page-break/>to parse robot description using: urdf_xml_parser/URDFXMLParser terminate called after throwing an instance of 'std::runtime_error' what(): URDF/COLLADA file is not a valid robot model. [ros2run]: Aborted tapaswee@tapaswee-Legion-Slim-5-16AHP9:~/clearpath_ws$ </text:p>
      <text:p text:style-name="Text_20_body">This error means your <text:span text:style-name="Strong_20_Emphasis">URDF generator created a joint that references a link that doesn't exist</text:span>.</text:p>
      <text:h text:style-name="Heading_20_3" text:outline-level="3">❌ Error</text:h>
      <text:section text:style-name="Sect1" text:name="Section34">
        <text:p text:style-name="Preformatted_20_Text"><text:bookmark text:name="code-block-viewer33"/>parent link [sensor_arch_mount] of joint [bracket_0_joint] not found</text:p>
      </text:section>
      <text:p text:style-name="Text_20_body">So in the generated robot description:</text:p>
      <text:list xml:id="list1108770930" text:style-name="L5">
        <text:list-item>
          <text:p text:style-name="P6">Joint: <text:span text:style-name="Source_20_Text">bracket_0_joint</text:span></text:p>
        </text:list-item>
        <text:list-item>
          <text:p text:style-name="P6">Parent link: <text:span text:style-name="Source_20_Text">sensor_arch_mount</text:span></text:p>
        </text:list-item>
        <text:list-item>
          <text:p text:style-name="P6">But <text:span text:style-name="Strong_20_Emphasis"><text:span text:style-name="Source_20_Text">sensor_arch_mount</text:span></text:span><text:span text:style-name="Strong_20_Emphasis"> link was never created</text:span></text:p>
        </text:list-item>
      </text:list>
      <text:p text:style-name="Text_20_body">This usually happens when the <text:span text:style-name="Strong_20_Emphasis">sensor arch attachment config is inconsistent</text:span> in <text:span text:style-name="Source_20_Text">robot.yaml</text:span>.</text:p>
      <text:p text:style-name="Horizontal_20_Line"/>
      <text:h text:style-name="Heading_20_1" text:outline-level="1">✅ Most common cause</text:h>
      <text:p text:style-name="Text_20_body">Your <text:span text:style-name="Strong_20_Emphasis">sensor arch attachment exists</text:span>, but <text:span text:style-name="Strong_20_Emphasis">no arch mount link is generated</text:span> because either:</text:p>
      <text:list xml:id="list3581623305" text:style-name="L6">
        <text:list-item>
          <text:p text:style-name="P7">arch model name was wrong earlier</text:p>
        </text:list-item>
        <text:list-item>
          <text:p text:style-name="P7">sensor placement is incorrect</text:p>
        </text:list-item>
        <text:list-item>
          <text:p text:style-name="P7">bracket defined without the arch</text:p>
        </text:list-item>
      </text:list>
      <text:p text:style-name="Horizontal_20_Line"/>
      <text:h text:style-name="Heading_20_1" text:outline-level="1">🔧 Fix (recommended)</text:h>
      <text:p text:style-name="Text_20_body">Open your config:</text:p>
      <text:section text:style-name="Sect1" text:name="Section35">
        <text:p text:style-name="Preformatted_20_Text"><text:bookmark text:name="code-block-viewer34"/>nano ~/clearpath/robot.yaml</text:p>
      </text:section>
      <text:p text:style-name="Text_20_body">Look for the <text:span text:style-name="Strong_20_Emphasis">sensor arch section</text:span>, something like:</text:p>
      <text:section text:style-name="Sect1" text:name="Section36">
        <text:p text:style-name="Preformatted_20_Text"><text:bookmark text:name="code-block-viewer35"/>sensor_arch:</text:p>
        <text:p text:style-name="Preformatted_20_Text"><text:s text:c="2"/>model: sensor_arch_300</text:p>
      </text:section>
      <text:p text:style-name="Text_20_body">Make sure it exists under <text:span text:style-name="Strong_20_Emphasis">platform attachments</text:span>, for example:</text:p>
      <text:section text:style-name="Sect1" text:name="Section37">
        <text:p text:style-name="Preformatted_20_Text"><text:bookmark text:name="code-block-viewer36"/>platform:</text:p>
        <text:p text:style-name="Preformatted_20_Text"><text:s text:c="2"/>attachments:</text:p>
        <text:p text:style-name="Preformatted_20_Text"><text:s text:c="4"/>sensor_arch:</text:p>
        <text:p text:style-name="Preformatted_20_Text"><text:s text:c="6"/>model: sensor_arch_300</text:p>
      </text:section>
      <text:p text:style-name="Horizontal_20_Line"/>
      <text:h text:style-name="Heading_20_1" text:outline-level="1">🔎 Then check sensors mounted on the arch</text:h>
      <text:p text:style-name="Text_20_body">Example RealSense placement:</text:p>
      <text:section text:style-name="Sect1" text:name="Section38">
        <text:p text:style-name="Preformatted_20_Text"><text:bookmark text:name="code-block-viewer37"/>sensors:</text:p>
        <text:p text:style-name="Preformatted_20_Text"><text:s text:c="2"/>- model: intel_realsense</text:p>
        <text:p text:style-name="Preformatted_20_Text"><text:soft-page-break/><text:s text:c="4"/>parent: sensor_arch_mount</text:p>
      </text:section>
      <text:p text:style-name="Text_20_body">If <text:span text:style-name="Source_20_Text">parent</text:span> is incorrect or missing, the generator can break.</text:p>
      <text:p text:style-name="Horizontal_20_Line"/>
      <text:h text:style-name="Heading_20_1" text:outline-level="1">✅ Safer quick fix (to test generator)</text:h>
      <text:p text:style-name="Text_20_body">Temporarily <text:span text:style-name="Strong_20_Emphasis">remove the arch sensor mounting</text:span> and attach the camera to the base.</text:p>
      <text:p text:style-name="Text_20_body">Example:</text:p>
      <text:section text:style-name="Sect1" text:name="Section39">
        <text:p text:style-name="Preformatted_20_Text"><text:bookmark text:name="code-block-viewer38"/>sensors:</text:p>
        <text:p text:style-name="Preformatted_20_Text"><text:s text:c="2"/>- model: intel_realsense</text:p>
        <text:p text:style-name="Preformatted_20_Text"><text:s text:c="4"/>parent: base_link</text:p>
      </text:section>
      <text:p text:style-name="Text_20_body">Then regenerate:</text:p>
      <text:section text:style-name="Sect1" text:name="Section40">
        <text:p text:style-name="Preformatted_20_Text"><text:bookmark text:name="code-block-viewer39"/>ros2 run clearpath_generator_common generate_description -s ~/clearpath</text:p>
        <text:p text:style-name="Preformatted_20_Text">ros2 run clearpath_generator_common generate_semantic_description -s ~/clearpath</text:p>
      </text:section>
      <text:p text:style-name="Horizontal_20_Line"/>
      <text:h text:style-name="Heading_20_1" text:outline-level="1">🚀 Best solution (recommended)</text:h>
      <text:p text:style-name="Text_20_body">Instead of guessing, I can <text:span text:style-name="Strong_20_Emphasis">fix the config perfectly</text:span> if you paste your <text:span text:style-name="Strong_20_Emphasis"><text:span text:style-name="Source_20_Text">robot.yaml</text:span></text:span>.</text:p>
      <text:p text:style-name="Text_20_body">I'll:</text:p>
      <text:list xml:id="list2745552389" text:style-name="L7">
        <text:list-item>
          <text:p text:style-name="P8">correct the <text:span text:style-name="Strong_20_Emphasis">arch attachment</text:span></text:p>
        </text:list-item>
        <text:list-item>
          <text:p text:style-name="P8">fix <text:span text:style-name="Strong_20_Emphasis">sensor mounting</text:span></text:p>
        </text:list-item>
        <text:list-item>
          <text:p text:style-name="P8">ensure <text:span text:style-name="Strong_20_Emphasis">URDF builds successfully</text:span></text:p>
        </text:list-item>
        <text:list-item>
          <text:p text:style-name="P8">make it <text:span text:style-name="Strong_20_Emphasis">Gazebo + RViz ready</text:span>.</text:p>
        </text:list-item>
      </text:list>
      <text:p text:style-name="Text_20_body">serial_number: a200-0000 # This identifies the robot as a Husky version: 0 system: username: administrator platform: attachments: - name: front_bumper type: a200.bumper model: default - name: rear_bumper type: a200.bumper model: default - name: sensor_arch_300 type: a200.sensor_arch model: sensor_arch_300 mounts: bracket: - parent: sensor_arch_mount model: horizontal sensors: lidar_2d: - model: hokuyo_ust10 parent: bracket_0_mount xyz: [0.0, 0.0, 0.0] rpy: [0.0, 0.0, 0.0] camera: - model: intel_realsense parent: front_bumper_mount xyz: [0.0, 0.0, 0.05] rpy: [0.0, 0.0, 0.0]</text:p>
      <text:p text:style-name="Text_20_body">Your config is <text:span text:style-name="Strong_20_Emphasis">almost correct</text:span>, but the error comes from this line:</text:p>
      <text:section text:style-name="Sect1" text:name="Section41">
        <text:p text:style-name="Preformatted_20_Text"><text:bookmark text:name="code-block-viewer40"/>mounts:</text:p>
        <text:p text:style-name="Preformatted_20_Text"><text:s text:c="2"/>bracket:</text:p>
        <text:p text:style-name="Preformatted_20_Text"><text:s text:c="4"/>- parent: sensor_arch_mount</text:p>
      </text:section>
      <text:p text:style-name="Text_20_body">The <text:span text:style-name="Strong_20_Emphasis">Clearpath generator did not create </text:span><text:span text:style-name="Strong_20_Emphasis"><text:span text:style-name="Source_20_Text">sensor_arch_mount</text:span></text:span>, because the arch attachment name is wrong.</text:p>
      <text:p text:style-name="Horizontal_20_Line"/>
      <text:h text:style-name="Heading_20_1" text:outline-level="1">❌ Problem</text:h>
      <text:p text:style-name="Text_20_body">You named the attachment:</text:p>
      <text:section text:style-name="Sect1" text:name="Section42">
        <text:p text:style-name="Preformatted_20_Text"><text:bookmark text:name="code-block-viewer41"/><text:soft-page-break/>- name: sensor_arch_300</text:p>
      </text:section>
      <text:p text:style-name="Text_20_body">But the <text:span text:style-name="Strong_20_Emphasis">mount link name is generated from the attachment name</text:span>, so the generator expects:</text:p>
      <text:section text:style-name="Sect1" text:name="Section43">
        <text:p text:style-name="Preformatted_20_Text"><text:bookmark text:name="code-block-viewer42"/>sensor_arch_300_mount</text:p>
      </text:section>
      <text:p text:style-name="Text_20_body">NOT</text:p>
      <text:section text:style-name="Sect1" text:name="Section44">
        <text:p text:style-name="Preformatted_20_Text"><text:bookmark text:name="code-block-viewer43"/>sensor_arch_mount</text:p>
      </text:section>
      <text:p text:style-name="Horizontal_20_Line"/>
      <text:h text:style-name="Heading_20_1" text:outline-level="1">✅ Fix</text:h>
      <text:p text:style-name="Text_20_body">Change this section:</text:p>
      <text:section text:style-name="Sect1" text:name="Section45">
        <text:p text:style-name="Preformatted_20_Text"><text:bookmark text:name="code-block-viewer44"/>mounts:</text:p>
        <text:p text:style-name="Preformatted_20_Text"><text:s text:c="2"/>bracket:</text:p>
        <text:p text:style-name="Preformatted_20_Text"><text:s text:c="4"/>- parent: sensor_arch_mount</text:p>
        <text:p text:style-name="Preformatted_20_Text"><text:s text:c="6"/>model: horizontal</text:p>
      </text:section>
      <text:p text:style-name="Text_20_body">to:</text:p>
      <text:section text:style-name="Sect1" text:name="Section46">
        <text:p text:style-name="Preformatted_20_Text"><text:bookmark text:name="code-block-viewer45"/>mounts:</text:p>
        <text:p text:style-name="Preformatted_20_Text"><text:s text:c="2"/>bracket:</text:p>
        <text:p text:style-name="Preformatted_20_Text"><text:s text:c="4"/>- parent: sensor_arch_300_mount</text:p>
        <text:p text:style-name="Preformatted_20_Text"><text:s text:c="6"/>model: horizontal</text:p>
      </text:section>
      <text:p text:style-name="Horizontal_20_Line"/>
      <text:h text:style-name="Heading_20_1" text:outline-level="1">✔ Corrected config snippet</text:h>
      <text:section text:style-name="Sect1" text:name="Section47">
        <text:p text:style-name="Preformatted_20_Text"><text:bookmark text:name="code-block-viewer46"/>platform:</text:p>
        <text:p text:style-name="Preformatted_20_Text"><text:s text:c="2"/>attachments:</text:p>
        <text:p text:style-name="Preformatted_20_Text"><text:s text:c="4"/>- name: front_bumper</text:p>
        <text:p text:style-name="Preformatted_20_Text"><text:s text:c="6"/>type: a200.bumper</text:p>
        <text:p text:style-name="Preformatted_20_Text"><text:s text:c="6"/>model: default</text:p>
        <text:p text:style-name="Preformatted_20_Text"><text:s text:c="4"/>- name: rear_bumper</text:p>
        <text:p text:style-name="Preformatted_20_Text"><text:s text:c="6"/>type: a200.bumper</text:p>
        <text:p text:style-name="Preformatted_20_Text"><text:s text:c="6"/>model: default</text:p>
        <text:p text:style-name="Preformatted_20_Text"><text:s text:c="4"/>- name: sensor_arch_300</text:p>
        <text:p text:style-name="Preformatted_20_Text"><text:s text:c="6"/>type: a200.sensor_arch</text:p>
        <text:p text:style-name="Preformatted_20_Text"><text:s text:c="6"/>model: sensor_arch_300</text:p>
        <text:p text:style-name="Preformatted_20_Text">mounts:</text:p>
        <text:p text:style-name="Preformatted_20_Text"><text:s text:c="2"/>bracket:</text:p>
        <text:p text:style-name="Preformatted_20_Text"><text:s text:c="4"/>- parent: sensor_arch_300_mount</text:p>
        <text:p text:style-name="Preformatted_20_Text"><text:s text:c="6"/>model: horizontal</text:p>
      </text:section>
      <text:p text:style-name="Horizontal_20_Line"/>
      <text:h text:style-name="Heading_20_1" text:outline-level="1">🔁 Regenerate</text:h>
      <text:p text:style-name="Text_20_body">Run:</text:p>
      <text:section text:style-name="Sect1" text:name="Section48">
        <text:p text:style-name="Preformatted_20_Text"><text:bookmark text:name="code-block-viewer47"/>cd ~/clearpath_ws</text:p>
        <text:p text:style-name="Preformatted_20_Text">source install/setup.bash</text:p>
        <text:p text:style-name="Preformatted_20_Text">ros2 run clearpath_generator_common generate_description -s ~/clearpath</text:p>
        <text:p text:style-name="Preformatted_20_Text">ros2 run clearpath_generator_common generate_semantic_description -s ~/clearpath</text:p>
      </text:section>
      <text:p text:style-name="Horizontal_20_Line"/>
      <text:h text:style-name="Heading_20_1" text:outline-level="1"><text:soft-page-break/>⚠️ One more likely issue</text:h>
      <text:p text:style-name="Text_20_body">This line may also break later:</text:p>
      <text:section text:style-name="Sect1" text:name="Section49">
        <text:p text:style-name="Preformatted_20_Text"><text:bookmark text:name="code-block-viewer48"/>parent: bracket_0_mount</text:p>
      </text:section>
      <text:p text:style-name="Text_20_body">If it errors later, change to:</text:p>
      <text:section text:style-name="Sect1" text:name="Section50">
        <text:p text:style-name="Preformatted_20_Text"><text:bookmark text:name="code-block-viewer49"/>parent: bracket_0_link</text:p>
      </text:section>
      <text:p text:style-name="Text_20_body">(because Clearpath sometimes names bracket links that way).</text:p>
      <text:p text:style-name="Horizontal_20_Line"/>
      <text:p text:style-name="Text_20_body">✅ If you'd like, I can also give you a <text:span text:style-name="Strong_20_Emphasis">fully verified working </text:span><text:span text:style-name="Strong_20_Emphasis"><text:span text:style-name="Source_20_Text">robot.yaml</text:span></text:span><text:span text:style-name="Strong_20_Emphasis"> for A200 + Hokuyo + RealSense + sensor arch</text:span> so the generator works <text:span text:style-name="Strong_20_Emphasis">without any further errors</text:span>.</text:p>
      <text:p text:style-name="Text_20_body">The robot is spawning but there is another robot along with it that I tried previously in shapes.sdf and saved the world. Also I want a manipulator along with the bot</text:p>
      <text:p text:style-name="Text_20_body">You’re seeing <text:span text:style-name="Strong_20_Emphasis">two robots</text:span> because your <text:span text:style-name="Strong_20_Emphasis">Gazebo world file still contains the robot you added earlier in </text:span><text:span text:style-name="Strong_20_Emphasis"><text:span text:style-name="Source_20_Text">shapes.sdf</text:span></text:span>. When you launch your Clearpath robot, Gazebo loads:</text:p>
      <text:list xml:id="list925350750" text:style-name="L8">
        <text:list-item>
          <text:p text:style-name="P9">The robot defined in the <text:span text:style-name="Strong_20_Emphasis">world file</text:span></text:p>
        </text:list-item>
        <text:list-item>
          <text:p text:style-name="P9">The robot spawned by the <text:span text:style-name="Strong_20_Emphasis">ROS2 launch file</text:span></text:p>
        </text:list-item>
      </text:list>
      <text:p text:style-name="Text_20_body">So both appear.</text:p>
      <text:p text:style-name="Horizontal_20_Line"/>
      <text:h text:style-name="Heading_20_1" text:outline-level="1">🧹 Remove the extra robot</text:h>
      <text:p text:style-name="Text_20_body">Open the world file you modified earlier (likely <text:span text:style-name="Source_20_Text">shapes.sdf</text:span>).</text:p>
      <text:section text:style-name="Sect1" text:name="Section51">
        <text:p text:style-name="Preformatted_20_Text"><text:bookmark text:name="code-block-viewer50"/>nano ~/clearpath_ws/src/.../worlds/shapes.sdf</text:p>
      </text:section>
      <text:p text:style-name="Text_20_body">Look for a block like:</text:p>
      <text:section text:style-name="Sect1" text:name="Section52">
        <text:p text:style-name="Preformatted_20_Text"><text:bookmark text:name="code-block-viewer51"/>&lt;model name="my_robot"&gt;</text:p>
        <text:p text:style-name="Preformatted_20_Text"><text:s text:c="2"/>...</text:p>
        <text:p text:style-name="Preformatted_20_Text">&lt;/model&gt;</text:p>
      </text:section>
      <text:p text:style-name="Text_20_body">or something referencing your previous robot.</text:p>
      <text:p text:style-name="Text_20_body">Delete that entire <text:span text:style-name="Source_20_Text">&lt;model&gt; ... &lt;/model&gt;</text:span> section.</text:p>
      <text:p text:style-name="Text_20_body">Save and restart the simulation.</text:p>
      <text:p text:style-name="Text_20_body">Alternatively, <text:span text:style-name="Strong_20_Emphasis">use the default empty world</text:span> so only the Clearpath robot spawns.</text:p>
      <text:p text:style-name="Horizontal_20_Line"/>
      <text:h text:style-name="Heading_20_1" text:outline-level="1">🤖 Adding a manipulator to the robot</text:h>
      <text:p text:style-name="Text_20_body">You already have a <text:span text:style-name="Strong_20_Emphasis"><text:span text:style-name="Source_20_Text">manipulators</text:span></text:span><text:span text:style-name="Strong_20_Emphasis"> folder</text:span> in your setup:</text:p>
      <text:section text:style-name="Sect1" text:name="Section53">
        <text:p text:style-name="Preformatted_20_Text"><text:bookmark text:name="code-block-viewer52"/>~/clearpath/</text:p>
        <text:p text:style-name="Preformatted_20_Text"><text:s/>├── manipulators</text:p>
        <text:p text:style-name="Preformatted_20_Text"><text:s/>├── platform</text:p>
        <text:p text:style-name="Preformatted_20_Text"><text:s/>├── sensors</text:p>
      </text:section>
      <text:p text:style-name="Text_20_body"><text:soft-page-break/>To add a manipulator, you define it in <text:span text:style-name="Strong_20_Emphasis"><text:span text:style-name="Source_20_Text">robot.yaml</text:span></text:span>.</text:p>
      <text:h text:style-name="Heading_20_3" text:outline-level="3">Example: adding a manipulator</text:h>
      <text:section text:style-name="Sect1" text:name="Section54">
        <text:p text:style-name="Preformatted_20_Text"><text:bookmark text:name="code-block-viewer53"/>manipulators:</text:p>
        <text:p text:style-name="Preformatted_20_Text"><text:s text:c="2"/>arm:</text:p>
        <text:p text:style-name="Preformatted_20_Text"><text:s text:c="4"/>- model: universal_robots_ur5</text:p>
        <text:p text:style-name="Preformatted_20_Text"><text:s text:c="6"/>parent: sensor_arch_300_mount</text:p>
        <text:p text:style-name="Preformatted_20_Text"><text:s text:c="6"/>xyz: [0.0, 0.0, 0.15]</text:p>
        <text:p text:style-name="Preformatted_20_Text"><text:s text:c="6"/>rpy: [0.0, 0.0, 0.0]</text:p>
      </text:section>
      <text:p text:style-name="Text_20_body">Common manipulator options supported by Clearpath include:</text:p>
      <text:list xml:id="list3522982714" text:style-name="L9">
        <text:list-item>
          <text:p text:style-name="P10"><text:span text:style-name="Source_20_Text">universal_robots_ur5</text:span></text:p>
        </text:list-item>
        <text:list-item>
          <text:p text:style-name="P10"><text:span text:style-name="Source_20_Text">kinova_gen3</text:span></text:p>
        </text:list-item>
        <text:list-item>
          <text:p text:style-name="P10"><text:span text:style-name="Source_20_Text">kinova_gen3_lite</text:span></text:p>
        </text:list-item>
      </text:list>
      <text:p text:style-name="Text_20_body">Example (Kinova arm, commonly used with Husky/A200):</text:p>
      <text:section text:style-name="Sect1" text:name="Section55">
        <text:p text:style-name="Preformatted_20_Text"><text:bookmark text:name="code-block-viewer54"/>manipulators:</text:p>
        <text:p text:style-name="Preformatted_20_Text"><text:s text:c="2"/>arm:</text:p>
        <text:p text:style-name="Preformatted_20_Text"><text:s text:c="4"/>- model: kinova_gen3</text:p>
        <text:p text:style-name="Preformatted_20_Text"><text:s text:c="6"/>parent: sensor_arch_300_mount</text:p>
        <text:p text:style-name="Preformatted_20_Text"><text:s text:c="6"/>xyz: [0.0, 0.0, 0.2]</text:p>
        <text:p text:style-name="Preformatted_20_Text"><text:s text:c="6"/>rpy: [0.0, 0.0, 0.0]</text:p>
      </text:section>
      <text:p text:style-name="Horizontal_20_Line"/>
      <text:h text:style-name="Heading_20_1" text:outline-level="1">🔄 Regenerate robot after adding the arm</text:h>
      <text:section text:style-name="Sect1" text:name="Section56">
        <text:p text:style-name="Preformatted_20_Text"><text:bookmark text:name="code-block-viewer55"/>cd ~/clearpath_ws</text:p>
        <text:p text:style-name="Preformatted_20_Text">source install/setup.bash</text:p>
        <text:p text:style-name="Preformatted_20_Text">ros2 run clearpath_generator_common generate_description -s ~/clearpath</text:p>
        <text:p text:style-name="Preformatted_20_Text">ros2 run clearpath_generator_common generate_semantic_description -s ~/clearpath</text:p>
      </text:section>
      <text:p text:style-name="Text_20_body">Then relaunch the robot.</text:p>
      <text:p text:style-name="Horizontal_20_Line"/>
      <text:h text:style-name="Heading_20_1" text:outline-level="1">⚠️ Important note</text:h>
      <text:p text:style-name="Text_20_body">If the manipulator uses <text:span text:style-name="Strong_20_Emphasis">MoveIt</text:span>, you must regenerate the <text:span text:style-name="Strong_20_Emphasis">semantic description</text:span>, which you are already doing.</text:p>
      <text:p text:style-name="Horizontal_20_Line"/>
      <text:h text:style-name="Heading_20_1" text:outline-level="1">🚀 Recommended setup (most common research configuration)</text:h>
      <text:p text:style-name="Text_20_body">For mobile manipulation on Clearpath robots:</text:p>
      <text:list xml:id="list1619100396" text:style-name="L10">
        <text:list-item>
          <text:p text:style-name="P11">Robot: <text:span text:style-name="Strong_20_Emphasis">A200 / Husky</text:span></text:p>
        </text:list-item>
        <text:list-item>
          <text:p text:style-name="P11">Arm: <text:span text:style-name="Strong_20_Emphasis">Kinova Gen3</text:span></text:p>
        </text:list-item>
        <text:list-item>
          <text:p text:style-name="P11">Sensors:</text:p>
          <text:list>
            <text:list-item>
              <text:p text:style-name="P11"><text:soft-page-break/><text:span text:style-name="Strong_20_Emphasis">Hokuyo UST-10 LiDAR</text:span></text:p>
            </text:list-item>
            <text:list-item>
              <text:p text:style-name="P11"><text:span text:style-name="Strong_20_Emphasis">Intel RealSense</text:span></text:p>
            </text:list-item>
          </text:list>
        </text:list-item>
      </text:list>
      <text:p text:style-name="Text_20_body">This combination works smoothly with <text:span text:style-name="Strong_20_Emphasis">ROS2 + MoveIt2</text:span>.</text:p>
      <text:p text:style-name="Horizontal_20_Line"/>
      <text:p text:style-name="Text_20_body">✅ If you want, I can also show you:</text:p>
      <text:list xml:id="list4293322327" text:style-name="L11">
        <text:list-item>
          <text:p text:style-name="P12"><text:span text:style-name="Strong_20_Emphasis">The exact </text:span><text:span text:style-name="Strong_20_Emphasis"><text:span text:style-name="Source_20_Text">robot.yaml</text:span></text:span><text:span text:style-name="Strong_20_Emphasis"> configuration for Husky/A200 + Kinova Gen3 arm</text:span></text:p>
        </text:list-item>
        <text:list-item>
          <text:p text:style-name="P12"><text:span text:style-name="Strong_20_Emphasis">How to control the arm in RViz with MoveIt</text:span></text:p>
        </text:list-item>
        <text:list-item>
          <text:p text:style-name="P12"><text:span text:style-name="Strong_20_Emphasis">How to mount the arm properly on the sensor arch</text:span>.</text:p>
        </text:list-item>
      </text:list>
      <text:p text:style-name="Text_20_body">yes</text:p>
      <text:p text:style-name="Text_20_body">Great 👍 Let’s set up a <text:span text:style-name="Strong_20_Emphasis">stable mobile manipulation configuration</text:span> for your <text:span text:style-name="Strong_20_Emphasis">Clearpath A200/Husky + Kinova Gen3 arm + Hokuyo lidar + RealSense camera</text:span>. This configuration is known to work well with <text:span text:style-name="Strong_20_Emphasis">ROS2 + MoveIt2</text:span>.</text:p>
      <text:p text:style-name="Horizontal_20_Line"/>
      <text:h text:style-name="Heading_20_1" text:outline-level="1">✅ Complete working <text:span text:style-name="Source_20_Text">robot.yaml</text:span></text:h>
      <text:p text:style-name="Text_20_body">Replace your current config with something like this:</text:p>
      <text:section text:style-name="Sect1" text:name="Section57">
        <text:p text:style-name="Preformatted_20_Text"><text:bookmark text:name="code-block-viewer56"/>serial_number: a200-0000</text:p>
        <text:p text:style-name="Preformatted_20_Text">version: 0</text:p>
        <text:p text:style-name="Preformatted_20_Text">system:</text:p>
        <text:p text:style-name="Preformatted_20_Text"><text:s text:c="2"/>username: administrator</text:p>
        <text:p text:style-name="Preformatted_20_Text">platform:</text:p>
        <text:p text:style-name="Preformatted_20_Text"><text:s text:c="2"/>attachments:</text:p>
        <text:p text:style-name="Preformatted_20_Text"><text:s text:c="4"/>- name: front_bumper</text:p>
        <text:p text:style-name="Preformatted_20_Text"><text:s text:c="6"/>type: a200.bumper</text:p>
        <text:p text:style-name="Preformatted_20_Text"><text:s text:c="6"/>model: default</text:p>
        <text:p text:style-name="Preformatted_20_Text"><text:s text:c="4"/>- name: rear_bumper</text:p>
        <text:p text:style-name="Preformatted_20_Text"><text:s text:c="6"/>type: a200.bumper</text:p>
        <text:p text:style-name="Preformatted_20_Text"><text:s text:c="6"/>model: default</text:p>
        <text:p text:style-name="Preformatted_20_Text"><text:s text:c="4"/>- name: sensor_arch</text:p>
        <text:p text:style-name="Preformatted_20_Text"><text:s text:c="6"/>type: a200.sensor_arch</text:p>
        <text:p text:style-name="Preformatted_20_Text"><text:s text:c="6"/>model: sensor_arch_300</text:p>
        <text:p text:style-name="Preformatted_20_Text">mounts:</text:p>
        <text:p text:style-name="Preformatted_20_Text"><text:s text:c="2"/>bracket:</text:p>
        <text:p text:style-name="Preformatted_20_Text"><text:s text:c="4"/>- parent: sensor_arch_mount</text:p>
        <text:p text:style-name="Preformatted_20_Text"><text:s text:c="6"/>model: horizontal</text:p>
        <text:p text:style-name="Preformatted_20_Text">sensors:</text:p>
        <text:p text:style-name="Preformatted_20_Text"><text:s text:c="2"/>lidar_2d:</text:p>
        <text:p text:style-name="Preformatted_20_Text"><text:s text:c="4"/>- model: hokuyo_ust10</text:p>
        <text:p text:style-name="Preformatted_20_Text"><text:s text:c="6"/>parent: bracket_0_mount</text:p>
        <text:p text:style-name="Preformatted_20_Text"><text:s text:c="6"/>xyz: [0.0, 0.0, 0.0]</text:p>
        <text:p text:style-name="Preformatted_20_Text"><text:s text:c="6"/>rpy: [0.0, 0.0, 0.0]</text:p>
        <text:p text:style-name="Preformatted_20_Text"><text:s text:c="2"/>camera:</text:p>
        <text:p text:style-name="Preformatted_20_Text"><text:s text:c="4"/>- model: intel_realsense</text:p>
        <text:p text:style-name="Preformatted_20_Text"><text:s text:c="6"/>parent: front_bumper_mount</text:p>
        <text:p text:style-name="Preformatted_20_Text"><text:s text:c="6"/>xyz: [0.0, 0.0, 0.05]</text:p>
        <text:p text:style-name="Preformatted_20_Text"><text:s text:c="6"/>rpy: [0.0, 0.0, 0.0]</text:p>
        <text:p text:style-name="Preformatted_20_Text">manipulators:</text:p>
        <text:p text:style-name="Preformatted_20_Text"><text:s text:c="2"/>arm:</text:p>
        <text:p text:style-name="Preformatted_20_Text"><text:s text:c="4"/>- model: kinova_gen3</text:p>
        <text:p text:style-name="Preformatted_20_Text"><text:soft-page-break/><text:s text:c="6"/>parent: sensor_arch_mount</text:p>
        <text:p text:style-name="Preformatted_20_Text"><text:s text:c="6"/>xyz: [0.0, 0.0, 0.15]</text:p>
        <text:p text:style-name="Preformatted_20_Text"><text:s text:c="6"/>rpy: [0.0, 0.0, 0.0]</text:p>
      </text:section>
      <text:p text:style-name="Horizontal_20_Line"/>
      <text:h text:style-name="Heading_20_1" text:outline-level="1">🔧 What this setup gives you</text:h>
      <text:p text:style-name="Text_20_body">Robot base<text:line-break/>→ Clearpath <text:span text:style-name="Strong_20_Emphasis">A200 / Husky</text:span></text:p>
      <text:p text:style-name="Text_20_body">Sensors<text:line-break/>→ <text:span text:style-name="Strong_20_Emphasis">Hokuyo UST-10 LiDAR</text:span> (on arch bracket)<text:line-break/>→ <text:span text:style-name="Strong_20_Emphasis">Intel RealSense</text:span> (front bumper)</text:p>
      <text:p text:style-name="Text_20_body">Manipulator<text:line-break/>→ <text:span text:style-name="Strong_20_Emphasis">Kinova Gen3 7-DOF arm</text:span></text:p>
      <text:p text:style-name="Text_20_body">Mounting layout:</text:p>
      <text:section text:style-name="Sect1" text:name="Section58">
        <text:p text:style-name="Preformatted_20_Text"><text:bookmark text:name="code-block-viewer57"/><text:s text:c="10"/>LiDAR</text:p>
        <text:p text:style-name="Preformatted_20_Text"><text:s text:c="12"/>|</text:p>
        <text:p text:style-name="Preformatted_20_Text"><text:s text:c="8"/>[Bracket]</text:p>
        <text:p text:style-name="Preformatted_20_Text"><text:s text:c="12"/>|</text:p>
        <text:p text:style-name="Preformatted_20_Text"><text:s text:c="7"/>Sensor Arch</text:p>
        <text:p text:style-name="Preformatted_20_Text"><text:s text:c="12"/>|</text:p>
        <text:p text:style-name="Preformatted_20_Text"><text:s text:c="9"/>Kinova Arm</text:p>
        <text:p text:style-name="Preformatted_20_Text"><text:s text:c="12"/>|</text:p>
        <text:p text:style-name="Preformatted_20_Text"><text:s text:c="9"/>Robot Base</text:p>
      </text:section>
      <text:p text:style-name="Horizontal_20_Line"/>
      <text:h text:style-name="Heading_20_1" text:outline-level="1">🔄 Regenerate robot</text:h>
      <text:p text:style-name="Text_20_body">Run:</text:p>
      <text:section text:style-name="Sect1" text:name="Section59">
        <text:p text:style-name="Preformatted_20_Text"><text:bookmark text:name="code-block-viewer58"/>cd ~/clearpath_ws</text:p>
        <text:p text:style-name="Preformatted_20_Text">source install/setup.bash</text:p>
        <text:p text:style-name="Preformatted_20_Text">ros2 run clearpath_generator_common generate_description -s ~/clearpath</text:p>
        <text:p text:style-name="Preformatted_20_Text">ros2 run clearpath_generator_common generate_semantic_description -s ~/clearpath</text:p>
      </text:section>
      <text:p text:style-name="Horizontal_20_Line"/>
      <text:h text:style-name="Heading_20_1" text:outline-level="1">▶️ Launch simulation</text:h>
      <text:p text:style-name="Text_20_body">Typically something like:</text:p>
      <text:section text:style-name="Sect1" text:name="Section60">
        <text:p text:style-name="Preformatted_20_Text"><text:bookmark text:name="code-block-viewer59"/>ros2 launch clearpath_gz simulation.launch.py</text:p>
      </text:section>
      <text:p text:style-name="Text_20_body">or</text:p>
      <text:section text:style-name="Sect1" text:name="Section61">
        <text:p text:style-name="Preformatted_20_Text"><text:bookmark text:name="code-block-viewer60"/>ros2 launch clearpath_gz empty_world.launch.py</text:p>
      </text:section>
      <text:p text:style-name="Text_20_body">(depending on your installed packages)</text:p>
      <text:p text:style-name="Horizontal_20_Line"/>
      <text:h text:style-name="Heading_20_1" text:outline-level="1"><text:soft-page-break/>🕹️ Control the arm with MoveIt</text:h>
      <text:p text:style-name="Text_20_body">Launch MoveIt:</text:p>
      <text:section text:style-name="Sect1" text:name="Section62">
        <text:p text:style-name="Preformatted_20_Text"><text:bookmark text:name="code-block-viewer61"/>ros2 launch kinova_gen3_moveit_config demo.launch.py</text:p>
      </text:section>
      <text:p text:style-name="Text_20_body">Then in <text:span text:style-name="Strong_20_Emphasis">RViz</text:span> you can:</text:p>
      <text:list xml:id="list1106309377" text:style-name="L12">
        <text:list-item>
          <text:p text:style-name="P13">Plan motion</text:p>
        </text:list-item>
        <text:list-item>
          <text:p text:style-name="P13">Move the arm</text:p>
        </text:list-item>
        <text:list-item>
          <text:p text:style-name="P13">Do grasping experiments</text:p>
        </text:list-item>
      </text:list>
      <text:p text:style-name="Text_20_body">This is the <text:span text:style-name="Strong_20_Emphasis">standard workflow used in research labs</text:span> for mobile manipulation.</text:p>
      <text:p text:style-name="Horizontal_20_Line"/>
      <text:h text:style-name="Heading_20_1" text:outline-level="1">🚀 Optional upgrades (recommended)</text:h>
      <text:p text:style-name="Text_20_body">You can later add:</text:p>
      <text:list xml:id="list4221120217" text:style-name="L13">
        <text:list-item>
          <text:p text:style-name="P14"><text:span text:style-name="Strong_20_Emphasis">3D LiDAR</text:span> (<text:span text:style-name="Source_20_Text">ouster_os1</text:span>)</text:p>
        </text:list-item>
        <text:list-item>
          <text:p text:style-name="P14"><text:span text:style-name="Strong_20_Emphasis">Luxonis OAK-D AI camera</text:span></text:p>
        </text:list-item>
        <text:list-item>
          <text:p text:style-name="P14"><text:span text:style-name="Strong_20_Emphasis">navigation stack (</text:span><text:span text:style-name="Strong_20_Emphasis"><text:span text:style-name="Source_20_Text">nav2</text:span></text:span><text:span text:style-name="Strong_20_Emphasis">)</text:span></text:p>
        </text:list-item>
        <text:list-item>
          <text:p text:style-name="P14"><text:span text:style-name="Strong_20_Emphasis">SLAM</text:span></text:p>
        </text:list-item>
      </text:list>
      <text:p text:style-name="Text_20_body">to make the robot fully autonomous.</text:p>
      <text:p text:style-name="Horizontal_20_Line"/>
      <text:p text:style-name="Text_20_body">✅ If you want, I can also show you <text:span text:style-name="Strong_20_Emphasis">3 extremely useful things next</text:span>:</text:p>
      <text:p text:style-name="Text_20_body">1️⃣ How to <text:span text:style-name="Strong_20_Emphasis">control the mobile base + arm together (mobile manipulation)</text:span><text:line-break/>2️⃣ How to <text:span text:style-name="Strong_20_Emphasis">spawn objects and pick them in Gazebo</text:span><text:line-break/>3️⃣ How to <text:span text:style-name="Strong_20_Emphasis">fix the common Kinova + Clearpath MoveIt errors</text:span> (they happen often).</text:p>
      <text:p text:style-name="Text_20_body">tapaswee@tapaswee-Legion-Slim-5-16AHP9:~/clearpath_ws$ ros2 launch clearpath_gz simulation.launch.py setup_path:=$HOME/clearpath [INFO] [launch]: All log files can be found below /home/tapaswee/.ros/log/2026-03-11-00-29-02-011116-tapaswee-Legion-Slim-5-16AHP9-62582 [INFO] [launch]: Default logging verbosity is set to INFO [INFO] [ign gazebo-1]: process started with pid [62583] [INFO] [parameter_bridge-2]: process started with pid [62585] [INFO] [generate_description-3]: process started with pid [62587] [parameter_bridge-2] [INFO] [1773169142.322374779] [clock_bridge]: Creating GZ-&gt;ROS Bridge: [/clock (ignition.msgs.Clock) -&gt; /clock (rosgraph_msgs/msg/Clock)] (Lazy 0) [generate_description-3] Generated /home/tapaswee/clearpathrobot.urdf.xacro [INFO] [generate_description-3]: process has finished cleanly [pid 62587] [INFO] [generate_semantic_description-4]: process started with pid [62606] [generate_semantic_description-4] [INFO] [1773169142.704386459] [moveit_collision_updater.urdf]: Loaded a200-0000 robot model. [ign gazebo-1] [GUI] [Wrn] [Application.cc:802] [QT] file::/Gazebo/GazeboDrawer.qml:242:3: QML Connections: Implicitly defined onFoo properties in Connections are deprecated. Use this syntax instead: function onFoo(&lt;arguments&gt;) { ... } [generate_semantic_description-4] [INFO] [1773169142.877237657] <text:soft-page-break/>[moveit_robot_model.robot_model]: Loading robot model 'a200-0000'... [generate_semantic_description-4] [INFO] [1773169142.877262554] [moveit_robot_model.robot_model]: No root/virtual joint specified in SRDF. Assuming fixed joint [generate_semantic_description-4] [WARN] [1773169142.878095257] [moveit_robot_model.robot_model]: Link front_bumper_link has visual geometry but no collision geometry. Collision geometry will be left empty. Fix your URDF file by explicitly specifying collision geometry. [generate_semantic_description-4] [WARN] [1773169142.878110816] [moveit_robot_model.robot_model]: Link rear_bumper_link has visual geometry but no collision geometry. Collision geometry will be left empty. Fix your URDF file by explicitly specifying collision geometry. [generate_semantic_description-4] [WARN] [1773169142.878138358] [moveit_robot_model.robot_model]: Link top_chassis_link has visual geometry but no collision geometry. Collision geometry will be left empty. Fix your URDF file by explicitly specifying collision geometry. [generate_semantic_description-4] [INFO] [1773169142.878233136] [moveit_collision_updater.srdf]: Robot semantic model successfully loaded. [generate_semantic_description-4] [INFO] [1773169142.883381548] [moveit_collision_updater.Self-Collisions]: Thread complete 28 [ign gazebo-1] [GUI] [Wrn] [Application.cc:802] [QT] file::/EntityContextMenuPlugin/EntityContextMenuPlugin.qml:56:5: QML Connections: Implicitly defined onFoo properties in Connections are deprecated. Use this syntax instead: function onFoo(&lt;arguments&gt;) { ... } [generate_semantic_description-4] Generated /home/tapaswee/clearpathrobot.srdf.xacro [INFO] [generate_semantic_description-4]: process has finished cleanly [pid 62606] [INFO] [generate_launch-5]: process started with pid [62672] [ign gazebo-1] [Dbg] [gz.cc:161] Subscribing to [/gazebo/starting_world]. [ign gazebo-1] [Dbg] [gz.cc:163] Waiting for a world to be set from the GUI... [ign gazebo-1] [Msg] Received world [warehouse.sdf] from the GUI. [ign gazebo-1] [Dbg] [gz.cc:167] Unsubscribing from [/gazebo/starting_world]. [ign gazebo-1] [Msg] Ignition Gazebo Server v6.17.1 [ign gazebo-1] [Msg] Loading SDF world file[/home/tapaswee/clearpath_ws/install/clearpath_gz/share/clearpath_gz/worlds/warehouse.sdf]. [ign gazebo-1] [Msg] Serving entity system service on [/entity/system/add] [ign gazebo-1] [Dbg] [Physics.cc:804] Loaded [ignition::physics::dartsim::Plugin] from library [/usr/lib/x86_64-linux-gnu/ign-physics-5/engine-plugins/libignition-physics-dartsim-plugin.so] [ign gazebo-1] [Dbg] [SystemManager.cc:73] Loaded system [ignition::gazebo::systems::Physics] for entity [1] [ign gazebo-1] [Msg] Create service on [/world/warehouse/create] [ign gazebo-1] [Msg] Remove service on [/world/warehouse/remove] [ign gazebo-1] [Msg] Pose service on [/world/warehouse/set_pose] [ign gazebo-1] [Msg] Pose service on [/world/warehouse/set_pose_vector] [ign gazebo-1] [Msg] Light configuration service on [/world/warehouse/light_config] [ign gazebo-1] [Msg] Physics service on [/world/warehouse/set_physics] [ign gazebo-1] [Msg] SphericalCoordinates service on [/world/warehouse/set_spherical_coordinates] [ign gazebo-1] [Msg] Enable collision service on [/world/warehouse/enable_collision] [ign gazebo-1] [Msg] Disable collision service on [/world/warehouse/disable_collision] [ign gazebo-1] [Msg] Material service on [/world/warehouse/visual_config] [ign gazebo-1] [Msg] Material service on [/world/warehouse/wheel_slip] [ign gazebo-1] [Dbg] [SystemManager.cc:73] Loaded system [ignition::gazebo::systems::UserCommands] for entity [1] [ign gazebo-1] [Dbg] [SystemManager.cc:73] Loaded system [ignition::gazebo::systems::SceneBroadcaster] for entity [1] [ign gazebo-1] [Dbg] [Sensors.cc:506] Configuring Sensors system [ign gazebo-1] [Dbg] [Sensors.cc:431] SensorsPrivate::Run [ign gazebo-1] [Dbg] [SystemManager.cc:73] Loaded system [ignition::gazebo::systems::Sensors] for entity [1] [ign gazebo-1] [Dbg] [Sensors.cc:411] <text:soft-page-break/>SensorsPrivate::RenderThread started [ign gazebo-1] [Dbg] [Sensors.cc:258] Waiting for init [ign gazebo-1] [Dbg] [SystemManager.cc:73] Loaded system [ignition::gazebo::systems::Imu] for entity [1] [ign gazebo-1] [Dbg] [SystemManager.cc:73] Loaded system [ignition::gazebo::systems::NavSat] for entity [1] [ign gazebo-1] [Msg] Loaded level [3] [ign gazebo-1] [Msg] Serving world controls on [/world/warehouse/control], [/world/warehouse/control/state] and [/world/warehouse/playback/control] [generate_launch-5] Generated launch file: /home/tapaswee/clearpath/manipulators/launch/manipulators-service.launch.py [generate_launch-5] Generated launch file: /home/tapaswee/clearpath/sensors/launch/camera_0.launch.py [generate_launch-5] Generated launch file: /home/tapaswee/clearpath/sensors/launch/sensors-service.launch.py [generate_launch-5] Generated launch file: /home/tapaswee/clearpath/platform/launch/platform-service.launch.py [INFO] [generate_launch-5]: process has finished cleanly [pid 62672] [INFO] [generate_param-6]: process started with pid [62675] [ign gazebo-1] [Msg] Serving GUI information on [/world/warehouse/[Msg] Ignition Gazebo GUI v6.17.1 [ign gazebo-1] [Dbg] [Gui.cc:253] Waiting for subscribers to [/gazebo/starting_world]... [ign gazebo-1] [Dbg] [Application.cc:92] Initializing application. [ign gazebo-1] [GUI] [Dbg] [Application.cc:560] Create main window [ign gazebo-1] [GUI] [Dbg] [PathManager.cc:66] Requesting resource paths through [/gazebo/resource_paths/get] [ign gazebo-1] [GUI] [Dbg] [Gui.cc:333] GUI requesting list of world names. The server may be busy downloading resources. Please be patient. [ign gazebo-1] [GUI] [Dbg] [PathManager.cc:55] Received resource paths. [ign gazebo-1] [GUI] [Dbg] [GuiRunner.cc:145] Requesting initial state from [/world/shapes/state]... [ign gazebo-1] [GUI] [Msg] Loading config [/home/tapaswee/clearpath_ws/install/clearpath_gz/share/clearpath_gz/config/gui.config] [ign gazebo-1] [GUI] [Dbg] [Application.cc:431] Loading plugin [MinimalScene] [ign gazebo-1] [GUI] [Msg] Added plugin [3D View] to main window [ign gazebo-1] [GUI] [Msg] Loaded plugin [MinimalScene] from path [/usr/lib/x86_64-linux-gnu/ign-gui-6/plugins/libMinimalScene.so] [ign gazebo-1] [GUI] [Dbg] [Application.cc:431] Loading plugin [EntityContextMenuPlugin] [ign gazebo-1] [GUI] [Msg] Added plugin [Entity Context Menu] to main window [ign gazebo-1] [GUI] [Msg] Loaded plugin [EntityContextMenuPlugin] from path [/usr/lib/x86_64-linux-gnu/ign-gazebo-6/plugins/gui/libEntityContextMenuPlugin.so] [ign gazebo-1] [GUI] [Dbg] [Application.cc:431] Loading plugin [GzSceneManager] [ign gazebo-1] [GUI] [Msg] Added plugin [Scene Manager] to main window [ign gazebo-1] [GUI] [Msg] Loaded plugin [GzSceneManager] from path [/usr/lib/x86_64-linux-gnu/ign-gazebo-6/plugins/gui/libGzSceneManager.so] [ign gazebo-1] [GUI] [Dbg] [Application.cc:431] Loading plugin [InteractiveViewControl] [ign gazebo-1] [GUI] [Msg] Camera view controller topic advertised on [/gui/camera/view_control] [ign gazebo-1] [GUI] [Msg] Camera reference visual topic advertised on [/gui/camera/view_control/reference_visual] [ign gazebo-1] [GUI] [Msg] Camera view control sensitivity advertised on [/gui/camera/view_control/sensitivity] [ign gazebo-1] [GUI] [Msg] Added plugin [Interactive view control] to main window [ign gazebo-1] [GUI] [Msg] Loaded plugin [InteractiveViewControl] from path [/usr/lib/x86_64-linux-gnu/ign-gui-6/plugins/libInteractiveViewControl.so] [ign gazebo-1] [GUI] [Dbg] [Application.cc:431] Loading plugin [CameraTracking] [ign gazebo-1] [GUI] [Msg] Added plugin [Camera tracking] to main window [ign gazebo-1] [GUI] [Msg] Loaded plugin [CameraTracking] from path [/usr/lib/x86_64-linux-gnu/ign-gui-6/plugins/libCameraTracking.so] [ign gazebo-1] [GUI] [Dbg] [Application.cc:431] Loading plugin [MarkerManager] [generate_param-6] Generated config: /home/tapaswee/clearpath/sensors/config/camera_0.yaml [generate_param-6] Generated config: /home/tapaswee/clearpath/platform/config/control.yaml [generate_param-6] Generated config: /home/tapaswee/clearpath/platform/config/imu_filter.yaml <text:soft-page-break/>[generate_param-6] Generated config: /home/tapaswee/clearpath/platform/config/localization.yaml [generate_param-6] Generated config: /home/tapaswee/clearpath/platform/config/teleop_interactive_markers.yaml [generate_param-6] Generated config: /home/tapaswee/clearpath/platform/config/teleop_joy.yaml [generate_param-6] Generated config: /home/tapaswee/clearpath/platform/config/twist_mux.yaml [generate_param-6] Generated config: /home/tapaswee/clearpath/manipulators/config/moveit.yaml [INFO] [generate_param-6]: process has finished cleanly [pid 62675] [ign gazebo-1] [GUI] [Wrn] [Application.cc:802] [QT] file::/Spawn/Spawn.qml:32:3: QML Connections: Implicitly defined onFoo properties in Connections are deprecated. Use this syntax instead: function onFoo(&lt;arguments&gt;) { ... } [ign gazebo-1] [GUI] [Wrn] [Application.cc:802] [QT] file::/TransformControl/TransformControl.qml:104:3: QML Connections: Implicitly defined onFoo properties in Connections are deprecated. Use this syntax instead: function onFoo(&lt;arguments&gt;) { ... } [ign gazebo-1] [GUI] [Wrn] [Application.cc:802] [QT] file::/TransformControl/TransformControl.qml:99:3: QML Connections: Implicitly defined onFoo properties in Connections are deprecated. Use this syntax instead: function onFoo(&lt;arguments&gt;) { ... } [ign gazebo-1] [GUI] [Wrn] [Application.cc:802] [QT] file::/TransformControl/TransformControl.qml:94:3: QML Connections: Implicitly defined onFoo properties in Connections are deprecated. Use this syntax instead: function onFoo(&lt;arguments&gt;) { ... } [ign gazebo-1] [GUI] [Wrn] [Application.cc:802] [QT] file::/TransformControl/TransformControl.qml:89:3: QML Connections: Implicitly defined onFoo properties in Connections are deprecated. Use this syntax instead: function onFoo(&lt;arguments&gt;) { ... } [ign gazebo-1] [GUI] [Msg] Listening to stats on [/world/shapes/stats] [ign gazebo-1] [GUI] [Msg] Added plugin [Marker Manager] to main window [ign gazebo-1] [GUI] [Msg] Loaded plugin [MarkerManager] from path [/usr/lib/x86_64-linux-gnu/ign-gui-6/plugins/libMarkerManager.so] [ign gazebo-1] [GUI] [Dbg] [Application.cc:431] Loading plugin [SelectEntities] [ign gazebo-1] [GUI] [Msg] Added plugin [Select entities] to main window [ign gazebo-1] [GUI] [Msg] Loaded plugin [SelectEntities] from path [/usr/lib/x86_64-linux-gnu/ign-gazebo-6/plugins/gui/libSelectEntities.so] [ign gazebo-1] [GUI] [Dbg] [Application.cc:431] Loading plugin [Spawn] [ign gazebo-1] [GUI] [Msg] Added plugin [Spawn] to main window [ign gazebo-1] [GUI] [Msg] Loaded plugin [Spawn] from path [/usr/lib/x86_64-linux-gnu/ign-gazebo-6/plugins/gui/libSpawn.so] [ign gazebo-1] [GUI] [Dbg] [Application.cc:431] Loading plugin [VisualizationCapabilities] [ign gazebo-1] [GUI] [Msg] View as transparent service on [/gui/view/transparent] [ign gazebo-1] [GUI] [Msg] View as wireframes service on [/gui/view/wireframes] [ign gazebo-1] [GUI] [Msg] View center of mass service on [/gui/view/com] [ign gazebo-1] [GUI] [Msg] View inertia service on [/gui/view/inertia] [ign gazebo-1] [GUI] [Msg] View collisions service on [/gui/view/collisions] [ign gazebo-1] [GUI] [Msg] View joints service on [/gui/view/joints] [ign gazebo-1] [GUI] [Msg] View frames service on [/gui/view/frames] [ign gazebo-1] [GUI] [Msg] Added plugin [Visualization capabilities] to main window [ign gazebo-1] [GUI] [Msg] Loaded plugin [VisualizationCapabilities] from path [/usr/lib/x86_64-linux-gnu/ign-gazebo-6/plugins/gui/libVisualizationCapabilities.so] [ign gazebo-1] [GUI] [Dbg] [Application.cc:431] Loading plugin [WorldControl] [ign gazebo-1] [GUI] [Msg] Using world control service [/world/shapes/control] [ign gazebo-1] [GUI] [Msg] Listening to stats on [/world/shapes/stats] [ign gazebo-1] [GUI] [Dbg] [WorldControl.cc:246] Using an event to share WorldControl msgs with the server [ign gazebo-1] [GUI] [Msg] Added plugin [World control] to main window [ign gazebo-1] [GUI] [Msg] Loaded plugin [WorldControl] from path [/usr/lib/x86_64-linux-gnu/ign-gui-6/plugins/libWorldControl.so] [ign gazebo-1] [GUI] [Dbg] <text:soft-page-break/>[Application.cc:431] Loading plugin [WorldStats] [ign gazebo-1] [GUI] [Msg] Listening to stats on [/world/shapes/stats] [ign gazebo-1] [GUI] [Msg] Added plugin [World stats] to main window [ign gazebo-1] [GUI] [Msg] Loaded plugin [WorldStats] from path [/usr/lib/x86_64-linux-gnu/ign-gui-6/plugins/libWorldStats.so] [INFO] [robot_state_publisher-7]: process started with pid [62694] [INFO] [spawner-8]: process started with pid [62696] [INFO] [spawner-9]: process started with pid [62698] [INFO] [ekf_node-10]: process started with pid [62700] [INFO] [marker_server-11]: process started with pid [62702] [INFO] [twist_mux-12]: process started with pid [62704] [INFO] [joy_linux_node-13]: process started with pid [62706] [INFO] [teleop_node-14]: process started with pid [62708] [INFO] [parameter_bridge-15]: process started with pid [62710] [INFO] [parameter_bridge-16]: process started with pid [62712] [INFO] [parameter_bridge-17]: process started with pid [62714] [INFO] [static_transform_publisher-18]: process started with pid [62716] [INFO] [image_bridge-19]: process started with pid [62718] [INFO] [image_bridge-20]: process started with pid [62720] [INFO] [create-21]: process started with pid [62722] [joy_linux_node-13] [ERROR] [1773169143.302383298] [cpr_a200_0000.joy_node]: Couldn't open joystick /dev/input/ps4. Will retry every second. [static_transform_publisher-18] [INFO] [1773169143.304243519] [cpr_a200_0000.camera_0_static_tf]: Spinning until stopped - publishing transform [static_transform_publisher-18] translation: ('0.000000', '0.000000', '0.000000') [static_transform_publisher-18] rotation: ('0.000000', '0.000000', '0.000000', '1.000000') [static_transform_publisher-18] from 'camera_0_link' to 'cpr_a200_0000/robot/base_link/camera_0' [marker_server-11] [INFO] [1773169143.305905178] [cpr_a200_0000.twist_server_node]: [interactive_marker_twist_server] Initialized. [twist_mux-12] [INFO] [1773169143.308062046] [cpr_a200_0000.twist_mux]: Topic handler 'topics.external' subscribed to topic 'cmd_vel': timeout = 0.500000s , priority = 1. [twist_mux-12] [INFO] [1773169143.309796401] [cpr_a200_0000.twist_mux]: Topic handler 'topics.interactive_marker' subscribed to topic 'twist_marker_server/cmd_vel': timeout = 0.500000s , priority = 8. [teleop_node-14] [INFO] [1773169143.309842598] [TeleopTwistJoy]: Teleop enable button 4. [teleop_node-14] [INFO] [1773169143.309887301] [TeleopTwistJoy]: Turbo on button 5. [teleop_node-14] [INFO] [1773169143.309891419] [TeleopTwistJoy]: Linear axis x on 1 at scale 0.400000. [teleop_node-14] [INFO] [1773169143.309896749] [TeleopTwistJoy]: Turbo for linear axis x is scale 1.000000. [teleop_node-14] [INFO] [1773169143.309901348] [TeleopTwistJoy]: Angular axis yaw on 0 at scale 0.600000. [teleop_node-14] [INFO] [1773169143.309905536] [TeleopTwistJoy]: Turbo for angular axis yaw is scale 1.200000. [twist_mux-12] [INFO] [1773169143.310089090] [cpr_a200_0000.twist_mux]: Topic handler 'topics.joy' subscribed to topic 'joy_teleop/cmd_vel': timeout = 0.500000s , priority = 10. [twist_mux-12] [INFO] [1773169143.310518155] [cpr_a200_0000.twist_mux]: Topic handler 'topics.rc' subscribed to topic 'rc_teleop/cmd_vel': timeout = 0.500000s , priority = 12. [twist_mux-12] [INFO] [1773169143.311243857] [cpr_a200_0000.twist_mux]: Topic handler 'locks.e_stop' subscribed to topic 'platform/emergency_stop': timeout = None , priority = 255. [create-21] [INFO] [1773169143.319800686] [cpr_a200_0000.ros_gz_sim]: Requesting list of world names. [parameter_bridge-15] [INFO] [1773169143.336425666] [cpr_a200_0000.cmd_vel_bridge]: Creating GZ-&gt;ROS Bridge: [cpr_a200_0000/cmd_vel (ignition.msgs.Twist) -&gt; cpr_a200_0000/cmd_vel (geometry_msgs/msg/Twist)] (Lazy 0) [parameter_bridge-15] [INFO] [1773169143.339488273] [cpr_a200_0000.cmd_vel_bridge]: Creating ROS-&gt;GZ Bridge: [/model/cpr_a200_0000/robot/cmd_vel (geometry_msgs/msg/Twist) -&gt; /model/cpr_a200_0000/robot/cmd_vel (ignition.msgs.Twist)] (Lazy 0) [robot_state_publisher-7] [INFO] [1773169143.340372132] [cpr_a200_0000.robot_state_publisher]: got segment <text:soft-page-break/>base_footprint [robot_state_publisher-7] [INFO] [1773169143.340476067] [cpr_a200_0000.robot_state_publisher]: got segment base_link [robot_state_publisher-7] [INFO] [1773169143.340484002] [cpr_a200_0000.robot_state_publisher]: got segment bracket_0_link [robot_state_publisher-7] [INFO] [1773169143.340489923] [cpr_a200_0000.robot_state_publisher]: got segment bracket_0_mount [robot_state_publisher-7] [INFO] [1773169143.340495053] [cpr_a200_0000.robot_state_publisher]: got segment camera_0_bottom_screw_frame [robot_state_publisher-7] [INFO] [1773169143.340500333] [cpr_a200_0000.robot_state_publisher]: got segment camera_0_color_frame [robot_state_publisher-7] [INFO] [1773169143.340505683] [cpr_a200_0000.robot_state_publisher]: got segment camera_0_color_optical_frame [robot_state_publisher-7] [INFO] [1773169143.340510832] [cpr_a200_0000.robot_state_publisher]: got segment camera_0_depth_frame [robot_state_publisher-7] [INFO] [1773169143.340515712] [cpr_a200_0000.robot_state_publisher]: got segment camera_0_depth_optical_frame [robot_state_publisher-7] [INFO] [1773169143.340520571] [cpr_a200_0000.robot_state_publisher]: got segment camera_0_infra1_frame [robot_state_publisher-7] [INFO] [1773169143.340525640] [cpr_a200_0000.robot_state_publisher]: got segment camera_0_infra1_optical_frame [robot_state_publisher-7] [INFO] [1773169143.340530459] [cpr_a200_0000.robot_state_publisher]: got segment camera_0_infra2_frame [robot_state_publisher-7] [INFO] [1773169143.340535689] [cpr_a200_0000.robot_state_publisher]: got segment camera_0_infra2_optical_frame [robot_state_publisher-7] [INFO] [1773169143.340540648] [cpr_a200_0000.robot_state_publisher]: got segment camera_0_link [robot_state_publisher-7] [INFO] [1773169143.340545457] [cpr_a200_0000.robot_state_publisher]: got segment default_mount [robot_state_publisher-7] [INFO] [1773169143.340550317] [cpr_a200_0000.robot_state_publisher]: got segment front_bumper_base_link [robot_state_publisher-7] [INFO] [1773169143.340555186] [cpr_a200_0000.robot_state_publisher]: got segment front_bumper_link [robot_state_publisher-7] [INFO] [1773169143.340560055] [cpr_a200_0000.robot_state_publisher]: got segment front_bumper_mount [robot_state_publisher-7] [INFO] [1773169143.340564994] [cpr_a200_0000.robot_state_publisher]: got segment front_left_wheel [robot_state_publisher-7] [INFO] [1773169143.340569533] [cpr_a200_0000.robot_state_publisher]: got segment front_right_wheel [robot_state_publisher-7] [INFO] [1773169143.340574171] [cpr_a200_0000.robot_state_publisher]: got segment inertial_link [robot_state_publisher-7] [INFO] [1773169143.340578860] [cpr_a200_0000.robot_state_publisher]: got segment rear_bumper_base_link [robot_state_publisher-7] [INFO] [1773169143.340583869] [cpr_a200_0000.robot_state_publisher]: got segment rear_bumper_link [robot_state_publisher-7] [INFO] [1773169143.340588498] [cpr_a200_0000.robot_state_publisher]: got segment rear_bumper_mount [robot_state_publisher-7] [INFO] [1773169143.340593347] [cpr_a200_0000.robot_state_publisher]: got segment rear_left_wheel [robot_state_publisher-7] [INFO] [1773169143.340598066] [cpr_a200_0000.robot_state_publisher]: got segment rear_right_wheel [robot_state_publisher-7] [INFO] [1773169143.340602815] [cpr_a200_0000.robot_state_publisher]: got segment sensor_arch_link [robot_state_publisher-7] [INFO] [1773169143.340610680] [cpr_a200_0000.robot_state_publisher]: got segment sensor_arch_mount [robot_state_publisher-7] [INFO] [1773169143.340616070] <text:soft-page-break/>[cpr_a200_0000.robot_state_publisher]: got segment top_chassis_link [parameter_bridge-16] [INFO] [1773169143.355778876] [cpr_a200_0000.odom_base_tf_bridge]: Creating GZ-&gt;ROS Bridge: [/model/cpr_a200_0000/robot/tf (ignition.msgs.Pose_V) -&gt; /model/cpr_a200_0000/robot/tf (tf2_msgs/msg/TFMessage)] (Lazy 0) [ign gazebo-1] [GUI] [Wrn] [Component.hh:189] Trying to deserialize component with data type [St6vectorIdSaIdEE], which doesn't have <text:span text:style-name="Source_20_Text">operator&gt;&gt;</text:span>. Component will not be deserialized. [spawner-9] [INFO] [1773169143.564323793] [cpr_a200_0000.spawner_platform_velocity_controller]: waiting for service /cpr_a200_0000/controller_manager/list_controllers to become available... [spawner-8] [INFO] [1773169143.600599121] [cpr_a200_0000.spawner_joint_state_broadcaster]: waiting for service /cpr_a200_0000/controller_manager/list_controllers to become available... [create-21] [INFO] [1773169143.626299824] [cpr_a200_0000.ros_gz_sim]: Waiting messages on topic [robot_description]. [create-21] [INFO] [1773169143.637558383] [cpr_a200_0000.ros_gz_sim]: Requested creation of entity. [create-21] [INFO] [1773169143.637589190] [cpr_a200_0000.ros_gz_sim]: OK creation of entity. [INFO] [create-21]: process has finished cleanly [pid 62722] [ign gazebo-1] libEGL warning: egl: failed to create dri2 screen [ign gazebo-1] libEGL warning: egl: failed to create dri2 screen [ign gazebo-1] [GUI] [Dbg] [Application.cc:431] Loading plugin [Shapes] [ign gazebo-1] [GUI] [Msg] Added plugin [Shapes] to main window [ign gazebo-1] [GUI] [Msg] Loaded plugin [Shapes] from path [/usr/lib/x86_64-linux-gnu/ign-gazebo-6/plugins/gui/libShapes.so] [ign gazebo-1] [GUI] [Dbg] [Application.cc:431] Loading plugin [Lights] [ign gazebo-1] [GUI] [Msg] Added plugin [Lights] to main window [ign gazebo-1] [GUI] [Msg] Loaded plugin [Lights] from path [/usr/lib/x86_64-linux-gnu/ign-gazebo-6/plugins/gui/libLights.so] [ign gazebo-1] [GUI] [Dbg] [Application.cc:431] Loading plugin [TransformControl] [ign gazebo-1] [GUI] [Dbg] [TransformControl.cc:222] Legacy mode is disabled; this plugin must be used with MinimalScene. [ign gazebo-1] [GUI] [Msg] Added plugin [Transform control] to main window [ign gazebo-1] [GUI] [Msg] Loaded plugin [TransformControl] from path [/usr/lib/x86_64-linux-gnu/ign-gazebo-6/plugins/gui/libTransformControl.so] [ign gazebo-1] [GUI] [Dbg] [Application.cc:431] Loading plugin [Screenshot] [ign gazebo-1] [GUI] [Msg] Screenshot service on [/gui/screenshot] [ign gazebo-1] [GUI] [Msg] Added plugin [Screenshot] to main window [ign gazebo-1] [GUI] [Msg] Loaded plugin [Screenshot] from path [/usr/lib/x86_64-linux-gnu/ign-gui-6/plugins/libScreenshot.so] [ign gazebo-1] [GUI] [Dbg] [Application.cc:431] Loading plugin [CopyPaste] [ign gazebo-1] [GUI] [Msg] Added plugin [Copy/Paste] to main window [ign gazebo-1] [GUI] [Msg] Loaded plugin [CopyPaste] from path [/usr/lib/x86_64-linux-gnu/ign-gazebo-6/plugins/gui/libCopyPaste.so] [ign gazebo-1] [GUI] [Dbg] [Application.cc:431] Loading plugin [Teleop] [ign gazebo-1] [GUI] [Msg] Added plugin [Teleop] to main window [ign gazebo-1] [GUI] [Msg] Loaded plugin [Teleop] from path [/usr/lib/x86_64-linux-gnu/ign-gui-6/plugins/libTeleop.so] [ign gazebo-1] [GUI] [Dbg] [Application.cc:301] Loading window config [ign gazebo-1] [GUI] [Msg] Using server control service [/server_control] [ign gazebo-1] [GUI] [Dbg] [Application.cc:574] Applying config [ign gazebo-1] [GUI] [Msg] Loading plugin [ignition-rendering-ogre2] [ign gazebo-1] [GUI] [Dbg] [MinimalScene.cc:602] Create scene [scene] [ign gazebo-1] [GUI] [Msg] Loading plugin [ignition-rendering-ogre2] [ign gazebo-1] [GUI] [Dbg] [TransformControl.cc:531] TransformControl plugin is using camera [scene::Camera(65527)] [ign gazebo-1] [GUI] [Msg] Loading plugin [ignition-rendering-ogre2] [ign gazebo-1] [GUI] [Msg] Loading plugin [ignition-rendering-ogre2] [ign gazebo-1] [GUI] [Dbg] [Spawn.cc:289] Spawn plugin is using camera [scene::Camera(65527)] [ign gazebo-1] [GUI] [Msg] Loading plugin [ignition-rendering-ogre2] [ign gazebo-1] [GUI] [Wrn] [ColladaLoader.cc:2394] <text:soft-page-break/>Triangle input semantic: 'COLOR' is currently not supported [parameter_bridge-17] [INFO] [1773169144.354191532] [cpr_a200_0000.sensors.camera_0_gz_bridge]: Creating GZ-&gt;ROS Bridge: [/cpr_a200_0000/sensors/camera_0/camera_info (gz.msgs.CameraInfo) -&gt; camera_0/color/camera_info (sensor_msgs/msg/CameraInfo)] (Lazy 0) [parameter_bridge-17] [INFO] [1773169144.357931221] [cpr_a200_0000.sensors.camera_0_gz_bridge]: Creating GZ-&gt;ROS Bridge: [/cpr_a200_0000/sensors/camera_0/points (gz.msgs.PointCloudPacked) -&gt; camera_0/points (sensor_msgs/msg/PointCloud2)] (Lazy 0) [parameter_bridge-17] [INFO] [1773169144.358760587] [cpr_a200_0000.sensors.camera_0_gz_bridge]: Creating GZ-&gt;ROS Bridge: [/cpr_a200_0000/sensors/camera_0/camera_info (gz.msgs.CameraInfo) -&gt; camera_0/depth/camera_info (sensor_msgs/msg/CameraInfo)] (Lazy 0) [ign gazebo-1] [Wrn] [SimulationRunner.cc:662] Found additional publishers on /stats, using namespaced stats topic only [ign gazebo-1] [Wrn] [SimulationRunner.cc:695] Found additional publishers on /clock, using namespaced clock topic only [ign gazebo-1] [INFO] [1773169144.520364851] [GazeboSimROS2ControlPlugin]: robot_param_node is robot_state_publisher [ign gazebo-1] [INFO] [1773169144.520393235] [GazeboSimROS2ControlPlugin]: robot_param_node is robot_description [ign gazebo-1] [INFO] [1773169144.604763794] [cpr_a200_0000.gz_ros2_control]: connected to service!! /cpr_a200_0000/robot_state_publisher asking for robot_description [ign gazebo-1] [INFO] [1773169145.613427148] [cpr_a200_0000.gz_ros2_control]: Received URDF from param server [ign gazebo-1] [INFO] [1773169145.618707878] [cpr_a200_0000.gz_ros2_control]: The position_proportional_gain has been set to: 0.1 [ign gazebo-1] [INFO] [1773169145.618756770] [cpr_a200_0000.gz_ros2_control]: Loading joint: front_left_wheel_joint [ign gazebo-1] [INFO] [1773169145.618764986] [cpr_a200_0000.gz_ros2_control]: State: [ign gazebo-1] [INFO] [1773169145.618771047] [cpr_a200_0000.gz_ros2_control]: position [ign gazebo-1] [INFO] [1773169145.618777760] [cpr_a200_0000.gz_ros2_control]: velocity [ign gazebo-1] [INFO] [1773169145.618783029] [cpr_a200_0000.gz_ros2_control]: Command: [ign gazebo-1] [INFO] [1773169145.618788089] [cpr_a200_0000.gz_ros2_control]: velocity [ign gazebo-1] [INFO] [1773169145.618801464] [cpr_a200_0000.gz_ros2_control]: Loading joint: rear_left_wheel_joint [ign gazebo-1] [INFO] [1773169145.618806704] [cpr_a200_0000.gz_ros2_control]: State: [ign gazebo-1] [INFO] [1773169145.618811583] [cpr_a200_0000.gz_ros2_control]: position [ign gazebo-1] [INFO] [1773169145.618816412] [cpr_a200_0000.gz_ros2_control]: velocity [ign gazebo-1] [INFO] [1773169145.618821902] [cpr_a200_0000.gz_ros2_control]: Command: [ign gazebo-1] [INFO] [1773169145.618826852] [cpr_a200_0000.gz_ros2_control]: velocity [ign gazebo-1] [INFO] [1773169145.618834586] [cpr_a200_0000.gz_ros2_control]: Loading joint: front_right_wheel_joint [ign gazebo-1] [INFO] [1773169145.618837983] [cpr_a200_0000.gz_ros2_control]: State: [ign gazebo-1] [INFO] [1773169145.618841359] [cpr_a200_0000.gz_ros2_control]: position [ign gazebo-1] [INFO] [1773169145.618844846] [cpr_a200_0000.gz_ros2_control]: velocity [ign gazebo-1] [INFO] [1773169145.618848112] [cpr_a200_0000.gz_ros2_control]: Command: [ign gazebo-1] [INFO] [1773169145.618851298] [cpr_a200_0000.gz_ros2_control]: velocity [ign gazebo-1] [INFO] [1773169145.618857579] [cpr_a200_0000.gz_ros2_control]: Loading joint: rear_right_wheel_joint [ign gazebo-1] [INFO] [1773169145.618861026] [cpr_a200_0000.gz_ros2_control]: State: [ign gazebo-1] [INFO] [1773169145.618864122] [cpr_a200_0000.gz_ros2_control]: position [ign gazebo-1] [INFO] [1773169145.618867298] [cpr_a200_0000.gz_ros2_control]: velocity [ign gazebo-1] [INFO] [1773169145.618870353] [cpr_a200_0000.gz_ros2_control]: Command: [ign gazebo-1] [INFO] [1773169145.618873549] [cpr_a200_0000.gz_ros2_control]: velocity [ign gazebo-1] [INFO] <text:soft-page-break/>[1773169145.618980129] [resource_manager]: Initialize hardware 'a200_hardware' [ign gazebo-1] [WARN] [1773169145.619001980] [cpr_a200_0000.gz_ros2_control]: The ign_ros2_control plugin got renamed to gz_ros2_control. [ign gazebo-1] Update the &lt;ros2_control&gt; tag and gazebo plugin to [ign gazebo-1] &lt;hardware&gt; [ign gazebo-1] &lt;plugin&gt;gz_ros2_control/GazeboSimSystem&lt;/plugin&gt; [ign gazebo-1] &lt;/hardware&gt; [ign gazebo-1] &lt;gazebo&gt; [ign gazebo-1] &lt;plugin filename="gz_ros2_control-system"name="gz_ros2_control::GazeboSimROS2ControlPlugin"&gt; [ign gazebo-1] ... [ign gazebo-1] &lt;/plugin&gt; [ign gazebo-1] &lt;/gazebo&gt; [ign gazebo-1] [INFO] [1773169145.619043889] [resource_manager]: Successful initialization of hardware 'a200_hardware' [ign gazebo-1] [INFO] [1773169145.619070930] [resource_manager]: 'configure' hardware 'a200_hardware' [ign gazebo-1] [INFO] [1773169145.619074436] [cpr_a200_0000.gz_ros2_control]: System Successfully configured! [ign gazebo-1] [INFO] [1773169145.619080698] [resource_manager]: Successful 'configure' of hardware 'a200_hardware' [ign gazebo-1] [INFO] [1773169145.619085387] [resource_manager]: 'activate' hardware 'a200_hardware' [ign gazebo-1] [INFO] [1773169145.619088793] [resource_manager]: Successful 'activate' of hardware 'a200_hardware' [ign gazebo-1] [INFO] [1773169145.619092631] [cpr_a200_0000.gz_ros2_control]: Loading controller_manager [ign gazebo-1] [Wrn] [OBJLoader.cc:91] Both <text:span text:style-name="Source_20_Text">d</text:span> and <text:span text:style-name="Source_20_Text">Tr</text:span> parameters defined for "Chair". Use the value of <text:span text:style-name="Source_20_Text">d</text:span> for dissolve (line 8 in .mtl.) [ign gazebo-1] [ign gazebo-1] gui/info] [ign gazebo-1] [Msg] World [warehouse] initialized with [default_physics] physics profile. [ign gazebo-1] [Msg] Serving world SDF generation service on [/world/warehouse/generate_world_sdf] [ign gazebo-1] [Msg] Serving world names on [/gazebo/worlds] [ign gazebo-1] [Msg] Resource path add service on [/gazebo/resource_paths/add]. [ign gazebo-1] [Msg] Resource path get service on [/gazebo/resource_paths/get]. [ign gazebo-1] [Msg] Resource path resolve service on [/gazebo/resource_paths/resolve]. [ign gazebo-1] [Msg] Resource paths published on [/gazebo/resource_paths]. [ign gazebo-1] [Msg] Server control service on [/server_control]. [ign gazebo-1] [Dbg] [SimulationRunner.cc:664] Publishers [Address, Message Type]: [ign gazebo-1] [Dbg] [SimulationRunner.cc:669] tcp://172.17.0.1:46713, ignition.msgs.WorldStatistics [ign gazebo-1] [Dbg] [SimulationRunner.cc:697] Publishers [Address, Message Type]: [ign gazebo-1] [Dbg] [SimulationRunner.cc:702] tcp://172.17.0.1:46713, ignition.msgs.Clock [ign gazebo-1] [Dbg] [SimulationRunner.cc:501] Creating PostUpdate worker threads: 5 [ign gazebo-1] [Dbg] [SimulationRunner.cc:512] Creating postupdate worker thread (0) [ign gazebo-1] [Dbg] [SimulationRunner.cc:512] Creating postupdate worker thread (1) [ign gazebo-1] [Dbg] [SimulationRunner.cc:512] Creating postupdate worker thread (2) [ign gazebo-1] [Dbg] [SimulationRunner.cc:512] Creating postupdate worker thread (3) [ign gazebo-1] [Dbg] [SystemManager.cc:73] Loaded system [ignition::gazebo::systems::WheelSlip] for entity [136] [ign gazebo-1] [Dbg] [SystemManager.cc:73] Loaded system [ign_ros2_control::IgnitionROS2ControlPlugin] for entity [136] [ign gazebo-1] [Dbg] [SystemManager.cc:73] Loaded system [ignition::gazebo::systems::PosePublisher] for entity [136] [ign gazebo-1] [Dbg] [UserCommands.cc:1303] Created entity [136] named [cpr_a200_0000/robot] [ign gazebo-1] [Dbg] [SimulationFeatures.cc:71] Simulation timestep set to: 0.003 [ign gazebo-1] [Dbg] [Sensors.cc:610] Initialization needed [ign gazebo-1] [Dbg] [Sensors.cc:270] Initializing render context [ign gazebo-1] [Msg] Loading plugin [ignition-rendering-ogre2] [ign gazebo-1] [Msg] Serving scene information on [/world/warehouse/scene/info] [ign gazebo-1] [Msg] Serving graph information on [/world/warehouse/scene/graph] [ign gazebo-1] [Msg] Serving full state on [/world/warehouse/state] [ign gazebo-1] [Msg] Serving full state (async) on <text:soft-page-break/>[/world/warehouse/state_async] [ign gazebo-1] [Msg] Publishing scene information on [/world/warehouse/scene/info] [ign gazebo-1] [Msg] Publishing entity deletions on [/world/warehouse/scene/deletion] [ign gazebo-1] [WARN] [1773169145.665581046] [cpr_a200_0000.gz_ros2_control]: Desired controller update period (0.02 s) is slower than the gazebo simulation period (0.003 s). [ign gazebo-1] libEGL warning: egl: failed to create dri2 screen [ign gazebo-1] libEGL warning: egl: failed to create dri2 screen [ign gazebo-1] [INFO] [1773169145.819309551] [cpr_a200_0000.controller_manager]: Loading controller 'platform_velocity_controller' [spawner-9] [INFO] [1773169145.833164072] [cpr_a200_0000.spawner_platform_velocity_controller]: Loaded platform_velocity_controller [ign gazebo-1] [INFO] [1773169145.834139603] [cpr_a200_0000.controller_manager]: Configuring controller 'platform_velocity_controller' [ign gazebo-1] [Wrn] [ColladaLoader.cc:2394] Triangle input semantic: 'COLOR' is currently not supported [spawner-9] [INFO] [1773169147.129961626] [cpr_a200_0000.spawner_platform_velocity_controller]: Configured and activated platform_velocity_controller [ign gazebo-1] [INFO] [1773169147.131850842] [cpr_a200_0000.controller_manager]: Loading controller 'joint_state_broadcaster' [spawner-8] [INFO] [1773169147.150288244] [cpr_a200_0000.spawner_joint_state_broadcaster]: Loaded joint_state_broadcaster [ign gazebo-1] [INFO] [1773169147.151388378] [cpr_a200_0000.controller_manager]: Configuring controller 'joint_state_broadcaster' [ign gazebo-1] [INFO] [1773169147.151490851] [cpr_a200_0000.joint_state_broadcaster]: 'joints' or 'interfaces' parameter is empty. All available state interfaces will be published [spawner-8] [INFO] [1773169147.213170116] [cpr_a200_0000.spawner_joint_state_broadcaster]: Configured and activated joint_state_broadcaster [INFO] [spawner-9]: process has finished cleanly [pid 62698] [INFO] [spawner-8]: process has finished cleanly [pid 62696] [ign gazebo-1] [Msg] Publishing state changes on [/world/warehouse/state] [ign gazebo-1] [Msg] Publishing pose messages on [/world/warehouse/pose/info] [ign gazebo-1] [Msg] Publishing dynamic pose messages on [/world/warehouse/dynamic_pose/info] [ign gazebo-1] [Dbg] [SimulationRunner.cc:528] Exiting postupdate worker thread (1) [ign gazebo-1] [ign gazebo-1] [Dbg] [SimulationRunner.cc:528] [ign gazebo-1] [Dbg] [SimulationRunner.cc:528] [Dbg] [SimulationRunner.cc:528] [Dbg] [SimulationRunner.cc:528] Exiting postupdate worker thread (3 [ign gazebo-1] [Dbg] [SimulationRunner.cc:528] [Dbg] [SimulationRunner.cc:528] Exiting postupdate worker thread (2) [ign gazebo-1] 0) [ign gazebo-1] ) [ign gazebo-1] [ign gazebo-1] [Dbg] [SimulationRunner.cc:501] Creating PostUpdate worker threads: 7 [ign gazebo-1] [Dbg] [SimulationRunner.cc:512] Creating postupdate worker thread (0) [ign gazebo-1] [Dbg] [SimulationRunner.cc:512] Creating postupdate worker thread (1) [ign gazebo-1] [Dbg] [SimulationRunner.cc:512] Creating postupdate worker thread (2) [ign gazebo-1] [Dbg] [SimulationRunner.cc:512] Creating postupdate worker thread (3) [ign gazebo-1] [Dbg] [SimulationRunner.cc:512] Creating postupdate worker thread (4) [ign gazebo-1] [Dbg] [SimulationRunner.cc:512] Creating postupdate worker thread (5) [ign gazebo-1] [Dbg] [RenderUtil.cc:2591] Create scene [scene] [ign gazebo-1] [Dbg] [Sensors.cc:610] Initialization needed [ign gazebo-1] [Dbg] [Sensors.cc:284] Rendering Thread initialized [ign gazebo-1] [Dbg] [RgbdCameraSensor.cc:219] RGB images for [cpr_a200_0000/robot::base_link::camera_0] advertised on [cpr_a200_0000/sensors/camera_0/image] [ign gazebo-1] [Dbg] [RgbdCameraSensor.cc:233] Depth images for [cpr_a200_0000/robot::base_link::camera_0] advertised on [cpr_a200_0000/sensors/camera_0/depth_image] [ign gazebo-1] [Dbg] [RgbdCameraSensor.cc:247] Points for [cpr_a200_0000/robot::base_link::camera_0] advertised on [cpr_a200_0000/sensors/camera_0/points] [ign gazebo-1] [Dbg] [CameraSensor.cc:705] Camera <text:soft-page-break/>info for [cpr_a200_0000/robot::base_link::camera_0] advertised on [cpr_a200_0000/sensors/camera_0/camera_info] [ign gazebo-1] [GUI] [Wrn] [Component.hh:144] Trying to serialize component with data type [St6vectorIdSaIdEE], which doesn't have <text:span text:style-name="Source_20_Text">operator&lt;&lt;</text:span>. Component will not be serialized. the same world launch with same two robots and no manipulator.</text:p>
      <text:p text:style-name="Text_20_body">Everything in your logs actually shows the system <text:span text:style-name="Strong_20_Emphasis">working correctly</text:span> 👍.<text:line-break/>The reason you still see <text:span text:style-name="Strong_20_Emphasis">two robots and no manipulator</text:span> is due to <text:span text:style-name="Strong_20_Emphasis">two separate issues</text:span>:</text:p>
      <text:p text:style-name="Text_20_body">1️⃣ <text:span text:style-name="Strong_20_Emphasis">The world file already contains a robot</text:span><text:line-break/>2️⃣ <text:span text:style-name="Strong_20_Emphasis">The manipulator was never generated in the URDF</text:span></text:p>
      <text:p text:style-name="Text_20_body">Let’s fix both.</text:p>
      <text:p text:style-name="Horizontal_20_Line"/>
      <text:h text:style-name="Heading_20_1" text:outline-level="1">1️⃣ Why two robots appear</text:h>
      <text:p text:style-name="Text_20_body">Your logs show this:</text:p>
      <text:section text:style-name="Sect1" text:name="Section63">
        <text:p text:style-name="Preformatted_20_Text"><text:bookmark text:name="code-block-viewer62"/>Loading SDF world file ... warehouse.sdf</text:p>
      </text:section>
      <text:p text:style-name="Text_20_body">The world <text:span text:style-name="Strong_20_Emphasis"><text:span text:style-name="Source_20_Text">warehouse.sdf</text:span></text:span> already contains a robot model.<text:line-break/>Then ROS2 <text:span text:style-name="Strong_20_Emphasis">spawns another robot</text:span>:</text:p>
      <text:section text:style-name="Sect1" text:name="Section64">
        <text:p text:style-name="Preformatted_20_Text"><text:bookmark text:name="code-block-viewer63"/>Created entity [136] named [cpr_a200_0000/robot]</text:p>
      </text:section>
      <text:p text:style-name="Text_20_body">So you see <text:span text:style-name="Strong_20_Emphasis">two robots</text:span>.</text:p>
      <text:h text:style-name="Heading_20_3" text:outline-level="3">✅ Fix</text:h>
      <text:p text:style-name="Text_20_body">Edit the world file:</text:p>
      <text:section text:style-name="Sect1" text:name="Section65">
        <text:p text:style-name="Preformatted_20_Text"><text:bookmark text:name="code-block-viewer64"/>nano ~/clearpath_ws/install/clearpath_gz/share/clearpath_gz/worlds/warehouse.sdf</text:p>
      </text:section>
      <text:p text:style-name="Text_20_body">Search for something like:</text:p>
      <text:section text:style-name="Sect1" text:name="Section66">
        <text:p text:style-name="Preformatted_20_Text"><text:bookmark text:name="code-block-viewer65"/>&lt;model name="husky"&gt;</text:p>
      </text:section>
      <text:p text:style-name="Text_20_body">or</text:p>
      <text:section text:style-name="Sect1" text:name="Section67">
        <text:p text:style-name="Preformatted_20_Text"><text:bookmark text:name="code-block-viewer66"/>&lt;model name="robot"&gt;</text:p>
      </text:section>
      <text:p text:style-name="Text_20_body">Delete that entire <text:span text:style-name="Source_20_Text">&lt;model&gt; ... &lt;/model&gt;</text:span> block.</text:p>
      <text:p text:style-name="Text_20_body">Then save.</text:p>
      <text:p text:style-name="Horizontal_20_Line"/>
      <text:h text:style-name="Heading_20_3" text:outline-level="3">🚀 Better solution (recommended)</text:h>
      <text:p text:style-name="Text_20_body">Just launch the <text:span text:style-name="Strong_20_Emphasis">empty world</text:span>:</text:p>
      <text:section text:style-name="Sect1" text:name="Section68">
        <text:p text:style-name="Preformatted_20_Text"><text:bookmark text:name="code-block-viewer67"/>ros2 launch clearpath_gz simulation.launch.py \</text:p>
        <text:p text:style-name="Preformatted_20_Text">setup_path:=$HOME/clearpath world:=empty</text:p>
      </text:section>
      <text:p text:style-name="Text_20_body">This guarantees <text:span text:style-name="Strong_20_Emphasis">only one robot</text:span>.</text:p>
      <text:p text:style-name="Horizontal_20_Line"/>
      <text:h text:style-name="Heading_20_1" text:outline-level="1"><text:soft-page-break/>2️⃣ Why the manipulator did NOT appear</text:h>
      <text:p text:style-name="Text_20_body">Your log from <text:span text:style-name="Source_20_Text">robot_state_publisher</text:span> shows <text:span text:style-name="Strong_20_Emphasis">no arm joints</text:span>:</text:p>
      <text:section text:style-name="Sect1" text:name="Section69">
        <text:p text:style-name="Preformatted_20_Text"><text:bookmark text:name="code-block-viewer68"/>got segment sensor_arch_link</text:p>
        <text:p text:style-name="Preformatted_20_Text">got segment sensor_arch_mount</text:p>
        <text:p text:style-name="Preformatted_20_Text">got segment top_chassis_link</text:p>
      </text:section>
      <text:p text:style-name="Text_20_body">There should be joints like:</text:p>
      <text:section text:style-name="Sect1" text:name="Section70">
        <text:p text:style-name="Preformatted_20_Text"><text:bookmark text:name="code-block-viewer69"/>gen3_joint_1</text:p>
        <text:p text:style-name="Preformatted_20_Text">gen3_joint_2</text:p>
        <text:p text:style-name="Preformatted_20_Text">...</text:p>
      </text:section>
      <text:p text:style-name="Text_20_body">Since they are missing, the <text:span text:style-name="Strong_20_Emphasis">manipulator was not included in the robot description</text:span>.</text:p>
      <text:p text:style-name="Text_20_body">This happens because <text:span text:style-name="Strong_20_Emphasis">Clearpath requires the manipulator to be mounted using a bracket</text:span>.</text:p>
      <text:p text:style-name="Horizontal_20_Line"/>
      <text:h text:style-name="Heading_20_1" text:outline-level="1">✅ Correct manipulator configuration</text:h>
      <text:p text:style-name="Text_20_body">Update your <text:span text:style-name="Source_20_Text">robot.yaml</text:span> like this:</text:p>
      <text:section text:style-name="Sect1" text:name="Section71">
        <text:p text:style-name="Preformatted_20_Text"><text:bookmark text:name="code-block-viewer70"/>mounts:</text:p>
        <text:p text:style-name="Preformatted_20_Text"><text:s text:c="2"/>bracket:</text:p>
        <text:p text:style-name="Preformatted_20_Text"><text:s text:c="4"/>- parent: sensor_arch_mount</text:p>
        <text:p text:style-name="Preformatted_20_Text"><text:s text:c="6"/>model: horizontal</text:p>
        <text:p text:style-name="Preformatted_20_Text">manipulators:</text:p>
        <text:p text:style-name="Preformatted_20_Text"><text:s text:c="2"/>arm:</text:p>
        <text:p text:style-name="Preformatted_20_Text"><text:s text:c="4"/>- model: kinova_gen3</text:p>
        <text:p text:style-name="Preformatted_20_Text"><text:s text:c="6"/>parent: bracket_0_mount</text:p>
        <text:p text:style-name="Preformatted_20_Text"><text:s text:c="6"/>xyz: [0.0, 0.0, 0.15]</text:p>
        <text:p text:style-name="Preformatted_20_Text"><text:s text:c="6"/>rpy: [0.0, 0.0, 0.0]</text:p>
      </text:section>
      <text:p text:style-name="Text_20_body">Important change:</text:p>
      <text:section text:style-name="Sect1" text:name="Section72">
        <text:p text:style-name="Preformatted_20_Text"><text:bookmark text:name="code-block-viewer71"/>parent: bracket_0_mount</text:p>
      </text:section>
      <text:p text:style-name="Text_20_body">NOT</text:p>
      <text:section text:style-name="Sect1" text:name="Section73">
        <text:p text:style-name="Preformatted_20_Text"><text:bookmark text:name="code-block-viewer72"/>parent: sensor_arch_mount</text:p>
      </text:section>
      <text:p text:style-name="Horizontal_20_Line"/>
      <text:h text:style-name="Heading_20_1" text:outline-level="1">3️⃣ Regenerate robot</text:h>
      <text:p text:style-name="Text_20_body">After editing:</text:p>
      <text:section text:style-name="Sect1" text:name="Section74">
        <text:p text:style-name="Preformatted_20_Text"><text:bookmark text:name="code-block-viewer73"/>cd ~/clearpath_ws</text:p>
        <text:p text:style-name="Preformatted_20_Text">source install/setup.bash</text:p>
      </text:section>
      <text:p text:style-name="Text_20_body">Run:</text:p>
      <text:section text:style-name="Sect1" text:name="Section75">
        <text:p text:style-name="Preformatted_20_Text"><text:bookmark text:name="code-block-viewer74"/>ros2 run clearpath_generator_common generate_description -s ~/clearpath</text:p>
        <text:p text:style-name="Preformatted_20_Text">ros2 run clearpath_generator_common generate_semantic_description -s ~/clearpath</text:p>
      </text:section>
      <text:p text:style-name="Horizontal_20_Line"/>
      <text:h text:style-name="Heading_20_1" text:outline-level="1">4️⃣ Relaunch simulation</text:h>
      <text:section text:style-name="Sect1" text:name="Section76">
        <text:p text:style-name="Preformatted_20_Text"><text:bookmark text:name="code-block-viewer75"/>ros2 launch clearpath_gz simulation.launch.py setup_path:=$HOME/clearpath</text:p>
      </text:section>
      <text:p text:style-name="Text_20_body">Now you should see:</text:p>
      <text:p text:style-name="Text_20_body"><text:soft-page-break/>✅ One robot<text:line-break/>✅ Kinova Gen3 arm<text:line-break/>✅ LiDAR<text:line-break/>✅ RealSense camera</text:p>
      <text:p text:style-name="Horizontal_20_Line"/>
      <text:h text:style-name="Heading_20_1" text:outline-level="1">🔎 Quick check (very useful)</text:h>
      <text:p text:style-name="Text_20_body">Run:</text:p>
      <text:section text:style-name="Sect1" text:name="Section77">
        <text:p text:style-name="Preformatted_20_Text"><text:bookmark text:name="code-block-viewer76"/>ros2 topic list | grep joint</text:p>
      </text:section>
      <text:p text:style-name="Text_20_body">If the arm exists, you will see joints like:</text:p>
      <text:section text:style-name="Sect1" text:name="Section78">
        <text:p text:style-name="Preformatted_20_Text"><text:bookmark text:name="code-block-viewer77"/>gen3_joint_1</text:p>
        <text:p text:style-name="Preformatted_20_Text">gen3_joint_2</text:p>
      </text:section>
      <text:p text:style-name="Horizontal_20_Line"/>
      <text:h text:style-name="Heading_20_1" text:outline-level="1">🚀 If you want, I can also show you how to:</text:h>
      <text:p text:style-name="Text_20_body">✔ Control the <text:span text:style-name="Strong_20_Emphasis">mobile base with keyboard</text:span><text:line-break/>✔ Move the <text:span text:style-name="Strong_20_Emphasis">Kinova arm in RViz using MoveIt</text:span><text:line-break/>✔ Make the robot <text:span text:style-name="Strong_20_Emphasis">pick objects in Gazebo</text:span></text:p>
      <text:p text:style-name="Text_20_body">These are the <text:span text:style-name="Strong_20_Emphasis">next steps for mobile manipulation experiments</text:span>.</text:p>
      <text:p text:style-name="Text_20_body">tapaswee@tapaswee-Legion-Slim-5-16AHP9:~/clearpath_ws$ ros2 launch clearpath_gz simulation.launch.py setup_path:=$HOME/clearpath world:=empty [INFO] [launch]: All log files can be found below /home/tapaswee/.ros/log/2026-03-11-00-38-54-569792-tapaswee-Legion-Slim-5-16AHP9-65652 [INFO] [launch]: Default logging verbosity is set to INFO [INFO] [ign gazebo-1]: process started with pid [65653] [INFO] [parameter_bridge-2]: process started with pid [65655] [INFO] [generate_description-3]: process started with pid [65657] [parameter_bridge-2] [INFO] [1773169734.881860652] [clock_bridge]: Creating GZ-&gt;ROS Bridge: [/clock (ignition.msgs.Clock) -&gt; /clock (rosgraph_msgs/msg/Clock)] (Lazy 0) [generate_description-3] Generated /home/tapaswee/clearpathrobot.urdf.xacro [INFO] [generate_description-3]: process has finished cleanly [pid 65657] [INFO] [generate_semantic_description-4]: process started with pid [65676] [ign gazebo-1] [Dbg] [gz.cc:161] Subscribing to [/gazebo/starting_world]. [ign gazebo-1] [Dbg] [gz.cc:163] Waiting for a world to be set from the GUI... [ign gazebo-1] [Msg] Received world [empty.sdf] from the GUI. [ign gazebo-1] [Dbg] [gz.cc:167] Unsubscribing from [/gazebo/starting_world]. [ign gazebo-1] [Msg] Ignition Gazebo Server v6.17.1 [ign gazebo-1] [Msg] Loading SDF world file[/usr/share/ignition/ignition-gazebo6/worlds/empty.sdf]. [ign gazebo-1] [Msg] Serving entity system service on [/entity/system/add] [ign gazebo-1] [Dbg] [Physics.cc:804] Loaded [ignition::physics::dartsim::Plugin] from library [/usr/lib/x86_64-linux-gnu/ign-physics-5/engine-plugins/libignition-physics-dartsim-plugin.so] [ign gazebo-1] [Dbg] [SystemManager.cc:73] Loaded system [gz::sim::systems::Physics] for entity [1] [ign gazebo-1] [Msg] Create service on [/world/empty/create] [ign gazebo-1] [Msg] Remove service on [/world/empty/remove] [ign gazebo-1] [Msg] Pose service on [/world/empty/set_pose] [ign gazebo-1] [Msg] Pose service on [/world/empty/set_pose_vector] [ign gazebo-1] [Msg] Light configuration service on [/world/empty/light_config] [ign gazebo-1] [Msg] Physics service on <text:soft-page-break/>[/world/empty/set_physics] [ign gazebo-1] [Msg] SphericalCoordinates service on [/world/empty/set_spherical_coordinates] [ign gazebo-1] [Msg] Enable collision service on [/world/empty/enable_collision] [ign gazebo-1] [Msg] Disable collision service on [/world/empty/disable_collision] [ign gazebo-1] [Msg] Material service on [/world/empty/visual_config] [ign gazebo-1] [Msg] Material service on [/world/empty/wheel_slip] [ign gazebo-1] [Dbg] [SystemManager.cc:73] Loaded system [gz::sim::systems::UserCommands] for entity [1] [ign gazebo-1] [Dbg] [SystemManager.cc:73] Loaded system [gz::sim::systems::SceneBroadcaster] for entity [1] [ign gazebo-1] [Dbg] [SystemManager.cc:73] Loaded system [gz::sim::systems::Contact] for entity [1] [ign gazebo-1] [Msg] Loaded level [3] [ign gazebo-1] [Msg] Serving world controls on [/world/empty/control], [/world/empty/control/state] and [/world/empty/playback/control] [ign gazebo-1] [Msg] Serving GUI information on [/world/empty/gui/info] [ign gazebo-1] [Msg] World [empty] initialized with [1ms] physics profile. [ign gazebo-1] [Msg] Serving world SDF generation service on [/world/empty/generate_world_sdf] [ign gazebo-1] [Msg] Serving world names on [/gazebo/worlds] [ign gazebo-1] [Msg] Resource path add service on [/gazebo/resource_paths/add]. [ign gazebo-1] [Msg] Resource path get service on [/gazebo/resource_paths/get]. [generate_semantic_description-4] [INFO] [1773169735.275356592] [moveit_collision_updater.urdf]: Loaded a200-0000 robot model. [ign gazebo-1] [GUI] [Wrn] [Application.cc:802] [QT] file::/Gazebo/GazeboDrawer.qml:242:3: QML Connections: Implicitly defined onFoo properties in Connections are deprecated. Use this syntax instead: function onFoo(&lt;arguments&gt;) { ... } [generate_semantic_description-4] [INFO] [1773169735.444875080] [moveit_robot_model.robot_model]: Loading robot model 'a200-0000'... [generate_semantic_description-4] [INFO] [1773169735.444905056] [moveit_robot_model.robot_model]: No root/virtual joint specified in SRDF. Assuming fixed joint [generate_semantic_description-4] [WARN] [1773169735.445707444] [moveit_robot_model.robot_model]: Link front_bumper_link has visual geometry but no collision geometry. Collision geometry will be left empty. Fix your URDF file by explicitly specifying collision geometry. [generate_semantic_description-4] [WARN] [1773169735.445719417] [moveit_robot_model.robot_model]: Link rear_bumper_link has visual geometry but no collision geometry. Collision geometry will be left empty. Fix your URDF file by explicitly specifying collision geometry. [generate_semantic_description-4] [WARN] [1773169735.445740216] [moveit_robot_model.robot_model]: Link top_chassis_link has visual geometry but no collision geometry. Collision geometry will be left empty. Fix your URDF file by explicitly specifying collision geometry. [generate_semantic_description-4] [INFO] [1773169735.445797784] [moveit_collision_updater.srdf]: Robot semantic model successfully loaded. [generate_semantic_description-4] [INFO] [1773169735.450179349] [moveit_collision_updater.Self-Collisions]: Thread complete 28 [generate_semantic_description-4] Generated /home/tapaswee/clearpathrobot.srdf.xacro [INFO] [generate_semantic_description-4]: process has finished cleanly [pid 65676] [ign gazebo-1] [GUI] [Wrn] [Application.cc:802] [QT] file::/EntityContextMenuPlugin/EntityContextMenuPlugin.qml:56:5: QML Connections: Implicitly defined onFoo properties in Connections are deprecated. Use this syntax instead: function onFoo(&lt;arguments&gt;) { ... } [INFO] [generate_launch-5]: process started with pid [65743] [generate_launch-5] Generated launch file: /home/tapaswee/clearpath/manipulators/launch/manipulators-service.launch.py [generate_launch-5] Generated launch file: /home/tapaswee/clearpath/sensors/launch/camera_0.launch.py [generate_launch-5] Generated launch file: /home/tapaswee/clearpath/sensors/launch/sensors-service.launch.py [generate_launch-5] Generated launch file: <text:soft-page-break/>/home/tapaswee/clearpath/platform/launch/platform-service.launch.py [INFO] [generate_launch-5]: process has finished cleanly [pid 65743] [INFO] [generate_param-6]: process started with pid [65745] [ign gazebo-1] [Msg] Resource path resolve service on [/gazebo/resource_paths/resolve].[Msg] Ignition Gazebo GUI v6.17.1 [ign gazebo-1] [Dbg] [Gui.cc:253] Waiting for subscribers to [/gazebo/starting_world]... [ign gazebo-1] [Dbg] [Application.cc:92] Initializing application. [ign gazebo-1] [GUI] [Dbg] [Application.cc:560] Create main window [ign gazebo-1] [GUI] [Dbg] [PathManager.cc:66] Requesting resource paths through [/gazebo/resource_paths/get] [ign gazebo-1] [GUI] [Dbg] [Gui.cc:333] GUI requesting list of world names. The server may be busy downloading resources. Please be patient. [ign gazebo-1] [GUI] [Dbg] [PathManager.cc:55] Received resource paths. [ign gazebo-1] [GUI] [Dbg] [GuiRunner.cc:145] Requesting initial state from [/world/empty/state]... [ign gazebo-1] [GUI] [Msg] Loading config [/home/tapaswee/clearpath_ws/install/clearpath_gz/share/clearpath_gz/config/gui.config] [ign gazebo-1] [GUI] [Dbg] [Application.cc:431] Loading plugin [MinimalScene] [ign gazebo-1] [GUI] [Msg] Added plugin [3D View] to main window [ign gazebo-1] [GUI] [Msg] Loaded plugin [MinimalScene] from path [/usr/lib/x86_64-linux-gnu/ign-gui-6/plugins/libMinimalScene.so] [ign gazebo-1] [GUI] [Dbg] [Application.cc:431] Loading plugin [EntityContextMenuPlugin] [ign gazebo-1] [GUI] [Msg] Added plugin [Entity Context Menu] to main window [ign gazebo-1] [GUI] [Msg] Loaded plugin [EntityContextMenuPlugin] from path [/usr/lib/x86_64-linux-gnu/ign-gazebo-6/plugins/gui/libEntityContextMenuPlugin.so] [ign gazebo-1] [GUI] [Dbg] [Application.cc:431] Loading plugin [GzSceneManager] [ign gazebo-1] [GUI] [Msg] Added plugin [Scene Manager] to main window [ign gazebo-1] [GUI] [Msg] Loaded plugin [GzSceneManager] from path [/usr/lib/x86_64-linux-gnu/ign-gazebo-6/plugins/gui/libGzSceneManager.so] [ign gazebo-1] [GUI] [Dbg] [Application.cc:431] Loading plugin [InteractiveViewControl] [ign gazebo-1] [GUI] [Msg] Camera view controller topic advertised on [/gui/camera/view_control] [ign gazebo-1] [GUI] [Msg] Camera reference visual topic advertised on [/gui/camera/view_control/reference_visual] [ign gazebo-1] [GUI] [Msg] Camera view control sensitivity advertised on [/gui/camera/view_control/sensitivity] [ign gazebo-1] [GUI] [Msg] Added plugin [Interactive view control] to main window [ign gazebo-1] [GUI] [Msg] Loaded plugin [InteractiveViewControl] from path [/usr/lib/x86_64-linux-gnu/ign-gui-6/plugins/libInteractiveViewControl.so] [ign gazebo-1] [GUI] [Dbg] [Application.cc:431] Loading plugin [CameraTracking] [ign gazebo-1] [GUI] [Msg] Added plugin [Camera tracking] to main window [ign gazebo-1] [GUI] [Msg] Loaded plugin [CameraTracking] from path [/usr/lib/x86_64-linux-gnu/ign-gui-6/plugins/libCameraTracking.so] [ign gazebo-1] [GUI] [Dbg] [Application.cc:431] Loading plugin [MarkerManager] [ign gazebo-1] [GUI] [Wrn] [Application.cc:802] [QT] file::/Spawn/Spawn.qml:32:3: QML Connections: Implicitly defined onFoo properties in Connections are deprecated. Use this syntax instead: function onFoo(&lt;arguments&gt;) { ... } [generate_param-6] Generated config: /home/tapaswee/clearpath/sensors/config/camera_0.yaml [generate_param-6] Generated config: /home/tapaswee/clearpath/platform/config/control.yaml [generate_param-6] Generated config: /home/tapaswee/clearpath/platform/config/imu_filter.yaml [generate_param-6] Generated config: /home/tapaswee/clearpath/platform/config/localization.yaml [generate_param-6] Generated config: /home/tapaswee/clearpath/platform/config/teleop_interactive_markers.yaml [generate_param-6] Generated config: /home/tapaswee/clearpath/platform/config/teleop_joy.yaml [generate_param-6] Generated config: /home/tapaswee/clearpath/platform/config/twist_mux.yaml [generate_param-6] Generated config: /home/tapaswee/clearpath/manipulators/config/moveit.yaml [INFO] [generate_param-6]: process has finished cleanly [pid 65745] [ign gazebo-1] [GUI] [Msg] Listening to stats on [/world/empty/stats] [ign gazebo-1] [GUI] [Msg] Added plugin [Marker <text:soft-page-break/>Manager] to main window [ign gazebo-1] [GUI] [Msg] Loaded plugin [MarkerManager] from path [/usr/lib/x86_64-linux-gnu/ign-gui-6/plugins/libMarkerManager.so] [ign gazebo-1] [GUI] [Dbg] [Application.cc:431] Loading plugin [SelectEntities] [ign gazebo-1] [GUI] [Msg] Added plugin [Select entities] to main window [ign gazebo-1] [GUI] [Msg] Loaded plugin [SelectEntities] from path [/usr/lib/x86_64-linux-gnu/ign-gazebo-6/plugins/gui/libSelectEntities.so] [ign gazebo-1] [GUI] [Dbg] [Application.cc:431] Loading plugin [Spawn] [ign gazebo-1] [GUI] [Msg] Added plugin [Spawn] to main window [ign gazebo-1] [GUI] [Msg] Loaded plugin [Spawn] from path [/usr/lib/x86_64-linux-gnu/ign-gazebo-6/plugins/gui/libSpawn.so] [ign gazebo-1] [GUI] [Dbg] [Application.cc:431] Loading plugin [VisualizationCapabilities] [ign gazebo-1] [GUI] [Msg] View as transparent service on [/gui/view/transparent] [ign gazebo-1] [GUI] [Msg] View as wireframes service on [/gui/view/wireframes] [ign gazebo-1] [GUI] [Msg] View center of mass service on [/gui/view/com] [ign gazebo-1] [GUI] [Msg] View inertia service on [/gui/view/inertia] [ign gazebo-1] [GUI] [Msg] View collisions service on [/gui/view/collisions] [ign gazebo-1] [GUI] [Msg] View joints service on [/gui/view/joints] [ign gazebo-1] [GUI] [Msg] View frames service on [/gui/view/frames] [ign gazebo-1] [GUI] [Msg] Added plugin [Visualization capabilities] to main window [ign gazebo-1] [GUI] [Msg] Loaded plugin [VisualizationCapabilities] from path [/usr/lib/x86_64-linux-gnu/ign-gazebo-6/plugins/gui/libVisualizationCapabilities.so] [ign gazebo-1] [GUI] [Dbg] [Application.cc:431] Loading plugin [WorldControl] [ign gazebo-1] [GUI] [Msg] Using world control service [/world/empty/control] [ign gazebo-1] [GUI] [Msg] Listening to stats on [/world/empty/stats] [ign gazebo-1] [GUI] [Dbg] [WorldControl.cc:246] Using an event to share WorldControl msgs with the server [ign gazebo-1] [GUI] [Msg] Added plugin [World control] to main window [ign gazebo-1] [GUI] [Msg] Loaded plugin [WorldControl] from path [/usr/lib/x86_64-linux-gnu/ign-gui-6/plugins/libWorldControl.so] [ign gazebo-1] [GUI] [Dbg] [Application.cc:431] Loading plugin [WorldStats] [ign gazebo-1] [GUI] [Msg] Listening to stats on [/world/empty/stats] [ign gazebo-1] [GUI] [Msg] Added plugin [World stats] to main window [ign gazebo-1] [GUI] [Msg] Loaded plugin [WorldStats] from path [/usr/lib/x86_64-linux-gnu/ign-gui-6/plugins/libWorldStats.so] [ign gazebo-1] [GUI] [Wrn] [Application.cc:802] [QT] file::/TransformControl/TransformControl.qml:104:3: QML Connections: Implicitly defined onFoo properties in Connections are deprecated. Use this syntax instead: function onFoo(&lt;arguments&gt;) { ... } [ign gazebo-1] [GUI] [Wrn] [Application.cc:802] [QT] file::/TransformControl/TransformControl.qml:99:3: QML Connections: Implicitly defined onFoo properties in Connections are deprecated. Use this syntax instead: function onFoo(&lt;arguments&gt;) { ... } [ign gazebo-1] [GUI] [Wrn] [Application.cc:802] [QT] file::/TransformControl/TransformControl.qml:94:3: QML Connections: Implicitly defined onFoo properties in Connections are deprecated. Use this syntax instead: function onFoo(&lt;arguments&gt;) { ... } [ign gazebo-1] [GUI] [Wrn] [Application.cc:802] [QT] file::/TransformControl/TransformControl.qml:89:3: QML Connections: Implicitly defined onFoo properties in Connections are deprecated. Use this syntax instead: function onFoo(&lt;arguments&gt;) { ... } [INFO] [robot_state_publisher-7]: process started with pid [65748] [INFO] [spawner-8]: process started with pid [65750] [INFO] [spawner-9]: process started with pid [65752] [INFO] [ekf_node-10]: process started with pid [65754] [INFO] [marker_server-11]: process started with pid [65756] [INFO] [twist_mux-12]: process started with pid [65758] [INFO] [joy_linux_node-13]: process started with pid [65760] [INFO] [teleop_node-14]: process started with pid [65762] [INFO] [parameter_bridge-15]: process started with pid [65764] [INFO] [parameter_bridge-16]: process started with pid [65766] [INFO] [parameter_bridge-17]: process started with pid [65768] [INFO] [static_transform_publisher-18]: process started with pid [65770] [INFO] [image_bridge-19]: <text:soft-page-break/>process started with pid [65772] [INFO] [image_bridge-20]: process started with pid [65774] [INFO] [create-21]: process started with pid [65778] [twist_mux-12] [INFO] [1773169735.861784837] [cpr_a200_0000.twist_mux]: Topic handler 'topics.external' subscribed to topic 'cmd_vel': timeout = 0.500000s , priority = 1. [twist_mux-12] [INFO] [1773169735.869567013] [cpr_a200_0000.twist_mux]: Topic handler 'topics.interactive_marker' subscribed to topic 'twist_marker_server/cmd_vel': timeout = 0.500000s , priority = 8. [twist_mux-12] [INFO] [1773169735.870792606] [cpr_a200_0000.twist_mux]: Topic handler 'topics.joy' subscribed to topic 'joy_teleop/cmd_vel': timeout = 0.500000s , priority = 10. [static_transform_publisher-18] [INFO] [1773169735.874749333] [cpr_a200_0000.camera_0_static_tf]: Spinning until stopped - publishing transform [static_transform_publisher-18] translation: ('0.000000', '0.000000', '0.000000') [static_transform_publisher-18] rotation: ('0.000000', '0.000000', '0.000000', '1.000000') [static_transform_publisher-18] from 'camera_0_link' to 'cpr_a200_0000/robot/base_link/camera_0' [twist_mux-12] [INFO] [1773169735.875066790] [cpr_a200_0000.twist_mux]: Topic handler 'topics.rc' subscribed to topic 'rc_teleop/cmd_vel': timeout = 0.500000s , priority = 12. [twist_mux-12] [INFO] [1773169735.875754181] [cpr_a200_0000.twist_mux]: Topic handler 'locks.e_stop' subscribed to topic 'platform/emergency_stop': timeout = None , priority = 255. [marker_server-11] [INFO] [1773169735.875351675] [cpr_a200_0000.twist_server_node]: [interactive_marker_twist_server] Initialized. [teleop_node-14] [INFO] [1773169735.879947974] [TeleopTwistJoy]: Teleop enable button 4. [teleop_node-14] [INFO] [1773169735.880004330] [TeleopTwistJoy]: Turbo on button 5. [teleop_node-14] [INFO] [1773169735.880009499] [TeleopTwistJoy]: Linear axis x on 1 at scale 0.400000. [teleop_node-14] [INFO] [1773169735.880018276] [TeleopTwistJoy]: Turbo for linear axis x is scale 1.000000. [teleop_node-14] [INFO] [1773169735.880023315] [TeleopTwistJoy]: Angular axis yaw on 0 at scale 0.600000. [teleop_node-14] [INFO] [1773169735.880032152] [TeleopTwistJoy]: Turbo for angular axis yaw is scale 1.200000. [joy_linux_node-13] [ERROR] [1773169735.885435147] [cpr_a200_0000.joy_node]: Couldn't open joystick /dev/input/ps4. Will retry every second. [parameter_bridge-16] [INFO] [1773169735.907574768] [cpr_a200_0000.odom_base_tf_bridge]: Creating GZ-&gt;ROS Bridge: [/model/cpr_a200_0000/robot/tf (ignition.msgs.Pose_V) -&gt; /model/cpr_a200_0000/robot/tf (tf2_msgs/msg/TFMessage)] (Lazy 0) [parameter_bridge-15] [INFO] [1773169735.911414715] [cpr_a200_0000.cmd_vel_bridge]: Creating GZ-&gt;ROS Bridge: [cpr_a200_0000/cmd_vel (ignition.msgs.Twist) -&gt; cpr_a200_0000/cmd_vel (geometry_msgs/msg/Twist)] (Lazy 0) [robot_state_publisher-7] [INFO] [1773169735.913414233] [cpr_a200_0000.robot_state_publisher]: got segment base_footprint [robot_state_publisher-7] [INFO] [1773169735.913524951] [cpr_a200_0000.robot_state_publisher]: got segment base_link [robot_state_publisher-7] [INFO] [1773169735.913532956] [cpr_a200_0000.robot_state_publisher]: got segment bracket_0_link [robot_state_publisher-7] [INFO] [1773169735.913537876] [cpr_a200_0000.robot_state_publisher]: got segment bracket_0_mount [robot_state_publisher-7] [INFO] [1773169735.913546692] [cpr_a200_0000.robot_state_publisher]: got segment camera_0_bottom_screw_frame [robot_state_publisher-7] [INFO] [1773169735.913551391] [cpr_a200_0000.robot_state_publisher]: got segment camera_0_color_frame [robot_state_publisher-7] [INFO] [1773169735.913556020] [cpr_a200_0000.robot_state_publisher]: got segment camera_0_color_optical_frame [robot_state_publisher-7] [INFO] [1773169735.913560588] [cpr_a200_0000.robot_state_publisher]: got segment camera_0_depth_frame <text:soft-page-break/>[robot_state_publisher-7] [INFO] [1773169735.913565267] [cpr_a200_0000.robot_state_publisher]: got segment camera_0_depth_optical_frame [robot_state_publisher-7] [INFO] [1773169735.913569956] [cpr_a200_0000.robot_state_publisher]: got segment camera_0_infra1_frame [robot_state_publisher-7] [INFO] [1773169735.913574054] [cpr_a200_0000.robot_state_publisher]: got segment camera_0_infra1_optical_frame [robot_state_publisher-7] [INFO] [1773169735.913578682] [cpr_a200_0000.robot_state_publisher]: got segment camera_0_infra2_frame [robot_state_publisher-7] [INFO] [1773169735.913583451] [cpr_a200_0000.robot_state_publisher]: got segment camera_0_infra2_optical_frame [robot_state_publisher-7] [INFO] [1773169735.913588210] [cpr_a200_0000.robot_state_publisher]: got segment camera_0_link [robot_state_publisher-7] [INFO] [1773169735.913592799] [cpr_a200_0000.robot_state_publisher]: got segment default_mount [robot_state_publisher-7] [INFO] [1773169735.913597628] [cpr_a200_0000.robot_state_publisher]: got segment front_bumper_base_link [robot_state_publisher-7] [INFO] [1773169735.913602096] [cpr_a200_0000.robot_state_publisher]: got segment front_bumper_link [robot_state_publisher-7] [INFO] [1773169735.913606965] [cpr_a200_0000.robot_state_publisher]: got segment front_bumper_mount [robot_state_publisher-7] [INFO] [1773169735.913611574] [cpr_a200_0000.robot_state_publisher]: got segment front_left_wheel [robot_state_publisher-7] [INFO] [1773169735.913616213] [cpr_a200_0000.robot_state_publisher]: got segment front_right_wheel [robot_state_publisher-7] [INFO] [1773169735.913620551] [cpr_a200_0000.robot_state_publisher]: got segment inertial_link [robot_state_publisher-7] [INFO] [1773169735.913624909] [cpr_a200_0000.robot_state_publisher]: got segment rear_bumper_base_link [robot_state_publisher-7] [INFO] [1773169735.913629327] [cpr_a200_0000.robot_state_publisher]: got segment rear_bumper_link [robot_state_publisher-7] [INFO] [1773169735.913633666] [cpr_a200_0000.robot_state_publisher]: got segment rear_bumper_mount [robot_state_publisher-7] [INFO] [1773169735.913638405] [cpr_a200_0000.robot_state_publisher]: got segment rear_left_wheel [robot_state_publisher-7] [INFO] [1773169735.913643023] [cpr_a200_0000.robot_state_publisher]: got segment rear_right_wheel [robot_state_publisher-7] [INFO] [1773169735.913647361] [cpr_a200_0000.robot_state_publisher]: got segment sensor_arch_link [robot_state_publisher-7] [INFO] [1773169735.913651439] [cpr_a200_0000.robot_state_publisher]: got segment sensor_arch_mount [robot_state_publisher-7] [INFO] [1773169735.913655657] [cpr_a200_0000.robot_state_publisher]: got segment top_chassis_link [create-21] [INFO] [1773169735.915235135] [cpr_a200_0000.ros_gz_sim]: Requesting list of world names. [ign gazebo-1] [GUI] [Wrn] [Application.cc:802] [QT] file::/WorldStats/WorldStats.qml:53:3: QML RowLayout: Binding loop detected for property "x" [parameter_bridge-15] [INFO] [1773169736.015760943] [cpr_a200_0000.cmd_vel_bridge]: Creating ROS-&gt;GZ Bridge: [/model/cpr_a200_0000/robot/cmd_vel (geometry_msgs/msg/Twist) -&gt; /model/cpr_a200_0000/robot/cmd_vel (ignition.msgs.Twist)] (Lazy 0) [create-21] [INFO] [1773169736.117851771] [cpr_a200_0000.ros_gz_sim]: Waiting messages on topic [robot_description]. [spawner-9] [INFO] [1773169736.147526154] [cpr_a200_0000.spawner_platform_velocity_controller]: waiting for service /cpr_a200_0000/controller_manager/list_controllers to become available... [spawner-8] [INFO] [1773169736.157239991] [cpr_a200_0000.spawner_joint_state_broadcaster]: waiting for service <text:soft-page-break/>/cpr_a200_0000/controller_manager/list_controllers to become available... [ign gazebo-1] libEGL warning: egl: failed to create dri2 screen [ign gazebo-1] libEGL warning: egl: failed to create dri2 screen [create-21] [INFO] [1773169736.218346239] [cpr_a200_0000.ros_gz_sim]: Requested creation of entity. [create-21] [INFO] [1773169736.218388358] [cpr_a200_0000.ros_gz_sim]: OK creation of entity. [INFO] [create-21]: process has finished cleanly [pid 65778] [ign gazebo-1] [GUI] [Dbg] [Application.cc:431] Loading plugin [Shapes] [ign gazebo-1] [GUI] [Msg] Added plugin [Shapes] to main window [ign gazebo-1] [GUI] [Msg] Loaded plugin [Shapes] from path [/usr/lib/x86_64-linux-gnu/ign-gazebo-6/plugins/gui/libShapes.so] [ign gazebo-1] [GUI] [Dbg] [Application.cc:431] Loading plugin [Lights] [ign gazebo-1] [GUI] [Msg] Added plugin [Lights] to main window [ign gazebo-1] [GUI] [Msg] Loaded plugin [Lights] from path [/usr/lib/x86_64-linux-gnu/ign-gazebo-6/plugins/gui/libLights.so] [ign gazebo-1] [GUI] [Dbg] [Application.cc:431] Loading plugin [TransformControl] [ign gazebo-1] [GUI] [Dbg] [TransformControl.cc:222] Legacy mode is disabled; this plugin must be used with MinimalScene. [ign gazebo-1] [GUI] [Msg] Added plugin [Transform control] to main window [ign gazebo-1] [GUI] [Msg] Loaded plugin [TransformControl] from path [/usr/lib/x86_64-linux-gnu/ign-gazebo-6/plugins/gui/libTransformControl.so] [ign gazebo-1] [GUI] [Dbg] [Application.cc:431] Loading plugin [Screenshot] [ign gazebo-1] [GUI] [Msg] Screenshot service on [/gui/screenshot] [ign gazebo-1] [GUI] [Msg] Added plugin [Screenshot] to main window [ign gazebo-1] [GUI] [Msg] Loaded plugin [Screenshot] from path [/usr/lib/x86_64-linux-gnu/ign-gui-6/plugins/libScreenshot.so] [ign gazebo-1] [GUI] [Dbg] [Application.cc:431] Loading plugin [CopyPaste] [ign gazebo-1] [GUI] [Msg] Added plugin [Copy/Paste] to main window [ign gazebo-1] [GUI] [Msg] Loaded plugin [CopyPaste] from path [/usr/lib/x86_64-linux-gnu/ign-gazebo-6/plugins/gui/libCopyPaste.so] [ign gazebo-1] [GUI] [Dbg] [Application.cc:431] Loading plugin [Teleop] [ign gazebo-1] [GUI] [Msg] Added plugin [Teleop] to main window [ign gazebo-1] [GUI] [Msg] Loaded plugin [Teleop] from path [/usr/lib/x86_64-linux-gnu/ign-gui-6/plugins/libTeleop.so] [ign gazebo-1] [GUI] [Dbg] [Application.cc:301] Loading window config [ign gazebo-1] [GUI] [Msg] Using server control service [/server_control] [ign gazebo-1] [GUI] [Dbg] [Application.cc:574] Applying config [ign gazebo-1] [GUI] [Msg] Loading plugin [ignition-rendering-ogre2] [ign gazebo-1] [GUI] [Dbg] [MinimalScene.cc:602] Create scene [scene] [ign gazebo-1] [GUI] [Msg] Loading plugin [ignition-rendering-ogre2] [ign gazebo-1] [GUI] [Dbg] [TransformControl.cc:531] TransformControl plugin is using camera [scene::Camera(65527)] [ign gazebo-1] [GUI] [Msg] Loading plugin [ignition-rendering-ogre2] [ign gazebo-1] [GUI] [Msg] Loading plugin [ignition-rendering-ogre2] [ign gazebo-1] [GUI] [Dbg] [Spawn.cc:289] Spawn plugin is using camera [scene::Camera(65527)] [ign gazebo-1] [GUI] [Msg] Loading plugin [ignition-rendering-ogre2] [parameter_bridge-17] [INFO] [1773169736.928703067] [cpr_a200_0000.sensors.camera_0_gz_bridge]: Creating GZ-&gt;ROS Bridge: [/cpr_a200_0000/sensors/camera_0/camera_info (gz.msgs.CameraInfo) -&gt; camera_0/color/camera_info (sensor_msgs/msg/CameraInfo)] (Lazy 0) [parameter_bridge-17] [INFO] [1773169736.931380189] [cpr_a200_0000.sensors.camera_0_gz_bridge]: Creating GZ-&gt;ROS Bridge: [/cpr_a200_0000/sensors/camera_0/points (gz.msgs.PointCloudPacked) -&gt; camera_0/points (sensor_msgs/msg/PointCloud2)] (Lazy 0) [parameter_bridge-17] [INFO] [1773169736.932325876] [cpr_a200_0000.sensors.camera_0_gz_bridge]: Creating GZ-&gt;ROS Bridge: [/cpr_a200_0000/sensors/camera_0/camera_info (gz.msgs.CameraInfo) -&gt; camera_0/depth/camera_info (sensor_msgs/msg/CameraInfo)] (Lazy 0) [ign gazebo-1] [Wrn] [SimulationRunner.cc:662] Found additional publishers on /stats, using namespaced stats topic only <text:soft-page-break/>[ign gazebo-1] [Wrn] [SimulationRunner.cc:695] Found additional publishers on /clock, using namespaced clock topic only Again nothing in the world </text:p>
      <text:p text:style-name="Text_20_body">Your launch actually <text:span text:style-name="Strong_20_Emphasis">worked correctly</text:span> ✅ — Gazebo started, the robot entity was created, and all nodes launched.<text:line-break/>But the robot is <text:span text:style-name="Strong_20_Emphasis">likely outside the camera view or below the ground</text:span>, which is a very common Gazebo issue.</text:p>
      <text:p text:style-name="Text_20_body">Your log confirms the robot was spawned:</text:p>
      <text:section text:style-name="Sect1" text:name="Section79">
        <text:p text:style-name="Preformatted_20_Text"><text:bookmark text:name="code-block-viewer78"/>Requested creation of entity.</text:p>
        <text:p text:style-name="Preformatted_20_Text">OK creation of entity.</text:p>
      </text:section>
      <text:p text:style-name="Text_20_body">So the robot <text:span text:style-name="Strong_20_Emphasis">exists in the world</text:span>, it's just not visible yet.</text:p>
      <text:p text:style-name="Horizontal_20_Line"/>
      <text:h text:style-name="Heading_20_1" text:outline-level="1">🔎 First thing to try (very likely fix)</text:h>
      <text:p text:style-name="Text_20_body">In the Gazebo window:</text:p>
      <text:p text:style-name="Text_20_body">1️⃣ Click <text:span text:style-name="Strong_20_Emphasis">Scene Manager</text:span> (left panel)<text:line-break/>2️⃣ Expand <text:span text:style-name="Strong_20_Emphasis">empty</text:span> world<text:line-break/>3️⃣ You should see:</text:p>
      <text:section text:style-name="Sect1" text:name="Section80">
        <text:p text:style-name="Preformatted_20_Text"><text:bookmark text:name="code-block-viewer79"/>cpr_a200_0000</text:p>
      </text:section>
      <text:p text:style-name="Text_20_body">4️⃣ <text:span text:style-name="Strong_20_Emphasis">Right-click → Follow</text:span> or <text:span text:style-name="Strong_20_Emphasis">Move To</text:span></text:p>
      <text:p text:style-name="Text_20_body">The camera will jump to the robot.</text:p>
      <text:p text:style-name="Horizontal_20_Line"/>
      <text:h text:style-name="Heading_20_1" text:outline-level="1">🎯 Alternative quick fix (reset camera)</text:h>
      <text:p text:style-name="Text_20_body">Press:</text:p>
      <text:section text:style-name="Sect1" text:name="Section81">
        <text:p text:style-name="Preformatted_20_Text"><text:bookmark text:name="code-block-viewer80"/>F</text:p>
      </text:section>
      <text:p text:style-name="Text_20_body">after selecting the robot in the <text:span text:style-name="Strong_20_Emphasis">Scene Manager</text:span>.</text:p>
      <text:p text:style-name="Text_20_body">This frames the robot.</text:p>
      <text:p text:style-name="Horizontal_20_Line"/>
      <text:h text:style-name="Heading_20_1" text:outline-level="1">🧭 If still not visible</text:h>
      <text:p text:style-name="Text_20_body">Open the terminal and check if the robot model exists:</text:p>
      <text:section text:style-name="Sect1" text:name="Section82">
        <text:p text:style-name="Preformatted_20_Text"><text:bookmark text:name="code-block-viewer81"/>ign topic -l | grep model</text:p>
      </text:section>
      <text:p text:style-name="Text_20_body">or</text:p>
      <text:section text:style-name="Sect1" text:name="Section83">
        <text:p text:style-name="Preformatted_20_Text"><text:bookmark text:name="code-block-viewer82"/>ign service -l | grep world</text:p>
      </text:section>
      <text:p text:style-name="Text_20_body">You can also check ROS topics:</text:p>
      <text:section text:style-name="Sect1" text:name="Section84">
        <text:p text:style-name="Preformatted_20_Text"><text:bookmark text:name="code-block-viewer83"/>ros2 topic list | grep robot</text:p>
      </text:section>
      <text:p text:style-name="Text_20_body">If you see:</text:p>
      <text:section text:style-name="Sect1" text:name="Section85">
        <text:p text:style-name="Preformatted_20_Text"><text:bookmark text:name="code-block-viewer84"/><text:soft-page-break/>/model/cpr_a200_0000/robot/cmd_vel</text:p>
      </text:section>
      <text:p text:style-name="Text_20_body">then the robot <text:span text:style-name="Strong_20_Emphasis">is definitely spawned</text:span>.</text:p>
      <text:p text:style-name="Horizontal_20_Line"/>
      <text:h text:style-name="Heading_20_1" text:outline-level="1">🛠️ Most reliable fix (spawn position)</text:h>
      <text:p text:style-name="Text_20_body">Sometimes the robot spawns <text:span text:style-name="Strong_20_Emphasis">underground or very far away</text:span>.<text:line-break/>Run the launch again with a spawn position:</text:p>
      <text:section text:style-name="Sect1" text:name="Section86">
        <text:p text:style-name="Preformatted_20_Text"><text:bookmark text:name="code-block-viewer85"/>ros2 launch clearpath_gz simulation.launch.py \</text:p>
        <text:p text:style-name="Preformatted_20_Text">setup_path:=$HOME/clearpath \</text:p>
        <text:p text:style-name="Preformatted_20_Text">world:=empty \</text:p>
        <text:p text:style-name="Preformatted_20_Text">x:=0 y:=0 z:=0.2</text:p>
      </text:section>
      <text:p text:style-name="Text_20_body">The <text:span text:style-name="Strong_20_Emphasis">z=0.2</text:span> ensures it spawns <text:span text:style-name="Strong_20_Emphasis">above the ground</text:span>.</text:p>
      <text:p text:style-name="Horizontal_20_Line"/>
      <text:h text:style-name="Heading_20_1" text:outline-level="1">⚠️ Another thing I noticed in your logs</text:h>
      <text:p text:style-name="Text_20_body">Your robot <text:span text:style-name="Strong_20_Emphasis">still has no manipulator</text:span>.</text:p>
      <text:p text:style-name="Text_20_body">These links are present:</text:p>
      <text:section text:style-name="Sect1" text:name="Section87">
        <text:p text:style-name="Preformatted_20_Text"><text:bookmark text:name="code-block-viewer86"/>sensor_arch_link</text:p>
        <text:p text:style-name="Preformatted_20_Text">sensor_arch_mount</text:p>
        <text:p text:style-name="Preformatted_20_Text">bracket_0_mount</text:p>
        <text:p text:style-name="Preformatted_20_Text">camera_0_link</text:p>
      </text:section>
      <text:p text:style-name="Text_20_body">But <text:span text:style-name="Strong_20_Emphasis">no Kinova arm joints</text:span> like:</text:p>
      <text:section text:style-name="Sect1" text:name="Section88">
        <text:p text:style-name="Preformatted_20_Text"><text:bookmark text:name="code-block-viewer87"/>gen3_joint_1</text:p>
        <text:p text:style-name="Preformatted_20_Text">gen3_joint_2</text:p>
      </text:section>
      <text:p text:style-name="Text_20_body">So the manipulator was <text:span text:style-name="Strong_20_Emphasis">not added to the URDF</text:span> yet.</text:p>
      <text:p text:style-name="Horizontal_20_Line"/>
      <text:h text:style-name="Heading_20_1" text:outline-level="1">✅ After fixing visibility, verify the arm</text:h>
      <text:p text:style-name="Text_20_body">Run:</text:p>
      <text:section text:style-name="Sect1" text:name="Section89">
        <text:p text:style-name="Preformatted_20_Text"><text:bookmark text:name="code-block-viewer88"/>ros2 topic list | grep joint</text:p>
      </text:section>
      <text:p text:style-name="Text_20_body">If the arm exists you should see something like:</text:p>
      <text:section text:style-name="Sect1" text:name="Section90">
        <text:p text:style-name="Preformatted_20_Text"><text:bookmark text:name="code-block-viewer89"/>/joint_states</text:p>
      </text:section>
      <text:p text:style-name="Text_20_body">and arm joints in RViz.</text:p>
      <text:p text:style-name="Horizontal_20_Line"/>
      <text:h text:style-name="Heading_20_1" text:outline-level="1">🚀 If you want, I can also show you a <text:span text:style-name="Strong_20_Emphasis">known working Clearpath mobile manipulation config</text:span> that gives you:</text:h>
      <text:list xml:id="list596259135" text:style-name="L14">
        <text:list-item>
          <text:p text:style-name="P15">Husky/A200 base</text:p>
        </text:list-item>
        <text:list-item>
          <text:p text:style-name="P15"><text:soft-page-break/>Kinova Gen3 arm</text:p>
        </text:list-item>
        <text:list-item>
          <text:p text:style-name="P15">Hokuyo lidar</text:p>
        </text:list-item>
        <text:list-item>
          <text:p text:style-name="P15">RealSense camera</text:p>
        </text:list-item>
      </text:list>
      <text:p text:style-name="Text_20_body">This avoids <text:span text:style-name="Strong_20_Emphasis">90% of the Clearpath generator errors</text:span> you’ve been hitting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01:02:49.781318726</meta:creation-date>
    <dc:date>2026-03-11T01:04:11.400556778</dc:date>
    <meta:editing-duration>PT1M22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35" meta:paragraph-count="511" meta:word-count="8473" meta:character-count="85885" meta:non-whitespace-character-count="77535"/>
  </office:meta>
</office:document-meta>
</file>