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4ba" officeooo:paragraph-rsid="000d84ba"/>
    </style:style>
    <style:style style:name="P2" style:family="paragraph" style:parent-style-name="Preformatted_20_Text">
      <style:text-properties officeooo:paragraph-rsid="00105b76"/>
    </style:style>
    <style:style style:name="P3" style:family="paragraph" style:parent-style-name="Standard">
      <style:text-properties officeooo:paragraph-rsid="00105b76"/>
    </style:style>
    <style:style style:name="P4" style:family="paragraph" style:parent-style-name="Text_20_body">
      <style:text-properties officeooo:paragraph-rsid="00105b76"/>
    </style:style>
    <style:style style:name="P5" style:family="paragraph" style:parent-style-name="Preformatted_20_Text">
      <style:text-properties officeooo:paragraph-rsid="00139840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>
      <style:text-properties fo:font-weight="bold" officeooo:paragraph-rsid="00105b76"/>
    </style:style>
    <style:style style:name="P8" style:family="paragraph" style:parent-style-name="Text_20_body">
      <style:text-properties officeooo:rsid="001665f7" officeooo:paragraph-rsid="001665f7"/>
    </style:style>
    <style:style style:name="P9" style:family="paragraph" style:parent-style-name="Text_20_body">
      <style:text-properties officeooo:rsid="00175dbe" officeooo:paragraph-rsid="00175dbe"/>
    </style:style>
    <style:style style:name="P10" style:family="paragraph" style:parent-style-name="Text_20_body">
      <style:text-properties officeooo:rsid="00175dbe" officeooo:paragraph-rsid="001bc790"/>
    </style:style>
    <style:style style:name="P11" style:family="paragraph" style:parent-style-name="Heading_20_1">
      <style:text-properties officeooo:rsid="002995aa" officeooo:paragraph-rsid="002995aa"/>
    </style:style>
    <style:style style:name="P12" style:family="paragraph" style:parent-style-name="Text_20_body">
      <style:text-properties officeooo:rsid="002995aa" officeooo:paragraph-rsid="002995aa"/>
    </style:style>
    <style:style style:name="P13" style:family="paragraph" style:parent-style-name="Text_20_body">
      <style:text-properties officeooo:rsid="00258dcb" officeooo:paragraph-rsid="00258dcb"/>
    </style:style>
    <style:style style:name="P14" style:family="paragraph" style:parent-style-name="Text_20_body">
      <style:text-properties officeooo:rsid="0026903a" officeooo:paragraph-rsid="0026903a"/>
    </style:style>
    <style:style style:name="P15" style:family="paragraph" style:parent-style-name="Text_20_body">
      <style:text-properties officeooo:rsid="0026903a" officeooo:paragraph-rsid="0027d73c"/>
    </style:style>
    <style:style style:name="P16" style:family="paragraph" style:parent-style-name="Text_20_body">
      <style:text-properties officeooo:rsid="0026903a" officeooo:paragraph-rsid="0038305b"/>
    </style:style>
    <style:style style:name="P17" style:family="paragraph" style:parent-style-name="Text_20_body">
      <style:text-properties officeooo:rsid="0033a546" officeooo:paragraph-rsid="0033a546"/>
    </style:style>
    <style:style style:name="P18" style:family="paragraph" style:parent-style-name="Text_20_body">
      <style:text-properties officeooo:rsid="0039f8cd" officeooo:paragraph-rsid="0039f8cd"/>
    </style:style>
    <style:style style:name="P19" style:family="paragraph" style:parent-style-name="Title">
      <style:text-properties officeooo:rsid="0039f8cd" officeooo:paragraph-rsid="0039f8cd"/>
    </style:style>
    <style:style style:name="P20" style:family="paragraph" style:parent-style-name="Text_20_body">
      <style:text-properties officeooo:rsid="003f7b58" officeooo:paragraph-rsid="003f7b58"/>
    </style:style>
    <style:style style:name="P21" style:family="paragraph" style:parent-style-name="Text_20_body">
      <style:text-properties officeooo:rsid="0049df8c" officeooo:paragraph-rsid="0049df8c"/>
    </style:style>
    <style:style style:name="P22" style:family="paragraph" style:parent-style-name="Title">
      <style:text-properties officeooo:rsid="0049df8c" officeooo:paragraph-rsid="0049df8c"/>
    </style:style>
    <style:style style:name="P23" style:family="paragraph" style:parent-style-name="Text_20_body">
      <style:text-properties officeooo:rsid="004f7406" officeooo:paragraph-rsid="004f7406"/>
    </style:style>
    <style:style style:name="P24" style:family="paragraph" style:parent-style-name="Title">
      <style:text-properties officeooo:rsid="004f7406" officeooo:paragraph-rsid="004f7406"/>
    </style:style>
    <style:style style:name="P25" style:family="paragraph" style:parent-style-name="Text_20_body">
      <style:text-properties officeooo:paragraph-rsid="004f7406"/>
    </style:style>
    <style:style style:name="P26" style:family="paragraph" style:parent-style-name="Text_20_body">
      <style:text-properties officeooo:rsid="00506a1c" officeooo:paragraph-rsid="00506a1c"/>
    </style:style>
    <style:style style:name="P27" style:family="paragraph" style:parent-style-name="Heading_20_2">
      <style:text-properties officeooo:rsid="004f7406" officeooo:paragraph-rsid="004f7406"/>
    </style:style>
    <style:style style:name="T1" style:family="text">
      <style:text-properties officeooo:rsid="0011f978"/>
    </style:style>
    <style:style style:name="T2" style:family="text">
      <style:text-properties officeooo:rsid="00139840"/>
    </style:style>
    <style:style style:name="T3" style:family="text">
      <style:text-properties officeooo:rsid="002f66d5"/>
    </style:style>
    <style:style style:name="T4" style:family="text">
      <style:text-properties officeooo:rsid="0030730e"/>
    </style:style>
    <style:style style:name="T5" style:family="text">
      <style:text-properties fo:font-weight="bold"/>
    </style:style>
    <style:style style:name="T6" style:family="text">
      <style:text-properties officeooo:rsid="0049df8c"/>
    </style:style>
    <style:style style:name="T7" style:family="text">
      <style:text-properties officeooo:rsid="0054d337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0">dict_keys(['franka_gripper', 'kinova_2f_lite', 'robotiq_2f_140', 'robotiq_2f_85'])</text:p>
      <text:p text:style-name="P10"><text:s/>Arm model 'kinova_gen3_dof' must be one of: 'dict_keys(['franka', 'kinova_gen3_6dof', 'kinova_gen3_7dof', 'kinova_gen3_lite', 'universal_robots'])'</text:p>
      <text:p text:style-name="P10"/>
      <text:p text:style-name="P10"><text:s/>Serial Number model entry must match one of ['dd100', 'do100', 'dd150', 'do150', 'j100', 'a200', 'r100', 'w200', 'generic']</text:p>
      <text:p text:style-name="P10"/>
      <text:p text:style-name="P1">Imp Commands:<text:line-break/>ClearPath:<text:line-break/>ros2 launch clearpath_gz simulation.launch.py</text:p>
      <text:p text:style-name="P1">rviz2 --ros-args -r /tf:=/cpr_a200_0000/tf -r /tf_static:=/cpr_a200_0000/tf_static</text:p>
      <text:p text:style-name="P1"/>
      <text:p text:style-name="P1"/>
      <text:p text:style-name="P3"><text:span text:style-name="T1">T</text:span>ypical Clearpath generation sequence</text:p>
      <text:p text:style-name="P4">Inside your workspace:</text:p>
      <text:section text:style-name="Sect1" text:name="Section13">
        <text:p text:style-name="P2"><text:bookmark text:name="code-block-viewer12"/>cd ~/clearpath_ws</text:p>
        <text:p text:style-name="P2">source install/setup.bash</text:p>
      </text:section>
      <text:p text:style-name="P4">Run:</text:p>
      <text:section text:style-name="Sect1" text:name="Section14">
        <text:p text:style-name="P2"><text:bookmark text:name="code-block-viewer13"/>ros2 run clearpath_generator_common generate_description -s ~/clearpath</text:p>
      </text:section>
      <text:p text:style-name="P4">Then:</text:p>
      <text:p text:style-name="P5"><text:bookmark text:name="code-block-viewer14"/>ros2 run clearpath_generator_common generate_semantic_description -s ~/clearpath</text:p>
      <text:p text:style-name="P4"/>
      <text:p text:style-name="P4"/>
      <text:p text:style-name="P7"><text:span text:style-name="T2">T</text:span>he Simulation (Generates the new URDF and spawns the robot)</text:p>
      <text:p text:style-name="Text_20_body"/>
      <text:p text:style-name="Preformatted_20_Text"><text:span text:style-name="Source_20_Text">cd ~/clearpath_ws</text:span></text:p>
      <text:p text:style-name="Preformatted_20_Text"><text:span text:style-name="Source_20_Text">source install/setup.bash</text:span></text:p>
      <text:p text:style-name="P6"><text:span text:style-name="Source_20_Text">ros2 launch clearpath_gz simulation.launch.py setup_path:=$HOME/clearpath generate:=true</text:span></text:p>
      <text:p text:style-name="P7">Terminal 2: MoveIt 2 (The Arm's Brain)</text:p>
      <text:p text:style-name="Text_20_body">Bash</text:p>
      <text:p text:style-name="Preformatted_20_Text"><text:span text:style-name="Source_20_Text">cd ~/clearpath_ws</text:span></text:p>
      <text:p text:style-name="Preformatted_20_Text"><text:span text:style-name="Source_20_Text">source install/setup.bash</text:span></text:p>
      <text:p text:style-name="P6"><text:span text:style-name="Source_20_Text">ros2 launch clearpath_manipulators moveit.launch.py setup_path:=$HOME/clearpath use_sim_time:=true</text:span></text:p>
      <text:p text:style-name="P7">Terminal 3: RViz (The Interface)</text:p>
      <text:p text:style-name="Text_20_body">Bash</text:p>
      <text:p text:style-name="Preformatted_20_Text"><text:span text:style-name="Source_20_Text">cd ~/clearpath_ws</text:span></text:p>
      <text:p text:style-name="Preformatted_20_Text"><text:span text:style-name="Source_20_Text">source install/setup.bash</text:span></text:p>
      <text:p text:style-name="P6"><text:soft-page-break/><text:span text:style-name="Source_20_Text">ros2 launch clearpath_viz view_moveit.launch.py namespace:=a200_0000 use_sim_time:=true</text:span></text:p>
      <text:p text:style-name="P8">CLOSING:<text:line-break/>killall -9 ruby ign gazebo parameter_bridge</text:p>
      <text:p text:style-name="P15">pkill -f ros2</text:p>
      <text:p text:style-name="P8"/>
      <text:p text:style-name="P8"/>
      <text:p text:style-name="P8"/>
      <text:p text:style-name="P8"/>
      <text:p text:style-name="P8"/>
      <text:p text:style-name="P9">Gazebo:<text:line-break/>ros2 launch clearpath_gz simulation.launch.py setup_path:=$HOME/clearpath generate:=true</text:p>
      <text:p text:style-name="P9"/>
      <text:p text:style-name="P9">Manipulator Moveit:<text:line-break/>ros2 launch clearpath_manipulators moveit.launch.py setup_path:=$HOME/clearpath use_sim_time:=true generate:=true<text:line-break/>ros2 launch clearpath_viz view_moveit.launch.py namespace:=cpr_a200_0000 use_sim_time:=true</text:p>
      <text:p text:style-name="P9"/>
      <text:p text:style-name="P9">Rviz:<text:line-break/>rviz2 --ros-args -r /tf:=/cpr_a200_000<text:span text:style-name="T3">1</text:span>/tf -r /tf_static:=/cpr_a200_000<text:span text:style-name="T4">1</text:span>/tf_static</text:p>
      <text:p text:style-name="P9"/>
      <text:p text:style-name="P9">Teleop:</text:p>
      <text:p text:style-name="P9">ros2 run teleop_twist_keyboard teleop_twist_keyboard --ros-args -r /cmd_vel:=/cpr_a200_000<text:span text:style-name="T6">0</text:span>/cmd_vel</text:p>
      <text:p text:style-name="P13"/>
      <text:p text:style-name="Title">ROS2:</text:p>
      <text:p text:style-name="P13">cd ~/clearpath_ws/src</text:p>
      <text:p text:style-name="P13">ros2 pkg create --build-type ament_python context_aware_nav</text:p>
      <text:p text:style-name="P13">cd ~/clearpath_ws</text:p>
      <text:p text:style-name="P13">colcon build --packages-select context_aware_nav --symlink-install</text:p>
      <text:p text:style-name="P13">source install/setup.bash</text:p>
      <text:p text:style-name="P13"><text:span text:style-name="T5">Nuke the background processes</text:span> Open a terminal and run these commands to forcefully stop the ROS 2 daemon and any lingering nodes:</text:p>
      <text:p text:style-name="Text_20_body"><text:soft-page-break/>Bash</text:p>
      <text:p text:style-name="Preformatted_20_Text"><text:span text:style-name="Source_20_Text">ros2 daemon stop</text:span></text:p>
      <text:p text:style-name="Preformatted_20_Text"><text:span text:style-name="Source_20_Text">pkill -f ros2</text:span></text:p>
      <text:p text:style-name="Preformatted_20_Text"><text:span text:style-name="Source_20_Text">pkill -f slam_toolbox</text:span></text:p>
      <text:p text:style-name="P6"><text:span text:style-name="Source_20_Text">pkill -f amcl</text:span></text:p>
      <text:p text:style-name="Text_20_body"><text:span text:style-name="T5">Step 2: Clear shared memory (Optional but recommended)</text:span> Sometimes FastDDS leaves dirty shared memory files. You can clear them out:</text:p>
      <text:p text:style-name="Text_20_body">Bash</text:p>
      <text:p text:style-name="P6"><text:span text:style-name="Source_20_Text">rm -rf /dev/shm/fastrtps*</text:span></text:p>
      <text:p text:style-name="P13"/>
      <text:p text:style-name="P9"/>
      <text:p text:style-name="P9"/>
      <text:p text:style-name="P9"/>
      <text:p text:style-name="P9"/>
      <text:p text:style-name="P9"/>
      <text:p text:style-name="Title">20-03-2026</text:p>
      <text:p text:style-name="P14">Gazebo:</text:p>
      <text:p text:style-name="P14">ros2 launch clearpath_gz simulation.launch.py setup_path:=$HOME/clearpath/a200/test1/ use_sim_time:=true generate:=true</text:p>
      <text:p text:style-name="P14"/>
      <text:p text:style-name="P14">Map:</text:p>
      <text:p text:style-name="P14">ros2 launch clearpath_nav2_demos slam.launch.py setup_path:=$HOME/clearpath/a200/test1/ use_sim_time:=true</text:p>
      <text:p text:style-name="P14"/>
      <text:p text:style-name="P14">Nav2:</text:p>
      <text:p text:style-name="P16"><text:s/>ros2 launch clearpath_nav2_demos localization.launch.py setup_path:=$HOME/clearpath/a200/test1/ use_sim_time:=true </text:p>
      <text:p text:style-name="P14"/>
      <text:h text:style-name="P11" text:outline-level="1">Performance / System Metrics</text:h>
      <text:p text:style-name="Text_20_body">You can show:</text:p>
      <text:section text:style-name="Sect1" text:name="code-block-viewer">
        <text:p text:style-name="Preformatted_20_Text">ros2 topic hz /cpr_a200_0001/sensors/lidar2d_0/scan</text:p>
      </text:section>
      <text:section text:style-name="Sect1" text:name="Section1">
        <text:p text:style-name="Preformatted_20_Text"><text:bookmark text:name="code-block-viewer"/>ros2 topic hz /cpr_a200_0001/platform/odom</text:p>
      </text:section>
      <text:p text:style-name="P12"/>
      <text:p text:style-name="P12"><text:soft-page-break/>rviz2 --ros-args -r /tf:=/cpr_a200_0001/tf -r /tf_static:=/cpr_a200_0001/tf_static</text:p>
      <text:p text:style-name="P12">tapaswee@tapaswee-Legion-Slim-5-16AHP9:~/clearpath_ws$ ros2 launch clearpath_nav2_demos slam.launch.py setup_path:=$HOME/clearpath/a200/test1/ use_sim_time:=true</text:p>
      <text:p text:style-name="P12">tapaswee@tapaswee-Legion-Slim-5-16AHP9:~/clearpath_ws$ ros2 param get /cpr_a200_0001/arm_0_joint_trajectory_controller joint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utputs:</text:p>
      <text:p text:style-name="P12">tapaswee@tapaswee-Legion-Slim-5-16AHP9:~/clearpath_ws$ ros2 node list</text:p>
      <text:p text:style-name="P12">ros2 topic echo /tf --once</text:p>
      <text:p text:style-name="P12">/clock_bridge</text:p>
      <text:p text:style-name="P12">/cpr_a200_0001/arm_0_gripper_controller</text:p>
      <text:p text:style-name="P12">/cpr_a200_0001/arm_0_joint_trajectory_controller</text:p>
      <text:p text:style-name="P12">/cpr_a200_0001/camera_0_static_tf</text:p>
      <text:p text:style-name="P12">/cpr_a200_0001/cmd_vel_bridge</text:p>
      <text:p text:style-name="P12">/cpr_a200_0001/controller_manager</text:p>
      <text:p text:style-name="P12">/cpr_a200_0001/ekf_node</text:p>
      <text:p text:style-name="P12">/cpr_a200_0001/gz_ros2_control</text:p>
      <text:p text:style-name="P12">/cpr_a200_0001/joint_state_broadcaster</text:p>
      <text:p text:style-name="P12">/cpr_a200_0001/joy_node</text:p>
      <text:p text:style-name="P12">/cpr_a200_0001/lidar2d_0_static_tf</text:p>
      <text:p text:style-name="P12">/cpr_a200_0001/odom_base_tf_bridge</text:p>
      <text:p text:style-name="P12">/cpr_a200_0001/platform_velocity_controller</text:p>
      <text:p text:style-name="P12">/cpr_a200_0001/robot_state_publisher</text:p>
      <text:p text:style-name="P12">/cpr_a200_0001/rviz2</text:p>
      <text:p text:style-name="P12">/cpr_a200_0001/rviz_navigation_dialog_action_client</text:p>
      <text:p text:style-name="P12">/cpr_a200_0001/sensors/camera_0_gz_bridge</text:p>
      <text:p text:style-name="P12"><text:soft-page-break/>/cpr_a200_0001/sensors/camera_0_gz_depth_bridge</text:p>
      <text:p text:style-name="P12">/cpr_a200_0001/sensors/camera_0_gz_image_bridge</text:p>
      <text:p text:style-name="P12">/cpr_a200_0001/sensors/lidar2d_0_gz_bridge</text:p>
      <text:p text:style-name="P12">/cpr_a200_0001/teleop_twist_joy_node</text:p>
      <text:p text:style-name="P12">/cpr_a200_0001/transform_listener_impl_568fb0595e50</text:p>
      <text:p text:style-name="P12">/cpr_a200_0001/transform_listener_impl_5dd5a5594d40</text:p>
      <text:p text:style-name="P12">/cpr_a200_0001/twist_mux</text:p>
      <text:p text:style-name="P12">/cpr_a200_0001/twist_server_node</text:p>
      <text:p text:style-name="P12">/relay</text:p>
      <text:p text:style-name="P12">transforms:</text:p>
      <text:p text:style-name="P12">- header:</text:p>
      <text:p text:style-name="P12"><text:s text:c="4"/>stamp:</text:p>
      <text:p text:style-name="P12"><text:s text:c="6"/>sec: 301</text:p>
      <text:p text:style-name="P12"><text:s text:c="6"/>nanosec: 14000000</text:p>
      <text:p text:style-name="P12"><text:s text:c="4"/>frame_id: odom</text:p>
      <text:p text:style-name="P12"><text:s text:c="2"/>child_frame_id: base_link</text:p>
      <text:p text:style-name="P12"><text:s text:c="2"/>transform:</text:p>
      <text:p text:style-name="P12"><text:s text:c="4"/>translation:</text:p>
      <text:p text:style-name="P12"><text:s text:c="6"/>x: -1.407250687953441e-16</text:p>
      <text:p text:style-name="P12"><text:s text:c="6"/>y: 1.2052459027384188e-33</text:p>
      <text:p text:style-name="P12"><text:s text:c="6"/>z: 0.0</text:p>
      <text:p text:style-name="P12"><text:s text:c="4"/>rotation:</text:p>
      <text:p text:style-name="P12"><text:s text:c="6"/>x: 0.0</text:p>
      <text:p text:style-name="P12"><text:s text:c="6"/>y: 0.0</text:p>
      <text:p text:style-name="P12"><text:s text:c="6"/>z: 0.0</text:p>
      <text:p text:style-name="P12"><text:s text:c="6"/>w: 1.0</text:p>
      <text:p text:style-name="P12">---</text:p>
      <text:p text:style-name="P12">tapaswee@tapaswee-Legion-Slim-5-16AHP9:~/clearpath_ws$ </text:p>
      <text:p text:style-name="P12"/>
      <text:p text:style-name="P12"/>
      <text:p text:style-name="P12"/>
      <text:p text:style-name="P12"/>
      <text:p text:style-name="P12"><text:soft-page-break/></text:p>
      <text:p text:style-name="Title">24/03/2025</text:p>
      <text:p text:style-name="P17">tapaswee@tapaswee-Legion-Slim-5-16AHP9:~/clearpath_ws$ ros2 run teleop_twist_keyboard teleop_twist_keyboard --ros-args -r /cmd_vel:=/cpr_a200_0001/cmd_vel</text:p>
      <text:p text:style-name="P12"/>
      <text:p text:style-name="P12">tapaswee@tapaswee-Legion-Slim-5-16AHP9:~/clearpath_ws$ rviz2 --ros-args -r /tf:=/cpr_a200_0001/tf -r /tf_static:=/cpr_a200_0001/tf_static</text:p>
      <text:p text:style-name="P12"/>
      <text:p text:style-name="P12">tapaswee@tapaswee-Legion-Slim-5-16AHP9:~/clearpath_ws$ ros2 launch clearpath_nav2_demos slam.launch.py setup_path:=$HOME/clearpath/a200/test1/ use_sim_time:=true</text:p>
      <text:p text:style-name="P12"/>
      <text:p text:style-name="P12">tapaswee@tapaswee-Legion-Slim-5-16AHP9:~/clearpath_ws$ ros2 launch clearpath_gz simulation.launch.py setup_path:=$HOME/clearpath/a200/test1/ use_sim_time:=true generate:=tru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>25/03/2025</text:p>
      <text:p text:style-name="P18">ros2 launch clearpath_gz simulation.launch.py <text:s text:c="2"/>setup_path:=$HOME/clearpath/a200/test1/ <text:s text:c="2"/>use_sim_time:=true generate:=true</text:p>
      <text:p text:style-name="P18">ros2 launch clearpath_nav2_demos slam.launch.py <text:s text:c="2"/>setup_path:=$HOME/clearpath/a200/test1/ <text:s text:c="2"/>use_sim_time:=true <text:s text:c="2"/>namespace:=cpr_a200_0000</text:p>
      <text:p text:style-name="P18">rviz2 --ros-args -r /tf:=/cpr_a200_0000/tf -r /tf_static:=/cpr_a200_0000/tf_static</text:p>
      <text:p text:style-name="P12"/>
      <text:p text:style-name="P12"/>
      <text:p text:style-name="P12"/>
      <text:p text:style-name="P20">LAUNCH WITH MAP LOADED:<text:line-break/>ros2 launch clearpath_gz simulation.launch.py setup_path:=$HOME/clearpath/a200/test1/ use_sim_time:=true generate:=true<text:tab/></text:p>
      <text:p text:style-name="P20">ros2 launch clearpath_viz view_navigation.launch.py namespace:=cpr_a200_000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ext_20_body"><text:soft-page-break/>Final:<text:line-break/>ros2 launch clearpath_gz simulation.launch.py setup_path:=$HOME/clearpath/a200/test1/ use_sim_time:=true generate:=trueros2 launch clearpath_nav2_demos localization.launch.py setup_path:=$HOME/clearpath/a200/test1/ use_sim_time:=true map:=$HOME/clearpath_ws/my_warehouse_map.yaml</text:p>
      <text:p text:style-name="Text_20_body">ros2 launch clearpath_nav2_demos nav2.launch.py setup_path:=$HOME/clearpath/a200/test1/ use_sim_time:=true</text:p>
      <text:p text:style-name="Text_20_body"><text:s/>ros2 launch clearpath_viz view_navigation.launch.py namespace:=cpr_a200_0000</text:p>
      <text:p text:style-name="Text_20_body"/>
      <text:p text:style-name="P22">Save Frames</text:p>
      <text:p text:style-name="P21">ros2 run tf2_tools view_frames --ros-args \</text:p>
      <text:p text:style-name="P21"><text:s text:c="2"/>-p use_sim_time:=true \</text:p>
      <text:p text:style-name="P21"><text:s text:c="2"/>--remap /tf:=/cpr_a200_0000/tf \</text:p>
      <text:p text:style-name="P21"><text:s text:c="2"/>--remap /tf_static:=/cpr_a200_0000/tf_static</text:p>
      <text:p text:style-name="P21">)</text:p>
      <text:p text:style-name="Title">ARM</text:p>
      <text:p text:style-name="Text_20_body">tapaswee@tapaswee-Legion-Slim-5-16AHP9:~/clearpath_ws$ ros2 control list_controllers -c /cpr_a200_0001/controller_manager</text:p>
      <text:p text:style-name="Text_20_body">ros2 launch clearpath_nav2_demos localization.launch.py setup_path:=$HOME/clearpath/a200/test1/ use_sim_time:=true map:=$HOME/clearpath_ws/my_warehouse_map.yaml</text:p>
      <text:p text:style-name="Text_20_body">ros2 launch clearpath_nav2_demos nav2.launch.py setup_path:=$HOME/clearpath/a200/test1/ use_sim_time:=tru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4">Last Working 04/04/2026:</text:p>
      <text:p text:style-name="P23">Gazebo:</text:p>
      <text:p text:style-name="P23">ros2 launch clearpath_gz simulation.launch.py <text:s text:c="2"/>setup_path:=$HOME/clearpath/a200/test1/ <text:s text:c="2"/>use_sim_time:=true generate:=true</text:p>
      <text:p text:style-name="P23"/>
      <text:p text:style-name="P23">Slam:</text:p>
      <text:p text:style-name="P23"><text:s/>ros2 launch clearpath_nav2_demos slam.launch.py <text:s text:c="2"/>setup_path:=$HOME/clearpath/a200/test1/ <text:s text:c="2"/>use_sim_time:=true <text:s text:c="2"/>namespace:=cpr_a200_0000</text:p>
      <text:p text:style-name="P26">Nav2:</text:p>
      <text:p text:style-name="P26">ros2 launch clearpath_nav2_demos nav2.launch.py setup_path:=$HOME/clearpath/a200/test1/ use_sim_time:=true</text:p>
      <text:p text:style-name="P23"/>
      <text:p text:style-name="P23">ClearPath Viz :</text:p>
      <text:p text:style-name="P23">ros2 launch clearpath_viz view_navigation.launch.py namespace:=cpr_a200_0000</text:p>
      <text:p text:style-name="P23">Rviz2 : </text:p>
      <text:p text:style-name="P23">rviz2 --ros-args -r /tf:=/cpr_a200_0000/tf -r /tf_static:=/cpr_a200_0000/tf_static</text:p>
      <text:h text:style-name="P27" text:outline-level="2">Nodes:</text:h>
      <text:p text:style-name="P23">Smart Nav Vision:</text:p>
      <text:p text:style-name="P25">ros2 run context_aware_nav smart_nav_vision<text:span text:style-name="T7">2</text:span> --ros2-args use_sim_time:=true</text:p>
      <text:p text:style-name="P23">Yolo Context:</text:p>
      <text:p text:style-name="P25">ros2 run context_aware_nav yolo_context</text:p>
      <text:p text:style-name="P26">Grasp:</text:p>
      <text:p text:style-name="P26">ros2 run context_aware_nav grasp_node</text:p>
      <text:p text:style-name="P26">Contexst Manager:</text:p>
      <text:p text:style-name="P26">ros2 run context_aware_nav context_mg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995a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3:10:17.689630845</meta:creation-date>
    <dc:date>2026-04-09T11:52:50.392870723</dc:date>
    <meta:editing-duration>P2DT6H48M42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9" meta:paragraph-count="155" meta:word-count="588" meta:character-count="7705" meta:non-whitespace-character-count="7179"/>
  </office:meta>
</office:document-meta>
</file>